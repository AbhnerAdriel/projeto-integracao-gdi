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6000000E35B8EF9969AD9916F.png" manifest:media-type="image/png"/>
  <manifest:file-entry manifest:full-path="Pictures/10000201000001E10000008BD8AF43848D48AD20.png" manifest:media-type="image/png"/>
  <manifest:file-entry manifest:full-path="Pictures/100000000000015A000000471C878E77D48D93B6.jpg" manifest:media-type="image/jpeg"/>
  <manifest:file-entry manifest:full-path="Pictures/10000000000000D40000003A355FED38DE54F5C9.jpg" manifest:media-type="image/jpeg"/>
  <manifest:file-entry manifest:full-path="Pictures/10000000000000FD0000006E022483018EBFDE14.jpg" manifest:media-type="image/jpeg"/>
  <manifest:file-entry manifest:full-path="Pictures/10000000000000730000007FCCFFAACF63246FB0.jpg" manifest:media-type="image/jpeg"/>
  <manifest:file-entry manifest:full-path="Pictures/10000201000001FB00000069EBD9C2798598523E.png" manifest:media-type="image/png"/>
  <manifest:file-entry manifest:full-path="Pictures/10000000000000B400000068D1E6AEE10F678530.jpg" manifest:media-type="image/jpeg"/>
  <manifest:file-entry manifest:full-path="Pictures/100002010000010400000085C632E84C2B43A8B2.png" manifest:media-type="image/png"/>
  <manifest:file-entry manifest:full-path="Pictures/100000000000015700000025DD5793D24D113B4D.jpg" manifest:media-type="image/jpeg"/>
  <manifest:file-entry manifest:full-path="Pictures/100000000000012A00000059078FF1C80E80719B.jpg" manifest:media-type="image/jpeg"/>
  <manifest:file-entry manifest:full-path="Pictures/10000000000000D0000000AB34E11B0B31CD8400.jpg" manifest:media-type="image/jpeg"/>
  <manifest:file-entry manifest:full-path="Pictures/10000201000001310000004F7C741700B166F727.png" manifest:media-type="image/png"/>
  <manifest:file-entry manifest:full-path="Pictures/10000000000000F00000006269D0CB12B8357B98.jpg" manifest:media-type="image/jpeg"/>
  <manifest:file-entry manifest:full-path="Pictures/1000000000000098000000B2F97B4E3BDD72ACD2.jpg" manifest:media-type="image/jpeg"/>
  <manifest:file-entry manifest:full-path="Pictures/10000201000000D1000000AEDDFA55BDDB6E8B26.png" manifest:media-type="image/png"/>
  <manifest:file-entry manifest:full-path="Pictures/100002010000009E000000B8AE73A3A5B1086D3C.png" manifest:media-type="image/png"/>
  <manifest:file-entry manifest:full-path="Pictures/100002010000013B0000013EFE270E311AA978DC.png" manifest:media-type="image/png"/>
  <manifest:file-entry manifest:full-path="Pictures/10000000000000D8000000D976C3659AACAF9252.jpg" manifest:media-type="image/jpeg"/>
  <manifest:file-entry manifest:full-path="Pictures/10000000000001C8000001545DF1F06C2E52378A.png" manifest:media-type="image/png"/>
  <manifest:file-entry manifest:full-path="Pictures/10000201000005CF000001780A87C1AEE1834C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Tabela1" style:family="table">
      <style:table-properties style:width="16.642cm" fo:margin-left="0.219cm" fo:margin-top="0cm" fo:margin-bottom="0cm" table:align="left" style:writing-mode="lr-tb"/>
    </style:style>
    <style:style style:name="Tabela1.A" style:family="table-column">
      <style:table-column-properties style:column-width="4.2cm"/>
    </style:style>
    <style:style style:name="Tabela1.B" style:family="table-column">
      <style:table-column-properties style:column-width="4.117cm"/>
    </style:style>
    <style:style style:name="Tabela1.C" style:family="table-column">
      <style:table-column-properties style:column-width="4.122cm"/>
    </style:style>
    <style:style style:name="Tabela1.D" style:family="table-column">
      <style:table-column-properties style:column-width="4.203cm"/>
    </style:style>
    <style:style style:name="Tabela1.1" style:family="table-row">
      <style:table-row-properties style:min-row-height="1.455cm" fo:keep-together="auto"/>
    </style:style>
    <style:style style:name="Tabela1.A1" style:family="table-cell">
      <style:table-cell-properties fo:padding="0cm" fo:border="none" style:writing-mode="lr-tb"/>
    </style:style>
    <style:style style:name="Tabela2" style:family="table">
      <style:table-properties style:width="16.138cm" fo:margin-left="0.736cm" fo:margin-top="0cm" fo:margin-bottom="0cm" table:align="left" style:writing-mode="lr-tb"/>
    </style:style>
    <style:style style:name="Tabela2.A" style:family="table-column">
      <style:table-column-properties style:column-width="4.941cm"/>
    </style:style>
    <style:style style:name="Tabela2.B" style:family="table-column">
      <style:table-column-properties style:column-width="5.431cm"/>
    </style:style>
    <style:style style:name="Tabela2.C" style:family="table-column">
      <style:table-column-properties style:column-width="5.766cm"/>
    </style:style>
    <style:style style:name="Tabela2.1" style:family="table-row">
      <style:table-row-properties style:min-row-height="1.976cm" fo:keep-together="auto"/>
    </style:style>
    <style:style style:name="Tabela2.A1" style:family="table-cell">
      <style:table-cell-properties fo:padding="0cm" fo:border="none" style:writing-mode="lr-tb"/>
    </style:style>
    <style:style style:name="P1" style:family="paragraph" style:parent-style-name="Text_20_body">
      <style:text-properties fo:font-size="10pt" style:font-size-asian="10pt"/>
    </style:style>
    <style:style style:name="P2" style:family="paragraph" style:parent-style-name="Text_20_body">
      <style:paragraph-properties fo:line-height="5%"/>
      <style:text-properties fo:font-size="10pt" style:font-size-asian="10pt"/>
    </style:style>
    <style:style style:name="P3" style:family="paragraph" style:parent-style-name="Text_20_body">
      <style:text-properties fo:font-size="10pt" fo:font-weight="bold" style:font-size-asian="10pt" style:font-weight-asian="bold"/>
    </style:style>
    <style:style style:name="P4" style:family="paragraph" style:parent-style-name="Text_20_body">
      <style:text-properties fo:font-size="10pt" fo:font-style="italic" style:font-size-asian="10pt" style:font-style-asian="italic"/>
    </style:style>
    <style:style style:name="P5" style:family="paragraph" style:parent-style-name="Text_20_body">
      <style:paragraph-properties fo:line-height="5%"/>
      <style:text-properties fo:font-size="1pt" style:font-size-asian="1pt"/>
    </style:style>
    <style:style style:name="P6" style:family="paragraph" style:parent-style-name="Text_20_body">
      <style:text-properties fo:font-size="16pt" style:font-size-asian="16pt"/>
    </style:style>
    <style:style style:name="P7" style:family="paragraph" style:parent-style-name="Text_20_body">
      <style:text-properties fo:font-size="16pt" fo:font-weight="bold" style:font-size-asian="16pt" style:font-weight-asian="bold"/>
    </style:style>
    <style:style style:name="P8" style:family="paragraph" style:parent-style-name="Text_20_body">
      <style:text-properties fo:font-size="28pt" fo:font-weight="bold" style:font-size-asian="28pt" style:font-weight-asian="bold"/>
    </style:style>
    <style:style style:name="P9" style:family="paragraph" style:parent-style-name="Text_20_body">
      <style:text-properties fo:font-size="22pt" fo:font-weight="bold" style:font-size-asian="22pt" style:font-weight-asian="bold"/>
    </style:style>
    <style:style style:name="P10" style:family="paragraph" style:parent-style-name="Text_20_body">
      <style:text-properties fo:font-weight="bold" style:font-weight-asian="bold"/>
    </style:style>
    <style:style style:name="P11" style:family="paragraph" style:parent-style-name="Text_20_body">
      <style:text-properties fo:font-size="11.5pt" fo:font-weight="bold" style:font-size-asian="11.5pt" style:font-weight-asian="bold"/>
    </style:style>
    <style:style style:name="P12" style:family="paragraph" style:parent-style-name="Text_20_body">
      <style:text-properties fo:font-size="8pt" style:font-size-asian="8pt"/>
    </style:style>
    <style:style style:name="P13" style:family="paragraph" style:parent-style-name="Text_20_body">
      <style:text-properties fo:font-size="12.5pt" style:font-size-asian="12.5pt"/>
    </style:style>
    <style:style style:name="P14" style:family="paragraph" style:parent-style-name="Text_20_body">
      <style:text-properties fo:font-style="italic" style:font-style-asian="italic"/>
    </style:style>
    <style:style style:name="P15" style:family="paragraph" style:parent-style-name="Frame_20_contents">
      <style:paragraph-properties fo:margin-left="0.106cm" fo:margin-right="0cm" fo:line-height="0.432cm" fo:text-indent="0cm" style:auto-text-indent="false"/>
    </style:style>
    <style:style style:name="P16" style:family="paragraph" style:parent-style-name="Heading_20_2">
      <style:paragraph-properties fo:margin-left="0.914cm" fo:margin-right="0cm" fo:margin-top="0cm" fo:margin-bottom="0cm" style:contextual-spacing="false" fo:text-indent="0cm" style:auto-text-indent="false">
        <style:tab-stops>
          <style:tab-stop style:position="14.019cm"/>
        </style:tab-stops>
      </style:paragraph-properties>
    </style:style>
    <style:style style:name="P17" style:family="paragraph" style:parent-style-name="Text_20_body">
      <style:paragraph-properties fo:margin-left="1.528cm" fo:margin-right="0.721cm" fo:margin-top="0.002cm" fo:margin-bottom="0cm" style:contextual-spacing="false" fo:text-align="justify" style:justify-single-word="false" fo:text-indent="0cm" style:auto-text-indent="false"/>
    </style:style>
    <style:style style:name="P18" style:family="paragraph" style:parent-style-name="Text_20_body">
      <style:paragraph-properties fo:margin-left="1.528cm" fo:margin-right="0.721cm" fo:text-align="justify" style:justify-single-word="false" fo:text-indent="0cm" style:auto-text-indent="false"/>
    </style:style>
    <style:style style:name="P19" style:family="paragraph" style:parent-style-name="Text_20_body">
      <style:paragraph-properties fo:margin-left="1.528cm" fo:margin-right="0.727cm" fo:margin-top="0.002cm" fo:margin-bottom="0cm" style:contextual-spacing="false" fo:text-align="justify" style:justify-single-word="false" fo:text-indent="0cm" style:auto-text-indent="false"/>
    </style:style>
    <style:style style:name="P20" style:family="paragraph" style:parent-style-name="Text_20_body">
      <style:paragraph-properties fo:margin-left="1.528cm" fo:margin-right="0.727cm" fo:text-align="justify" style:justify-single-word="false" fo:text-indent="0cm" style:auto-text-indent="false"/>
    </style:style>
    <style:style style:name="P21" style:family="paragraph" style:parent-style-name="Standard">
      <style:paragraph-properties fo:margin-left="1.528cm" fo:margin-right="0.728cm" fo:margin-top="0.002cm" fo:margin-bottom="0cm" style:contextual-spacing="false" fo:line-height="100%" fo:text-align="justify" style:justify-single-word="false" fo:text-indent="0cm" style:auto-text-indent="false"/>
    </style:style>
    <style:style style:name="P22" style:family="paragraph" style:parent-style-name="Text_20_body">
      <style:paragraph-properties fo:margin-left="1.528cm" fo:margin-right="0.728cm" fo:margin-top="0.002cm" fo:margin-bottom="0cm" style:contextual-spacing="false" fo:text-align="justify" style:justify-single-word="false" fo:text-indent="0cm" style:auto-text-indent="false"/>
    </style:style>
    <style:style style:name="P23" style:family="paragraph" style:parent-style-name="Standard">
      <style:paragraph-properties fo:margin-left="1.528cm" fo:margin-right="0.728cm" fo:text-align="justify" style:justify-single-word="false" fo:text-indent="0cm" style:auto-text-indent="false"/>
    </style:style>
    <style:style style:name="P24" style:family="paragraph" style:parent-style-name="Text_20_body">
      <style:paragraph-properties fo:margin-left="1.528cm" fo:margin-right="0.728cm" fo:text-align="justify" style:justify-single-word="false" fo:text-indent="0cm" style:auto-text-indent="false"/>
    </style:style>
    <style:style style:name="P25" style:family="paragraph" style:parent-style-name="Text_20_body">
      <style:paragraph-properties fo:margin-left="1.528cm" fo:margin-right="0.723cm" fo:text-align="justify" style:justify-single-word="false" fo:text-indent="0cm" style:auto-text-indent="false"/>
    </style:style>
    <style:style style:name="P26" style:family="paragraph" style:parent-style-name="Text_20_body">
      <style:paragraph-properties fo:margin-left="1.528cm" fo:margin-right="0.725cm" fo:margin-top="0.002cm" fo:margin-bottom="0cm" style:contextual-spacing="false" fo:text-align="justify" style:justify-single-word="false" fo:text-indent="0cm" style:auto-text-indent="false"/>
    </style:style>
    <style:style style:name="P27" style:family="paragraph" style:parent-style-name="Text_20_body">
      <style:paragraph-properties fo:margin-left="1.528cm" fo:margin-right="0.725cm" fo:text-align="justify" style:justify-single-word="false" fo:text-indent="0cm" style:auto-text-indent="false"/>
    </style:style>
    <style:style style:name="P28" style:family="paragraph" style:parent-style-name="Text_20_body">
      <style:paragraph-properties fo:margin-left="1.528cm" fo:margin-right="0.72cm" fo:text-align="justify" style:justify-single-word="false" fo:text-indent="0cm" style:auto-text-indent="false"/>
    </style:style>
    <style:style style:name="P29" style:family="paragraph" style:parent-style-name="Contents_20_1">
      <style:paragraph-properties>
        <style:tab-stops>
          <style:tab-stop style:position="14.27cm" style:type="right"/>
        </style:tab-stops>
      </style:paragraph-properties>
    </style:style>
    <style:style style:name="P30" style:family="paragraph" style:parent-style-name="Contents_20_1">
      <style:paragraph-properties>
        <style:tab-stops>
          <style:tab-stop style:position="14.27cm" style:type="right" style:leader-style="dotted" style:leader-text="."/>
        </style:tab-stops>
      </style:paragraph-properties>
    </style:style>
    <style:style style:name="P31" style:family="paragraph" style:parent-style-name="Contents_20_1">
      <style:paragraph-properties fo:margin-top="0.28cm" fo:margin-bottom="0cm" style:contextual-spacing="false">
        <style:tab-stops>
          <style:tab-stop style:position="14.27cm" style:type="right"/>
        </style:tab-stops>
      </style:paragraph-properties>
    </style:style>
    <style:style style:name="P32" style:family="paragraph" style:parent-style-name="Contents_20_1">
      <style:paragraph-properties fo:margin-top="0.277cm" fo:margin-bottom="0cm" style:contextual-spacing="false">
        <style:tab-stops>
          <style:tab-stop style:position="14.27cm" style:type="right"/>
        </style:tab-stops>
      </style:paragraph-properties>
    </style:style>
    <style:style style:name="P33" style:family="paragraph" style:parent-style-name="Heading_20_1">
      <style:paragraph-properties fo:margin-left="1.632cm" fo:margin-right="2.092cm" fo:margin-top="0.062cm" fo:margin-bottom="0cm" style:contextual-spacing="false" fo:text-indent="0cm" style:auto-text-indent="false"/>
    </style:style>
    <style:style style:name="P34" style:family="paragraph" style:parent-style-name="Heading_20_3">
      <style:paragraph-properties fo:margin-left="1.632cm" fo:margin-right="2.083cm" fo:text-align="center" style:justify-single-word="false" fo:text-indent="0cm" style:auto-text-indent="false"/>
    </style:style>
    <style:style style:name="P35" style:family="paragraph" style:parent-style-name="Text_20_body">
      <style:paragraph-properties fo:margin-left="1.632cm" fo:margin-right="2.074cm" fo:text-align="center" style:justify-single-word="false" fo:text-indent="0cm" style:auto-text-indent="false"/>
    </style:style>
    <style:style style:name="P36" style:family="paragraph" style:parent-style-name="Standard">
      <style:paragraph-properties fo:margin-left="0.279cm" fo:margin-right="0.725cm" fo:margin-top="0.323cm" fo:margin-bottom="0cm" style:contextual-spacing="false" fo:line-height="108%" fo:text-align="justify" style:justify-single-word="false" fo:text-indent="1.247cm" style:auto-text-indent="false"/>
    </style:style>
    <style:style style:name="P37" style:family="paragraph" style:parent-style-name="Text_20_body">
      <style:paragraph-properties fo:margin-left="0.279cm" fo:margin-right="0.725cm" fo:text-align="justify" style:justify-single-word="false" fo:text-indent="1.247cm" style:auto-text-indent="false"/>
    </style:style>
    <style:style style:name="P38" style:family="paragraph" style:parent-style-name="Standard">
      <style:paragraph-properties fo:margin-left="10.446cm" fo:margin-right="0cm" fo:margin-top="0.286cm" fo:margin-bottom="0cm" style:contextual-spacing="false" fo:text-indent="0cm" style:auto-text-indent="false"/>
    </style:style>
    <style:style style:name="P39" style:family="paragraph" style:parent-style-name="Standard">
      <style:paragraph-properties fo:margin-left="0.279cm" fo:margin-right="0.727cm" fo:margin-top="0.328cm" fo:margin-bottom="0cm" style:contextual-spacing="false" fo:line-height="108%" fo:text-align="justify" style:justify-single-word="false" fo:text-indent="1.247cm" style:auto-text-indent="false"/>
    </style:style>
    <style:style style:name="P40" style:family="paragraph" style:parent-style-name="Standard">
      <style:paragraph-properties fo:margin-left="0.279cm" fo:margin-right="0.727cm" fo:margin-top="0.422cm" fo:margin-bottom="0cm" style:contextual-spacing="false" fo:line-height="108%" fo:text-align="justify" style:justify-single-word="false" fo:text-indent="1.247cm" style:auto-text-indent="false"/>
    </style:style>
    <style:style style:name="P41" style:family="paragraph" style:parent-style-name="Text_20_body">
      <style:paragraph-properties fo:margin-left="0.279cm" fo:margin-right="0.727cm" fo:text-align="justify" style:justify-single-word="false" fo:text-indent="1.247cm" style:auto-text-indent="false"/>
    </style:style>
    <style:style style:name="P42" style:family="paragraph" style:parent-style-name="Standard">
      <style:paragraph-properties fo:margin-left="0.279cm" fo:margin-right="0.723cm" fo:margin-top="0.002cm" fo:margin-bottom="0cm" style:contextual-spacing="false" fo:line-height="108%" fo:text-align="justify" style:justify-single-word="false" fo:text-indent="1.247cm" style:auto-text-indent="false"/>
    </style:style>
    <style:style style:name="P43" style:family="paragraph" style:parent-style-name="Standard">
      <style:paragraph-properties fo:margin-left="0.279cm" fo:margin-right="0.725cm" fo:margin-top="0.002cm" fo:margin-bottom="0cm" style:contextual-spacing="false" fo:text-align="justify" style:justify-single-word="false" fo:text-indent="1.6cm" style:auto-text-indent="false"/>
    </style:style>
    <style:style style:name="P44" style:family="paragraph" style:parent-style-name="Standard">
      <style:paragraph-properties fo:margin-left="0.279cm" fo:margin-right="0.72cm" fo:margin-top="0.002cm" fo:margin-bottom="0cm" style:contextual-spacing="false" fo:line-height="108%" fo:text-align="justify" style:justify-single-word="false" fo:text-indent="1.247cm" style:auto-text-indent="false"/>
    </style:style>
    <style:style style:name="P45" style:family="paragraph" style:parent-style-name="Text_20_body">
      <style:paragraph-properties fo:margin-left="0.279cm" fo:margin-right="0.72cm" fo:margin-top="0.002cm" fo:margin-bottom="0cm" style:contextual-spacing="false" fo:text-align="justify" style:justify-single-word="false" fo:text-indent="1.247cm" style:auto-text-indent="false"/>
    </style:style>
    <style:style style:name="P46" style:family="paragraph" style:parent-style-name="Standard">
      <style:paragraph-properties fo:margin-left="0.279cm" fo:margin-right="0.723cm" fo:margin-top="0.427cm" fo:margin-bottom="0cm" style:contextual-spacing="false" fo:text-align="justify" style:justify-single-word="false" fo:text-indent="1.501cm" style:auto-text-indent="false"/>
    </style:style>
    <style:style style:name="P47" style:family="paragraph" style:parent-style-name="Text_20_body">
      <style:paragraph-properties fo:margin-left="0.279cm" fo:margin-right="0.723cm" fo:text-align="justify" style:justify-single-word="false" fo:text-indent="1.501cm" style:auto-text-indent="false"/>
    </style:style>
    <style:style style:name="P48" style:family="paragraph" style:parent-style-name="Text_20_body">
      <style:paragraph-properties fo:margin-left="0.279cm" fo:margin-right="0.723cm" fo:margin-top="0.199cm" fo:margin-bottom="0cm" style:contextual-spacing="false" fo:text-align="justify" style:justify-single-word="false" fo:text-indent="1.501cm" style:auto-text-indent="false"/>
    </style:style>
    <style:style style:name="P49" style:family="paragraph" style:parent-style-name="Text_20_body">
      <style:paragraph-properties fo:margin-left="1.528cm" fo:margin-right="0cm" fo:margin-top="0.002cm" fo:margin-bottom="0cm" style:contextual-spacing="false" fo:text-indent="0cm" style:auto-text-indent="false"/>
    </style:style>
    <style:style style:name="P50" style:family="paragraph" style:parent-style-name="Standard">
      <style:paragraph-properties fo:margin-left="1.528cm" fo:margin-right="0cm" fo:line-height="100%" fo:text-indent="0cm" style:auto-text-indent="false"/>
    </style:style>
    <style:style style:name="P51" style:family="paragraph" style:parent-style-name="Text_20_body">
      <style:paragraph-properties fo:margin-left="1.528cm" fo:margin-right="0cm" fo:text-indent="0cm" style:auto-text-indent="false"/>
    </style:style>
    <style:style style:name="P52" style:family="paragraph" style:parent-style-name="Text_20_body">
      <style:paragraph-properties fo:margin-left="1.528cm" fo:margin-right="0cm" fo:text-align="justify" style:justify-single-word="false" fo:text-indent="0cm" style:auto-text-indent="false"/>
    </style:style>
    <style:style style:name="P53" style:family="paragraph" style:parent-style-name="Text_20_body">
      <style:paragraph-properties fo:margin-left="1.528cm" fo:margin-right="0cm" fo:line-height="108%" fo:text-indent="0cm" style:auto-text-indent="false"/>
    </style:style>
    <style:style style:name="P54" style:family="paragraph" style:parent-style-name="Text_20_body">
      <style:paragraph-properties fo:margin-left="1.528cm" fo:margin-right="0cm" fo:margin-top="0.183cm" fo:margin-bottom="0cm" style:contextual-spacing="false" fo:text-indent="0cm" style:auto-text-indent="false"/>
    </style:style>
    <style:style style:name="P55" style:family="paragraph" style:parent-style-name="Text_20_body">
      <style:paragraph-properties fo:margin-left="1.528cm" fo:margin-right="0cm" fo:margin-top="0.185cm" fo:margin-bottom="0cm" style:contextual-spacing="false" fo:text-indent="0cm" style:auto-text-indent="false"/>
    </style:style>
    <style:style style:name="P56" style:family="paragraph" style:parent-style-name="Text_20_body">
      <style:paragraph-properties fo:margin-left="1.528cm" fo:margin-right="0cm" fo:margin-top="0.326cm" fo:margin-bottom="0cm" style:contextual-spacing="false" fo:text-indent="0cm" style:auto-text-indent="false"/>
    </style:style>
    <style:style style:name="P57" style:family="paragraph" style:parent-style-name="Text_20_body">
      <style:paragraph-properties fo:margin-left="1.528cm" fo:margin-right="0cm" fo:margin-top="0.323cm" fo:margin-bottom="0cm" style:contextual-spacing="false" fo:text-indent="0cm" style:auto-text-indent="false"/>
    </style:style>
    <style:style style:name="P58" style:family="paragraph" style:parent-style-name="Text_20_body">
      <style:paragraph-properties fo:margin-left="1.528cm" fo:margin-right="0.732cm" fo:text-align="justify" style:justify-single-word="false" fo:text-indent="0cm" style:auto-text-indent="false"/>
    </style:style>
    <style:style style:name="P59" style:family="paragraph" style:parent-style-name="Text_20_body">
      <style:paragraph-properties fo:margin-left="1.528cm" fo:margin-right="0.732cm" fo:line-height="100%" fo:text-align="justify" style:justify-single-word="false" fo:text-indent="0cm" style:auto-text-indent="false"/>
    </style:style>
    <style:style style:name="P60" style:family="paragraph" style:parent-style-name="Table_20_Paragraph">
      <style:paragraph-properties fo:margin-left="0.353cm" fo:margin-right="0cm" fo:margin-top="0cm" fo:margin-bottom="0cm" style:contextual-spacing="false" fo:text-align="start" style:justify-single-word="false"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61" style:family="paragraph" style:parent-style-name="Table_20_Paragraph">
      <style:paragraph-properties fo:margin-left="0.547cm" fo:margin-right="0cm" fo:margin-top="0cm" fo:margin-bottom="0cm" style:contextual-spacing="false" fo:line-height="100%" fo:text-align="start" style:justify-single-word="false"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62" style:family="paragraph" style:parent-style-name="Table_20_Paragraph">
      <style:paragraph-properties fo:margin-left="0.236cm" fo:margin-right="0.236cm" fo:margin-top="0cm" fo:margin-bottom="0cm" style:contextual-spacing="false"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63" style:family="paragraph" style:parent-style-name="Table_20_Paragraph">
      <style:paragraph-properties fo:margin-left="0.236cm" fo:margin-right="0.233cm" fo:margin-top="0cm" fo:margin-bottom="0cm" style:contextual-spacing="false" style:line-height-at-least="0.512cm"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64" style:family="paragraph" style:parent-style-name="Table_20_Paragraph">
      <style:paragraph-properties fo:margin-left="0.238cm" fo:margin-right="0.231cm" fo:margin-top="0cm" fo:margin-bottom="0cm" style:contextual-spacing="false"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65" style:family="paragraph" style:parent-style-name="Table_20_Paragraph">
      <style:paragraph-properties fo:margin-left="0.721cm" fo:margin-right="0.706cm" fo:margin-top="0cm" fo:margin-bottom="0cm" style:contextual-spacing="false" style:line-height-at-least="0.512cm" fo:orphans="0" fo:widows="0" fo:text-indent="-0.005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66" style:family="paragraph" style:parent-style-name="Table_20_Paragraph">
      <style:paragraph-properties fo:margin-left="0.238cm" fo:margin-right="0.312cm" fo:margin-top="0cm" fo:margin-bottom="0cm" style:contextual-spacing="false"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67" style:family="paragraph" style:parent-style-name="Table_20_Paragraph">
      <style:paragraph-properties fo:margin-left="0.238cm" fo:margin-right="0.309cm" fo:margin-top="0cm" fo:margin-bottom="0cm" style:contextual-spacing="false" fo:line-height="100%"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68" style:family="paragraph" style:parent-style-name="Table_20_Paragraph">
      <style:paragraph-properties fo:margin-left="0.351cm" fo:margin-right="0.686cm" fo:margin-top="0cm" fo:margin-bottom="0cm" style:contextual-spacing="false"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69" style:family="paragraph" style:parent-style-name="Table_20_Paragraph">
      <style:paragraph-properties fo:margin-left="0.351cm" fo:margin-right="0.691cm" fo:margin-top="0cm" fo:margin-bottom="0cm" style:contextual-spacing="false" fo:line-height="100%"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70" style:family="paragraph" style:parent-style-name="Table_20_Paragraph">
      <style:paragraph-properties fo:margin-left="0.351cm" fo:margin-right="0.693cm" fo:margin-top="0.004cm" fo:margin-bottom="0cm" style:contextual-spacing="false" style:line-height-at-least="0.512cm"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71" style:family="paragraph" style:parent-style-name="Table_20_Paragraph">
      <style:paragraph-properties fo:margin-left="0.66cm" fo:margin-right="0.383cm" fo:margin-top="0cm" fo:margin-bottom="0cm" style:contextual-spacing="false"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72" style:family="paragraph" style:parent-style-name="Table_20_Paragraph">
      <style:paragraph-properties fo:margin-left="0.654cm" fo:margin-right="0.383cm" fo:margin-top="0cm" fo:margin-bottom="0cm" style:contextual-spacing="false" fo:line-height="100%"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73" style:family="paragraph" style:parent-style-name="Table_20_Paragraph">
      <style:paragraph-properties fo:margin-left="0.377cm" fo:margin-right="0.318cm" fo:margin-top="0cm" fo:margin-bottom="0cm" style:contextual-spacing="false"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74" style:family="paragraph" style:parent-style-name="Table_20_Paragraph">
      <style:paragraph-properties fo:margin-left="0.377cm" fo:margin-right="0.307cm" fo:margin-top="0cm" fo:margin-bottom="0cm" style:contextual-spacing="false" fo:line-height="100%" fo:orphans="0" fo:widows="0" fo:text-indent="0cm" style:auto-text-indent="false"/>
      <style:text-properties fo:font-size="12pt" fo:font-weight="bold" style:letter-kerning="false" style:font-size-asian="12pt" style:language-asian="en" style:country-asian="US" style:font-weight-asian="bold" style:font-size-complex="11pt" style:language-complex="ar" style:country-complex="SA"/>
    </style:style>
    <style:style style:name="P75" style:family="paragraph" style:parent-style-name="Text_20_body">
      <style:paragraph-properties fo:margin-top="0.016cm" fo:margin-bottom="0cm" style:contextual-spacing="false"/>
      <style:text-properties style:font-name="Times New Roman" fo:font-size="8pt" style:font-size-asian="8pt"/>
    </style:style>
    <style:style style:name="P76" style:family="paragraph" style:parent-style-name="Text_20_body">
      <style:paragraph-properties fo:margin-top="0.016cm" fo:margin-bottom="0cm" style:contextual-spacing="false"/>
      <style:text-properties fo:font-size="9.5pt" style:font-size-asian="9.5pt"/>
    </style:style>
    <style:style style:name="P77" style:family="paragraph" style:parent-style-name="Text_20_body">
      <style:paragraph-properties fo:margin-top="0.016cm" fo:margin-bottom="0cm" style:contextual-spacing="false"/>
      <style:text-properties fo:font-size="9.5pt" fo:font-weight="bold" style:font-size-asian="9.5pt" style:font-weight-asian="bold"/>
    </style:style>
    <style:style style:name="P78" style:family="paragraph" style:parent-style-name="Text_20_body">
      <style:paragraph-properties fo:margin-top="0.016cm" fo:margin-bottom="0cm" style:contextual-spacing="false"/>
      <style:text-properties fo:font-size="9.5pt" fo:font-style="italic" style:font-size-asian="9.5pt" style:font-style-asian="italic"/>
    </style:style>
    <style:style style:name="P79" style:family="paragraph" style:parent-style-name="Text_20_body">
      <style:paragraph-properties fo:margin-top="0.016cm" fo:margin-bottom="0cm" style:contextual-spacing="false"/>
      <style:text-properties fo:font-size="7pt" style:font-size-asian="7pt"/>
    </style:style>
    <style:style style:name="P80" style:family="paragraph" style:parent-style-name="Text_20_body">
      <style:paragraph-properties fo:margin-top="0.016cm" fo:margin-bottom="0cm" style:contextual-spacing="false"/>
      <style:text-properties fo:font-size="10.5pt" fo:font-weight="bold" style:font-size-asian="10.5pt" style:font-weight-asian="bold"/>
    </style:style>
    <style:style style:name="P81" style:family="paragraph" style:parent-style-name="Text_20_body">
      <style:paragraph-properties fo:margin-top="0.019cm" fo:margin-bottom="0cm" style:contextual-spacing="false"/>
      <style:text-properties fo:font-size="14.5pt" style:font-size-asian="14.5pt"/>
    </style:style>
    <style:style style:name="P82" style:family="paragraph" style:parent-style-name="Text_20_body">
      <style:paragraph-properties fo:margin-top="0.019cm" fo:margin-bottom="0cm" style:contextual-spacing="false"/>
      <style:text-properties fo:font-size="19pt" fo:font-weight="bold" style:font-size-asian="19pt" style:font-weight-asian="bold"/>
    </style:style>
    <style:style style:name="P83" style:family="paragraph" style:parent-style-name="Text_20_body">
      <style:paragraph-properties fo:margin-top="0.019cm" fo:margin-bottom="0cm" style:contextual-spacing="false"/>
      <style:text-properties fo:font-size="5.5pt" fo:font-weight="bold" style:font-size-asian="5.5pt" style:font-weight-asian="bold"/>
    </style:style>
    <style:style style:name="P84" style:family="paragraph" style:parent-style-name="Text_20_body">
      <style:paragraph-properties fo:margin-top="0.019cm" fo:margin-bottom="0cm" style:contextual-spacing="false"/>
      <style:text-properties fo:font-size="11.5pt" style:font-size-asian="11.5pt"/>
    </style:style>
    <style:style style:name="P85" style:family="paragraph" style:parent-style-name="Text_20_body">
      <style:paragraph-properties fo:margin-top="0.019cm" fo:margin-bottom="0cm" style:contextual-spacing="false"/>
      <style:text-properties fo:font-size="5pt" style:font-size-asian="5pt"/>
    </style:style>
    <style:style style:name="P86" style:family="paragraph" style:parent-style-name="Text_20_body">
      <style:paragraph-properties fo:margin-top="0.019cm" fo:margin-bottom="0cm" style:contextual-spacing="false"/>
      <style:text-properties fo:font-size="9.5pt" style:font-size-asian="9.5pt"/>
    </style:style>
    <style:style style:name="P87" style:family="paragraph" style:parent-style-name="Text_20_body">
      <style:paragraph-properties fo:margin-top="0.019cm" fo:margin-bottom="0cm" style:contextual-spacing="false"/>
      <style:text-properties fo:font-size="8.5pt" style:font-size-asian="8.5pt"/>
    </style:style>
    <style:style style:name="P88" style:family="paragraph" style:parent-style-name="Text_20_body">
      <style:paragraph-properties fo:margin-top="0.007cm" fo:margin-bottom="0cm" style:contextual-spacing="false"/>
      <style:text-properties fo:font-size="26pt" fo:font-weight="bold" style:font-size-asian="26pt" style:font-weight-asian="bold"/>
    </style:style>
    <style:style style:name="P89" style:family="paragraph" style:parent-style-name="Text_20_body">
      <style:paragraph-properties fo:margin-top="0.007cm" fo:margin-bottom="0cm" style:contextual-spacing="false"/>
      <style:text-properties fo:font-size="9.5pt" style:font-size-asian="9.5pt"/>
    </style:style>
    <style:style style:name="P90" style:family="paragraph" style:parent-style-name="Text_20_body">
      <style:paragraph-properties fo:margin-top="0.007cm" fo:margin-bottom="0cm" style:contextual-spacing="false"/>
      <style:text-properties fo:font-size="9.5pt" fo:font-style="italic" style:font-size-asian="9.5pt" style:font-style-asian="italic"/>
    </style:style>
    <style:style style:name="P91" style:family="paragraph" style:parent-style-name="Text_20_body">
      <style:paragraph-properties fo:margin-top="0.007cm" fo:margin-bottom="0cm" style:contextual-spacing="false"/>
      <style:text-properties fo:font-size="11.5pt" style:font-size-asian="11.5pt"/>
    </style:style>
    <style:style style:name="P92" style:family="paragraph" style:parent-style-name="Text_20_body">
      <style:paragraph-properties fo:margin-top="0.014cm" fo:margin-bottom="0cm" style:contextual-spacing="false"/>
      <style:text-properties fo:font-weight="bold" style:font-weight-asian="bold"/>
    </style:style>
    <style:style style:name="P93" style:family="paragraph" style:parent-style-name="Text_20_body">
      <style:paragraph-properties fo:margin-top="0.014cm" fo:margin-bottom="0cm" style:contextual-spacing="false"/>
      <style:text-properties fo:font-size="11.5pt" fo:font-weight="bold" style:font-size-asian="11.5pt" style:font-weight-asian="bold"/>
    </style:style>
    <style:style style:name="P94" style:family="paragraph" style:parent-style-name="Text_20_body">
      <style:paragraph-properties fo:margin-top="0.014cm" fo:margin-bottom="0cm" style:contextual-spacing="false"/>
      <style:text-properties fo:font-size="11.5pt" style:font-size-asian="11.5pt"/>
    </style:style>
    <style:style style:name="P95" style:family="paragraph" style:parent-style-name="Text_20_body">
      <style:paragraph-properties fo:margin-top="0.014cm" fo:margin-bottom="0cm" style:contextual-spacing="false"/>
      <style:text-properties fo:font-size="4pt" style:font-size-asian="4pt"/>
    </style:style>
    <style:style style:name="P96" style:family="paragraph" style:parent-style-name="Text_20_body">
      <style:paragraph-properties fo:margin-top="0.014cm" fo:margin-bottom="0cm" style:contextual-spacing="false"/>
      <style:text-properties fo:font-size="9pt" style:font-size-asian="9pt"/>
    </style:style>
    <style:style style:name="P97" style:family="paragraph" style:parent-style-name="Text_20_body">
      <style:paragraph-properties fo:margin-top="0.014cm" fo:margin-bottom="0cm" style:contextual-spacing="false"/>
      <style:text-properties fo:font-size="9.5pt" style:font-size-asian="9.5pt"/>
    </style:style>
    <style:style style:name="P98" style:family="paragraph" style:parent-style-name="Text_20_body">
      <style:paragraph-properties fo:margin-top="0.014cm" fo:margin-bottom="0cm" style:contextual-spacing="false"/>
      <style:text-properties fo:font-size="9.5pt" fo:font-weight="bold" style:font-size-asian="9.5pt" style:font-weight-asian="bold"/>
    </style:style>
    <style:style style:name="P99" style:family="paragraph" style:parent-style-name="Text_20_body">
      <style:paragraph-properties fo:margin-top="0.014cm" fo:margin-bottom="0cm" style:contextual-spacing="false"/>
      <style:text-properties fo:font-size="9.5pt" fo:font-style="italic" style:font-size-asian="9.5pt" style:font-style-asian="italic"/>
    </style:style>
    <style:style style:name="P100" style:family="paragraph" style:parent-style-name="Text_20_body">
      <style:paragraph-properties fo:margin-top="0.014cm" fo:margin-bottom="0cm" style:contextual-spacing="false"/>
      <style:text-properties fo:font-size="15.5pt" style:font-size-asian="15.5pt"/>
    </style:style>
    <style:style style:name="P101" style:family="paragraph" style:parent-style-name="Text_20_body">
      <style:paragraph-properties fo:margin-top="0.012cm" fo:margin-bottom="0cm" style:contextual-spacing="false"/>
      <style:text-properties fo:font-size="14pt" fo:font-weight="bold" style:font-size-asian="14pt" style:font-weight-asian="bold"/>
    </style:style>
    <style:style style:name="P102" style:family="paragraph" style:parent-style-name="Text_20_body">
      <style:paragraph-properties fo:margin-top="0.012cm" fo:margin-bottom="0cm" style:contextual-spacing="false"/>
      <style:text-properties fo:font-size="10pt" fo:font-weight="bold" style:font-size-asian="10pt" style:font-weight-asian="bold"/>
    </style:style>
    <style:style style:name="P103" style:family="paragraph" style:parent-style-name="Text_20_body">
      <style:paragraph-properties fo:margin-top="0.012cm" fo:margin-bottom="0cm" style:contextual-spacing="false"/>
      <style:text-properties fo:font-size="9.5pt" style:font-size-asian="9.5pt"/>
    </style:style>
    <style:style style:name="P104" style:family="paragraph" style:parent-style-name="Text_20_body">
      <style:paragraph-properties fo:margin-top="0.012cm" fo:margin-bottom="0cm" style:contextual-spacing="false"/>
      <style:text-properties fo:font-size="9.5pt" fo:font-weight="bold" style:font-size-asian="9.5pt" style:font-weight-asian="bold"/>
    </style:style>
    <style:style style:name="P105" style:family="paragraph" style:parent-style-name="Text_20_body">
      <style:paragraph-properties fo:margin-top="0.012cm" fo:margin-bottom="0cm" style:contextual-spacing="false"/>
      <style:text-properties fo:font-size="9.5pt" fo:font-style="italic" style:font-size-asian="9.5pt" style:font-style-asian="italic"/>
    </style:style>
    <style:style style:name="P106" style:family="paragraph" style:parent-style-name="Text_20_body">
      <style:paragraph-properties fo:margin-top="0.012cm" fo:margin-bottom="0cm" style:contextual-spacing="false"/>
      <style:text-properties fo:font-size="11.5pt" style:font-size-asian="11.5pt"/>
    </style:style>
    <style:style style:name="P107" style:family="paragraph" style:parent-style-name="Text_20_body">
      <style:paragraph-properties fo:margin-top="0.012cm" fo:margin-bottom="0cm" style:contextual-spacing="false"/>
      <style:text-properties fo:font-size="8pt" style:font-size-asian="8pt"/>
    </style:style>
    <style:style style:name="P108" style:family="paragraph" style:parent-style-name="Text_20_body">
      <style:paragraph-properties fo:margin-top="0.012cm" fo:margin-bottom="0cm" style:contextual-spacing="false"/>
      <style:text-properties fo:font-size="10.5pt" fo:font-weight="bold" style:font-size-asian="10.5pt" style:font-weight-asian="bold"/>
    </style:style>
    <style:style style:name="P109" style:family="paragraph" style:parent-style-name="Text_20_body">
      <style:paragraph-properties fo:margin-top="0.005cm" fo:margin-bottom="0cm" style:contextual-spacing="false"/>
      <style:text-properties fo:font-size="12.5pt" fo:font-weight="bold" style:font-size-asian="12.5pt" style:font-weight-asian="bold"/>
    </style:style>
    <style:style style:name="P110" style:family="paragraph" style:parent-style-name="Text_20_body">
      <style:paragraph-properties fo:margin-top="0.005cm" fo:margin-bottom="0cm" style:contextual-spacing="false"/>
      <style:text-properties fo:font-size="19pt" fo:font-weight="bold" style:font-size-asian="19pt" style:font-weight-asian="bold"/>
    </style:style>
    <style:style style:name="P111" style:family="paragraph" style:parent-style-name="Text_20_body">
      <style:paragraph-properties fo:margin-top="0.005cm" fo:margin-bottom="0cm" style:contextual-spacing="false"/>
      <style:text-properties fo:font-size="9.5pt" style:font-size-asian="9.5pt"/>
    </style:style>
    <style:style style:name="P112" style:family="paragraph" style:parent-style-name="Text_20_body">
      <style:paragraph-properties fo:margin-top="0.005cm" fo:margin-bottom="0cm" style:contextual-spacing="false"/>
      <style:text-properties fo:font-size="9pt" style:font-size-asian="9pt"/>
    </style:style>
    <style:style style:name="P113" style:family="paragraph" style:parent-style-name="Text_20_body">
      <style:paragraph-properties fo:margin-top="0.018cm" fo:margin-bottom="0cm" style:contextual-spacing="false"/>
      <style:text-properties fo:font-size="9.5pt" fo:font-weight="bold" style:font-size-asian="9.5pt" style:font-weight-asian="bold"/>
    </style:style>
    <style:style style:name="P114" style:family="paragraph" style:parent-style-name="Text_20_body">
      <style:paragraph-properties fo:margin-top="0.018cm" fo:margin-bottom="0cm" style:contextual-spacing="false"/>
      <style:text-properties fo:font-size="9.5pt" style:font-size-asian="9.5pt"/>
    </style:style>
    <style:style style:name="P115" style:family="paragraph" style:parent-style-name="Text_20_body">
      <style:paragraph-properties fo:margin-top="0.018cm" fo:margin-bottom="0cm" style:contextual-spacing="false"/>
      <style:text-properties fo:font-size="9.5pt" fo:font-style="italic" style:font-size-asian="9.5pt" style:font-style-asian="italic"/>
    </style:style>
    <style:style style:name="P116" style:family="paragraph" style:parent-style-name="Text_20_body">
      <style:paragraph-properties fo:margin-top="0.018cm" fo:margin-bottom="0cm" style:contextual-spacing="false"/>
      <style:text-properties fo:font-size="4.5pt" fo:font-weight="bold" style:font-size-asian="4.5pt" style:font-weight-asian="bold"/>
    </style:style>
    <style:style style:name="P117" style:family="paragraph" style:parent-style-name="Text_20_body">
      <style:paragraph-properties fo:margin-top="0.018cm" fo:margin-bottom="0cm" style:contextual-spacing="false"/>
      <style:text-properties fo:font-size="6pt" style:font-size-asian="6pt"/>
    </style:style>
    <style:style style:name="P118" style:family="paragraph" style:parent-style-name="Text_20_body">
      <style:paragraph-properties fo:margin-top="0.018cm" fo:margin-bottom="0cm" style:contextual-spacing="false"/>
      <style:text-properties fo:font-size="4pt" style:font-size-asian="4pt"/>
    </style:style>
    <style:style style:name="P119" style:family="paragraph" style:parent-style-name="Text_20_body">
      <style:paragraph-properties fo:margin-top="0.018cm" fo:margin-bottom="0cm" style:contextual-spacing="false"/>
      <style:text-properties fo:font-size="11.5pt" style:font-size-asian="11.5pt"/>
    </style:style>
    <style:style style:name="P120" style:family="paragraph" style:parent-style-name="Text_20_body">
      <style:paragraph-properties fo:margin-top="0.018cm" fo:margin-bottom="0cm" style:contextual-spacing="false"/>
      <style:text-properties fo:font-size="10.5pt" fo:font-weight="bold" style:font-size-asian="10.5pt" style:font-weight-asian="bold"/>
    </style:style>
    <style:style style:name="P121" style:family="paragraph" style:parent-style-name="Text_20_body">
      <style:paragraph-properties fo:margin-top="0.018cm" fo:margin-bottom="0cm" style:contextual-spacing="false"/>
      <style:text-properties fo:font-size="10.5pt" fo:font-style="italic" style:font-size-asian="10.5pt" style:font-style-asian="italic"/>
    </style:style>
    <style:style style:name="P122" style:family="paragraph" style:parent-style-name="Text_20_body">
      <style:paragraph-properties fo:margin-top="0.011cm" fo:margin-bottom="0cm" style:contextual-spacing="false"/>
      <style:text-properties fo:font-size="10.5pt" fo:font-weight="bold" style:font-size-asian="10.5pt" style:font-weight-asian="bold"/>
    </style:style>
    <style:style style:name="P123" style:family="paragraph" style:parent-style-name="Text_20_body">
      <style:paragraph-properties fo:margin-top="0.011cm" fo:margin-bottom="0cm" style:contextual-spacing="false"/>
      <style:text-properties fo:font-size="9.5pt" style:font-size-asian="9.5pt"/>
    </style:style>
    <style:style style:name="P124" style:family="paragraph" style:parent-style-name="Text_20_body">
      <style:paragraph-properties fo:margin-top="0.011cm" fo:margin-bottom="0cm" style:contextual-spacing="false"/>
      <style:text-properties fo:font-size="9.5pt" fo:font-style="italic" style:font-size-asian="9.5pt" style:font-style-asian="italic"/>
    </style:style>
    <style:style style:name="P125" style:family="paragraph" style:parent-style-name="Text_20_body">
      <style:paragraph-properties fo:margin-top="0.011cm" fo:margin-bottom="0cm" style:contextual-spacing="false"/>
      <style:text-properties fo:font-size="7pt" style:font-size-asian="7pt"/>
    </style:style>
    <style:style style:name="P126" style:family="paragraph" style:parent-style-name="Text_20_body">
      <style:paragraph-properties fo:margin-top="0.011cm" fo:margin-bottom="0cm" style:contextual-spacing="false"/>
      <style:text-properties fo:font-size="11.5pt" style:font-size-asian="11.5pt"/>
    </style:style>
    <style:style style:name="P127" style:family="paragraph" style:parent-style-name="Text_20_body">
      <style:paragraph-properties fo:margin-left="0.279cm" fo:margin-right="0cm" fo:margin-top="0.328cm" fo:margin-bottom="0cm" style:contextual-spacing="false" fo:text-align="justify" style:justify-single-word="false" fo:text-indent="0cm" style:auto-text-indent="false"/>
    </style:style>
    <style:style style:name="P128" style:family="paragraph" style:parent-style-name="Text_20_body">
      <style:paragraph-properties fo:margin-left="0.279cm" fo:margin-right="0cm" fo:margin-top="0.279cm" fo:margin-bottom="0cm" style:contextual-spacing="false" fo:line-height="108%" fo:text-indent="0cm" style:auto-text-indent="false"/>
    </style:style>
    <style:style style:name="P129" style:family="paragraph" style:parent-style-name="Text_20_body">
      <style:paragraph-properties fo:margin-left="0.279cm" fo:margin-right="0cm" fo:text-indent="0cm" style:auto-text-indent="false"/>
    </style:style>
    <style:style style:name="P130" style:family="paragraph" style:parent-style-name="Text_20_body">
      <style:paragraph-properties fo:margin-left="0.279cm" fo:margin-right="0cm" fo:margin-top="0.28cm" fo:margin-bottom="0cm" style:contextual-spacing="false" fo:line-height="108%" fo:text-indent="0cm" style:auto-text-indent="false"/>
    </style:style>
    <style:style style:name="P131" style:family="paragraph" style:parent-style-name="Text_20_body">
      <style:paragraph-properties fo:margin-left="0.279cm" fo:margin-right="0cm" fo:margin-top="0.282cm" fo:margin-bottom="0cm" style:contextual-spacing="false" fo:line-height="108%" fo:text-indent="0cm" style:auto-text-indent="false"/>
    </style:style>
    <style:style style:name="P132" style:family="paragraph" style:parent-style-name="Text_20_body">
      <style:paragraph-properties fo:margin-left="0.279cm" fo:margin-right="0.721cm" fo:text-align="justify" style:justify-single-word="false" fo:text-indent="1.247cm" style:auto-text-indent="false"/>
    </style:style>
    <style:style style:name="P133" style:family="paragraph" style:parent-style-name="Text_20_body">
      <style:paragraph-properties fo:margin-left="0.279cm" fo:margin-right="0.721cm" fo:line-height="150%" fo:text-align="justify" style:justify-single-word="false" fo:text-indent="1.247cm" style:auto-text-indent="false"/>
    </style:style>
    <style:style style:name="P134" style:family="paragraph" style:parent-style-name="Text_20_body">
      <style:paragraph-properties fo:margin-left="0.279cm" fo:margin-right="0.721cm" fo:margin-top="0.002cm" fo:margin-bottom="0cm" style:contextual-spacing="false" fo:text-align="justify" style:justify-single-word="false" fo:text-indent="1.247cm" style:auto-text-indent="false"/>
    </style:style>
    <style:style style:name="P135" style:family="paragraph" style:parent-style-name="Text_20_body">
      <style:paragraph-properties fo:margin-left="0.279cm" fo:margin-right="0.73cm" fo:text-align="justify" style:justify-single-word="false" fo:text-indent="1.247cm" style:auto-text-indent="false"/>
    </style:style>
    <style:style style:name="P136" style:family="paragraph" style:parent-style-name="Text_20_body">
      <style:paragraph-properties fo:margin-left="0.279cm" fo:margin-right="0.721cm" fo:margin-top="0.002cm" fo:margin-bottom="0cm" style:contextual-spacing="false" fo:text-align="justify" style:justify-single-word="false" fo:text-indent="1.501cm" style:auto-text-indent="false"/>
    </style:style>
    <style:style style:name="P137" style:family="paragraph" style:parent-style-name="Text_20_body">
      <style:paragraph-properties fo:margin-left="0.279cm" fo:margin-right="0.721cm" fo:text-align="justify" style:justify-single-word="false" fo:text-indent="1.501cm" style:auto-text-indent="false"/>
    </style:style>
    <style:style style:name="P138" style:family="paragraph" style:parent-style-name="Text_20_body">
      <style:paragraph-properties fo:margin-top="0.004cm" fo:margin-bottom="0cm" style:contextual-spacing="false"/>
    </style:style>
    <style:style style:name="P139" style:family="paragraph" style:parent-style-name="Text_20_body">
      <style:paragraph-properties fo:margin-top="0.004cm" fo:margin-bottom="0cm" style:contextual-spacing="false"/>
      <style:text-properties fo:font-size="9.5pt" style:font-size-asian="9.5pt"/>
    </style:style>
    <style:style style:name="P140" style:family="paragraph" style:parent-style-name="Text_20_body">
      <style:paragraph-properties fo:margin-top="0.004cm" fo:margin-bottom="0cm" style:contextual-spacing="false"/>
      <style:text-properties fo:font-size="10.5pt" style:font-size-asian="10.5pt"/>
    </style:style>
    <style:style style:name="P141" style:family="paragraph" style:parent-style-name="Text_20_body">
      <style:paragraph-properties fo:margin-top="0.004cm" fo:margin-bottom="0cm" style:contextual-spacing="false"/>
      <style:text-properties fo:font-size="14pt" style:font-size-asian="14pt"/>
    </style:style>
    <style:style style:name="P142" style:family="paragraph" style:parent-style-name="Text_20_body">
      <style:paragraph-properties fo:margin-left="0.279cm" fo:margin-right="0.725cm" fo:margin-top="0.215cm" fo:margin-bottom="0cm" style:contextual-spacing="false" fo:text-align="justify" style:justify-single-word="false" fo:text-indent="1.501cm" style:auto-text-indent="false"/>
    </style:style>
    <style:style style:name="P143" style:family="paragraph" style:parent-style-name="Text_20_body">
      <style:paragraph-properties fo:margin-left="1.549cm" fo:margin-right="0cm" fo:text-indent="0cm" style:auto-text-indent="false"/>
    </style:style>
    <style:style style:name="P144" style:family="paragraph" style:parent-style-name="Text_20_body">
      <style:paragraph-properties fo:margin-left="1.549cm" fo:margin-right="0cm" fo:margin-top="0.002cm" fo:margin-bottom="0cm" style:contextual-spacing="false" fo:text-indent="0cm" style:auto-text-indent="false"/>
    </style:style>
    <style:style style:name="P145" style:family="paragraph" style:parent-style-name="Text_20_body">
      <style:paragraph-properties fo:margin-left="1.549cm" fo:margin-right="0cm" fo:margin-top="0.004cm" fo:margin-bottom="0cm" style:contextual-spacing="false" fo:text-indent="0cm" style:auto-text-indent="false"/>
    </style:style>
    <style:style style:name="P146" style:family="paragraph" style:parent-style-name="Text_20_body">
      <style:paragraph-properties fo:margin-left="0.279cm" fo:margin-right="0.73cm" fo:text-align="justify" style:justify-single-word="false" fo:text-indent="1.501cm" style:auto-text-indent="false"/>
    </style:style>
    <style:style style:name="P147" style:family="paragraph" style:parent-style-name="Text_20_body">
      <style:paragraph-properties fo:margin-left="0.279cm" fo:margin-right="0.728cm" fo:margin-top="0.219cm" fo:margin-bottom="0cm" style:contextual-spacing="false" fo:text-align="justify" style:justify-single-word="false" fo:text-indent="1.501cm" style:auto-text-indent="false"/>
    </style:style>
    <style:style style:name="P148" style:family="paragraph" style:parent-style-name="Text_20_body">
      <style:paragraph-properties fo:margin-left="0.279cm" fo:margin-right="0.728cm" fo:margin-top="0.427cm" fo:margin-bottom="0cm" style:contextual-spacing="false" fo:text-align="justify" style:justify-single-word="false" fo:text-indent="1.501cm" style:auto-text-indent="false"/>
    </style:style>
    <style:style style:name="P149" style:family="paragraph" style:parent-style-name="Text_20_body">
      <style:paragraph-properties fo:margin-top="0.009cm" fo:margin-bottom="0cm" style:contextual-spacing="false"/>
      <style:text-properties fo:font-size="10pt" style:font-size-asian="10pt"/>
    </style:style>
    <style:style style:name="P150" style:family="paragraph" style:parent-style-name="Text_20_body">
      <style:paragraph-properties fo:margin-top="0.009cm" fo:margin-bottom="0cm" style:contextual-spacing="false"/>
      <style:text-properties fo:font-size="9.5pt" style:font-size-asian="9.5pt"/>
    </style:style>
    <style:style style:name="P151" style:family="paragraph" style:parent-style-name="Text_20_body">
      <style:paragraph-properties fo:margin-top="0.009cm" fo:margin-bottom="0cm" style:contextual-spacing="false"/>
      <style:text-properties fo:font-size="9.5pt" fo:font-weight="bold" style:font-size-asian="9.5pt" style:font-weight-asian="bold"/>
    </style:style>
    <style:style style:name="P152" style:family="paragraph" style:parent-style-name="Text_20_body">
      <style:paragraph-properties fo:margin-top="0.009cm" fo:margin-bottom="0cm" style:contextual-spacing="false"/>
      <style:text-properties fo:font-size="9.5pt" fo:font-style="italic" style:font-size-asian="9.5pt" style:font-style-asian="italic"/>
    </style:style>
    <style:style style:name="P153" style:family="paragraph" style:parent-style-name="Text_20_body">
      <style:paragraph-properties fo:margin-left="0.279cm" fo:margin-right="0.732cm" fo:text-align="justify" style:justify-single-word="false" fo:text-indent="1.501cm" style:auto-text-indent="false"/>
    </style:style>
    <style:style style:name="P154" style:family="paragraph" style:parent-style-name="Text_20_body">
      <style:paragraph-properties fo:margin-left="0.279cm" fo:margin-right="0.732cm" fo:margin-top="0.425cm" fo:margin-bottom="0cm" style:contextual-spacing="false" fo:text-align="justify" style:justify-single-word="false" fo:text-indent="1.501cm" style:auto-text-indent="false"/>
    </style:style>
    <style:style style:name="P155" style:family="paragraph" style:parent-style-name="Text_20_body">
      <style:paragraph-properties fo:margin-left="0.279cm" fo:margin-right="0.732cm" fo:margin-top="0.423cm" fo:margin-bottom="0cm" style:contextual-spacing="false" fo:line-height="100%" fo:text-align="justify" style:justify-single-word="false" fo:text-indent="1.501cm" style:auto-text-indent="false"/>
    </style:style>
    <style:style style:name="P156" style:family="paragraph" style:parent-style-name="Text_20_body">
      <style:paragraph-properties fo:margin-left="0.279cm" fo:margin-right="0.727cm" fo:text-align="justify" style:justify-single-word="false" fo:text-indent="1.501cm" style:auto-text-indent="false"/>
    </style:style>
    <style:style style:name="P157" style:family="paragraph" style:parent-style-name="Text_20_body">
      <style:paragraph-properties fo:margin-left="0.279cm" fo:margin-right="0.727cm" fo:margin-top="0.429cm" fo:margin-bottom="0cm" style:contextual-spacing="false" fo:text-align="justify" style:justify-single-word="false" fo:text-indent="1.501cm" style:auto-text-indent="false"/>
    </style:style>
    <style:style style:name="P158" style:family="paragraph" style:parent-style-name="Text_20_body">
      <style:paragraph-properties fo:margin-left="0.914cm" fo:margin-right="0.721cm" fo:margin-top="0.328cm" fo:margin-bottom="0cm" style:contextual-spacing="false" fo:text-align="justify" style:justify-single-word="false" fo:text-indent="0.866cm" style:auto-text-indent="false"/>
    </style:style>
    <style:style style:name="P159" style:family="paragraph" style:parent-style-name="Text_20_body">
      <style:paragraph-properties fo:margin-left="1.549cm" fo:margin-right="0.737cm" fo:margin-top="0.004cm" fo:margin-bottom="0cm" style:contextual-spacing="false" fo:text-align="justify" style:justify-single-word="false" fo:text-indent="0cm" style:auto-text-indent="false"/>
    </style:style>
    <style:style style:name="P160" style:family="paragraph" style:parent-style-name="Text_20_body">
      <style:paragraph-properties fo:margin-left="1.549cm" fo:margin-right="0.737cm" fo:text-align="justify" style:justify-single-word="false" fo:text-indent="0cm" style:auto-text-indent="false"/>
    </style:style>
    <style:style style:name="P161" style:family="paragraph" style:parent-style-name="Text_20_body">
      <style:paragraph-properties fo:margin-left="1.632cm" fo:margin-right="0.813cm" fo:margin-top="0.002cm" fo:margin-bottom="0cm" style:contextual-spacing="false" fo:text-align="center" style:justify-single-word="false" fo:text-indent="0cm" style:auto-text-indent="false"/>
    </style:style>
    <style:style style:name="P162" style:family="paragraph" style:parent-style-name="Text_20_body">
      <style:paragraph-properties fo:margin-left="1.632cm" fo:margin-right="0.813cm" fo:text-align="center" style:justify-single-word="false" fo:text-indent="0cm" style:auto-text-indent="false"/>
    </style:style>
    <style:style style:name="P163" style:family="paragraph" style:parent-style-name="Text_20_body">
      <style:paragraph-properties fo:margin-left="1.549cm" fo:margin-right="6.004cm" fo:text-indent="0cm" style:auto-text-indent="false"/>
    </style:style>
    <style:style style:name="P164" style:family="paragraph" style:parent-style-name="Text_20_body">
      <style:paragraph-properties fo:margin-top="0.002cm" fo:margin-bottom="0cm" style:contextual-spacing="false"/>
    </style:style>
    <style:style style:name="P165" style:family="paragraph" style:parent-style-name="Text_20_body">
      <style:paragraph-properties fo:margin-top="0.002cm" fo:margin-bottom="0cm" style:contextual-spacing="false"/>
      <style:text-properties fo:font-size="10.5pt" style:font-size-asian="10.5pt"/>
    </style:style>
    <style:style style:name="P166" style:family="paragraph" style:parent-style-name="Text_20_body">
      <style:paragraph-properties fo:margin-top="0.002cm" fo:margin-bottom="0cm" style:contextual-spacing="false"/>
      <style:text-properties fo:font-size="5.5pt" style:font-size-asian="5.5pt"/>
    </style:style>
    <style:style style:name="P167" style:family="paragraph" style:parent-style-name="Text_20_body">
      <style:paragraph-properties fo:margin-left="0.279cm" fo:margin-right="0.605cm" fo:margin-top="0.044cm" fo:margin-bottom="0cm" style:contextual-spacing="false" fo:line-height="108%" fo:text-indent="1.247cm" style:auto-text-indent="false"/>
    </style:style>
    <style:style style:name="P168" style:family="paragraph" style:parent-style-name="Text_20_body">
      <style:paragraph-properties fo:margin-left="0.242cm" fo:margin-right="0cm" fo:margin-top="0.321cm" fo:margin-bottom="0cm" style:contextual-spacing="false" fo:text-indent="0cm" style:auto-text-indent="false"/>
    </style:style>
    <style:style style:name="P169" style:family="paragraph" style:parent-style-name="Text_20_body">
      <style:paragraph-properties fo:margin-left="0.242cm" fo:margin-right="0cm" fo:margin-top="0.325cm" fo:margin-bottom="0cm" style:contextual-spacing="false" fo:text-indent="0cm" style:auto-text-indent="false"/>
    </style:style>
    <style:style style:name="P170" style:family="paragraph" style:parent-style-name="Text_20_body">
      <style:paragraph-properties fo:margin-left="1.549cm" fo:margin-right="0.727cm" fo:text-align="justify" style:justify-single-word="false" fo:text-indent="0cm" style:auto-text-indent="false"/>
    </style:style>
    <style:style style:name="P171" style:family="paragraph" style:parent-style-name="Text_20_body">
      <style:paragraph-properties fo:margin-left="1.549cm" fo:margin-right="0.732cm" fo:margin-top="0.002cm" fo:margin-bottom="0cm" style:contextual-spacing="false" fo:text-align="justify" style:justify-single-word="false" fo:text-indent="0cm" style:auto-text-indent="false"/>
    </style:style>
    <style:style style:name="P172" style:family="paragraph" style:parent-style-name="Text_20_body">
      <style:paragraph-properties fo:margin-left="1.549cm" fo:margin-right="0.732cm" fo:text-align="justify" style:justify-single-word="false" fo:text-indent="0cm" style:auto-text-indent="false"/>
    </style:style>
    <style:style style:name="P173" style:family="paragraph" style:parent-style-name="Text_20_body">
      <style:paragraph-properties fo:margin-left="1.549cm" fo:margin-right="0.728cm" fo:text-align="justify" style:justify-single-word="false" fo:text-indent="0cm" style:auto-text-indent="false"/>
    </style:style>
    <style:style style:name="P174" style:family="paragraph" style:parent-style-name="Text_20_body">
      <style:paragraph-properties fo:margin-left="1.549cm" fo:margin-right="0.721cm" fo:margin-top="0.004cm" fo:margin-bottom="0cm" style:contextual-spacing="false" fo:text-align="justify" style:justify-single-word="false" fo:text-indent="0cm" style:auto-text-indent="false"/>
    </style:style>
    <style:style style:name="P175" style:family="paragraph" style:parent-style-name="Text_20_body">
      <style:paragraph-properties fo:margin-left="0.279cm" fo:margin-right="0.723cm" fo:margin-top="0.277cm" fo:margin-bottom="0cm" style:contextual-spacing="false" fo:line-height="108%" fo:text-align="justify" style:justify-single-word="false" fo:text-indent="0cm" style:auto-text-indent="false"/>
    </style:style>
    <style:style style:name="P176" style:family="paragraph" style:parent-style-name="Text_20_body">
      <style:paragraph-properties fo:margin-top="0.021cm" fo:margin-bottom="0cm" style:contextual-spacing="false"/>
      <style:text-properties fo:font-size="11.5pt" style:font-size-asian="11.5pt"/>
    </style:style>
    <style:style style:name="P177" style:family="paragraph" style:parent-style-name="Text_20_body">
      <style:paragraph-properties fo:margin-left="0.279cm" fo:margin-right="0.605cm" fo:margin-top="0.002cm" fo:margin-bottom="0cm" style:contextual-spacing="false" fo:line-height="108%" fo:text-indent="0cm" style:auto-text-indent="false"/>
    </style:style>
    <style:style style:name="P178" style:family="paragraph" style:parent-style-name="Text_20_body">
      <style:paragraph-properties fo:margin-left="0.279cm" fo:margin-right="0.72cm" fo:margin-top="0.333cm" fo:margin-bottom="0cm" style:contextual-spacing="false" fo:text-align="justify" style:justify-single-word="false" fo:text-indent="1.501cm" style:auto-text-indent="false"/>
    </style:style>
    <style:style style:name="P179" style:family="paragraph" style:parent-style-name="Text_20_body">
      <style:paragraph-properties fo:margin-left="0.279cm" fo:margin-right="0.72cm" fo:text-align="justify" style:justify-single-word="false" fo:text-indent="1.501cm" style:auto-text-indent="false"/>
    </style:style>
    <style:style style:name="P180" style:family="paragraph" style:parent-style-name="Text_20_body">
      <style:paragraph-properties fo:margin-left="1.528cm" fo:margin-right="0.612cm" fo:text-indent="0cm" style:auto-text-indent="false"/>
    </style:style>
    <style:style style:name="P181" style:family="paragraph" style:parent-style-name="Text_20_body">
      <style:paragraph-properties fo:margin-left="1.528cm" fo:margin-right="0.564cm" fo:line-height="108%" fo:text-indent="0cm" style:auto-text-indent="false"/>
    </style:style>
    <style:style style:name="P182" style:family="paragraph" style:parent-style-name="Text_20_body">
      <style:paragraph-properties fo:margin-left="1.528cm" fo:margin-right="0.605cm" fo:text-indent="0cm" style:auto-text-indent="false"/>
    </style:style>
    <style:style style:name="P183" style:family="paragraph" style:parent-style-name="Text_20_body">
      <style:paragraph-properties fo:margin-left="1.528cm" fo:margin-right="0.73cm" fo:margin-top="0.002cm" fo:margin-bottom="0cm" style:contextual-spacing="false" fo:text-align="justify" style:justify-single-word="false" fo:text-indent="0cm" style:auto-text-indent="false"/>
    </style:style>
    <style:style style:name="P184" style:family="paragraph" style:parent-style-name="Text_20_body">
      <style:paragraph-properties fo:margin-left="1.528cm" fo:margin-right="0.73cm" fo:text-align="justify" style:justify-single-word="false" fo:text-indent="0cm" style:auto-text-indent="false"/>
    </style:style>
    <style:style style:name="P185" style:family="paragraph" style:parent-style-name="Text_20_body">
      <style:paragraph-properties fo:margin-left="0.279cm" fo:margin-right="0.728cm" fo:margin-top="0.002cm" fo:margin-bottom="0cm" style:contextual-spacing="false" fo:text-align="justify" style:justify-single-word="false" fo:text-indent="1.247cm" style:auto-text-indent="false"/>
    </style:style>
    <style:style style:name="P186" style:family="paragraph" style:parent-style-name="Text_20_body">
      <style:paragraph-properties fo:margin-left="0.279cm" fo:margin-right="0.728cm" fo:text-align="justify" style:justify-single-word="false" fo:text-indent="1.247cm" style:auto-text-indent="false"/>
    </style:style>
    <style:style style:name="P187" style:family="paragraph" style:parent-style-name="Text_20_body">
      <style:paragraph-properties fo:margin-left="0.279cm" fo:margin-right="0cm" fo:text-indent="1.247cm" style:auto-text-indent="false"/>
    </style:style>
    <style:style style:name="P188" style:family="paragraph" style:parent-style-name="Text_20_body">
      <style:paragraph-properties fo:margin-left="0.279cm" fo:margin-right="0cm" fo:line-height="100%" fo:text-indent="1.247cm" style:auto-text-indent="false"/>
    </style:style>
    <style:style style:name="P189" style:family="paragraph" style:parent-style-name="Text_20_body">
      <style:paragraph-properties fo:margin-left="0.279cm" fo:margin-right="0.72cm" fo:text-align="justify" style:justify-single-word="false" fo:text-indent="1.6cm" style:auto-text-indent="false"/>
    </style:style>
    <style:style style:name="P190" style:family="paragraph" style:parent-style-name="Text_20_body">
      <style:paragraph-properties fo:margin-left="1.632cm" fo:margin-right="2.076cm" fo:margin-top="0.314cm" fo:margin-bottom="0cm" style:contextual-spacing="false" fo:line-height="100%" fo:text-align="center" style:justify-single-word="false" fo:text-indent="0cm" style:auto-text-indent="false"/>
    </style:style>
    <style:style style:name="P191" style:family="paragraph" style:parent-style-name="Text_20_body">
      <style:paragraph-properties fo:margin-left="1.632cm" fo:margin-right="2.076cm" fo:text-align="center" style:justify-single-word="false" fo:text-indent="0cm" style:auto-text-indent="false"/>
    </style:style>
    <style:style style:name="P192" style:family="paragraph" style:parent-style-name="Text_20_body">
      <style:paragraph-properties fo:margin-left="1.632cm" fo:margin-right="2.087cm" fo:margin-top="0.131cm" fo:margin-bottom="0cm" style:contextual-spacing="false" fo:text-align="center" style:justify-single-word="false" fo:text-indent="0cm" style:auto-text-indent="false"/>
    </style:style>
    <style:style style:name="P193" style:family="paragraph" style:parent-style-name="Title">
      <style:paragraph-properties fo:line-height="108%"/>
    </style:style>
    <style:style style:name="P194" style:family="paragraph" style:parent-style-name="Standard">
      <style:paragraph-properties fo:margin-left="1.632cm" fo:margin-right="2.085cm" fo:line-height="0.688cm" fo:text-align="center" style:justify-single-word="false" fo:text-indent="0cm" style:auto-text-indent="false"/>
      <style:text-properties fo:font-size="16pt" fo:font-weight="bold" style:font-size-asian="16pt" style:font-weight-asian="bold"/>
    </style:style>
    <style:style style:name="P195" style:family="paragraph" style:parent-style-name="Standard">
      <style:paragraph-properties fo:margin-left="1.632cm" fo:margin-right="2.09cm" fo:line-height="0.688cm" fo:text-align="center" style:justify-single-word="false" fo:text-indent="0cm" style:auto-text-indent="false"/>
      <style:text-properties fo:font-size="16pt" style:font-size-asian="16pt"/>
    </style:style>
    <style:style style:name="P196" style:family="paragraph" style:parent-style-name="Standard">
      <style:paragraph-properties fo:margin-left="1.63cm" fo:margin-right="2.092cm" fo:margin-top="0.002cm" fo:margin-bottom="0cm" style:contextual-spacing="false" fo:text-align="center" style:justify-single-word="false" fo:text-indent="0cm" style:auto-text-indent="false"/>
      <style:text-properties fo:font-size="16pt" style:font-size-asian="16pt"/>
    </style:style>
    <style:style style:name="P197" style:family="paragraph" style:parent-style-name="Standard">
      <style:paragraph-properties fo:margin-left="1.632cm" fo:margin-right="2.081cm" fo:text-align="center" style:justify-single-word="false" fo:text-indent="0cm" style:auto-text-indent="false"/>
      <style:text-properties fo:font-size="22pt" fo:font-weight="bold" style:font-size-asian="22pt" style:font-weight-asian="bold"/>
    </style:style>
    <style:style style:name="P198" style:family="paragraph" style:parent-style-name="Standard">
      <style:paragraph-properties fo:margin-left="1.632cm" fo:margin-right="2.074cm" fo:margin-top="0.258cm" fo:margin-bottom="0cm" style:contextual-spacing="false" fo:text-align="center" style:justify-single-word="false" fo:text-indent="0cm" style:auto-text-indent="false"/>
      <style:text-properties fo:font-size="12pt" fo:font-weight="bold" style:font-size-asian="12pt" style:font-weight-asian="bold"/>
    </style:style>
    <style:style style:name="P199" style:family="paragraph" style:parent-style-name="Standard">
      <style:paragraph-properties fo:margin-left="1.632cm" fo:margin-right="2.083cm" fo:text-align="center" style:justify-single-word="false" fo:text-indent="0cm" style:auto-text-indent="false"/>
      <style:text-properties fo:font-size="12pt" fo:font-weight="bold" style:font-size-asian="12pt" style:font-weight-asian="bold"/>
    </style:style>
    <style:style style:name="P200" style:family="paragraph" style:parent-style-name="Standard">
      <style:paragraph-properties fo:margin-left="8.856cm" fo:margin-right="0cm" fo:margin-top="0.282cm" fo:margin-bottom="0cm" style:contextual-spacing="false" fo:text-indent="0cm" style:auto-text-indent="false"/>
      <style:text-properties fo:font-size="8pt" style:font-size-asian="8pt"/>
    </style:style>
    <style:style style:name="P201" style:family="paragraph" style:parent-style-name="Standard">
      <style:paragraph-properties fo:margin-left="8.856cm" fo:margin-right="0cm" fo:margin-top="0.286cm" fo:margin-bottom="0cm" style:contextual-spacing="false" fo:text-indent="0cm" style:auto-text-indent="false"/>
      <style:text-properties fo:font-size="8pt" style:font-size-asian="8pt"/>
    </style:style>
    <style:style style:name="P202" style:family="paragraph" style:parent-style-name="Standard">
      <style:paragraph-properties fo:margin-left="8.856cm" fo:margin-right="0cm" fo:margin-top="0.002cm" fo:margin-bottom="0cm" style:contextual-spacing="false" fo:text-indent="0cm" style:auto-text-indent="false"/>
      <style:text-properties fo:font-size="8pt" style:font-size-asian="8pt"/>
    </style:style>
    <style:style style:name="P203" style:family="paragraph" style:parent-style-name="Standard">
      <style:paragraph-properties fo:margin-left="8.714cm" fo:margin-right="0cm" fo:margin-top="0.284cm" fo:margin-bottom="0cm" style:contextual-spacing="false" fo:text-indent="0cm" style:auto-text-indent="false"/>
      <style:text-properties fo:font-size="8pt" style:font-size-asian="8pt"/>
    </style:style>
    <style:style style:name="P204" style:family="paragraph" style:parent-style-name="Standard">
      <style:paragraph-properties fo:margin-left="8.714cm" fo:margin-right="0cm" fo:margin-top="0.282cm" fo:margin-bottom="0cm" style:contextual-spacing="false" fo:text-indent="0cm" style:auto-text-indent="false"/>
      <style:text-properties fo:font-size="8pt" style:font-size-asian="8pt"/>
    </style:style>
    <style:style style:name="P205" style:family="paragraph" style:parent-style-name="Standard">
      <style:paragraph-properties fo:margin-left="1.528cm" fo:margin-right="0cm" fo:margin-top="0.002cm" fo:margin-bottom="0cm" style:contextual-spacing="false" fo:text-align="justify" style:justify-single-word="false" fo:text-indent="0cm" style:auto-text-indent="false"/>
      <style:text-properties fo:font-size="12pt" fo:font-style="italic" style:font-size-asian="12pt" style:font-style-asian="italic"/>
    </style:style>
    <style:style style:name="P206" style:family="paragraph" style:parent-style-name="Standard">
      <style:paragraph-properties fo:margin-left="1.528cm" fo:margin-right="0cm" fo:text-indent="0cm" style:auto-text-indent="false"/>
      <style:text-properties fo:font-size="12pt" fo:font-style="italic" style:font-size-asian="12pt" style:font-style-asian="italic"/>
    </style:style>
    <style:style style:name="P207" style:family="paragraph" style:parent-style-name="Standard">
      <style:paragraph-properties fo:margin-left="1.528cm" fo:margin-right="0cm" fo:text-align="justify" style:justify-single-word="false" fo:text-indent="0cm" style:auto-text-indent="false"/>
      <style:text-properties fo:font-size="12pt" fo:font-style="italic" style:font-size-asian="12pt" style:font-style-asian="italic"/>
    </style:style>
    <style:style style:name="P208" style:family="paragraph" style:parent-style-name="Standard">
      <style:paragraph-properties fo:margin-left="1.528cm" fo:margin-right="0.734cm" fo:text-align="justify" style:justify-single-word="false" fo:text-indent="0cm" style:auto-text-indent="false"/>
      <style:text-properties fo:font-size="12pt" fo:font-style="italic" style:font-size-asian="12pt" style:font-style-asian="italic"/>
    </style:style>
    <style:style style:name="P209" style:family="paragraph" style:parent-style-name="Standard">
      <style:paragraph-properties fo:margin-left="1.528cm" fo:margin-right="0.734cm" fo:margin-top="0.002cm" fo:margin-bottom="0cm" style:contextual-spacing="false" fo:text-align="justify" style:justify-single-word="false" fo:text-indent="0cm" style:auto-text-indent="false"/>
      <style:text-properties fo:font-size="12pt" fo:font-style="italic" style:font-size-asian="12pt" style:font-style-asian="italic"/>
    </style:style>
    <style:style style:name="P210" style:family="paragraph" style:parent-style-name="Standard">
      <style:paragraph-properties fo:margin-left="1.528cm" fo:margin-right="0.732cm" fo:text-align="justify" style:justify-single-word="false" fo:text-indent="0cm" style:auto-text-indent="false"/>
      <style:text-properties fo:font-size="12pt" fo:font-style="italic" style:font-size-asian="12pt" style:font-style-asian="italic"/>
    </style:style>
    <style:style style:name="P211" style:family="paragraph" style:parent-style-name="Standard">
      <style:paragraph-properties fo:margin-left="1.528cm" fo:margin-right="0.723cm" fo:text-align="justify" style:justify-single-word="false" fo:text-indent="0cm" style:auto-text-indent="false"/>
      <style:text-properties fo:font-size="12pt" fo:font-style="italic" style:font-size-asian="12pt" style:font-style-asian="italic"/>
    </style:style>
    <style:style style:name="P212" style:family="paragraph" style:parent-style-name="Standard">
      <style:paragraph-properties fo:margin-left="1.528cm" fo:margin-right="0.723cm" fo:line-height="106%" fo:text-indent="0cm" style:auto-text-indent="false"/>
      <style:text-properties fo:font-size="12pt" fo:font-style="italic" style:font-size-asian="12pt" style:font-style-asian="italic"/>
    </style:style>
    <style:style style:name="P213" style:family="paragraph" style:parent-style-name="Standard">
      <style:paragraph-properties fo:margin-left="1.528cm" fo:margin-right="0.723cm" fo:line-height="108%" fo:text-indent="0cm" style:auto-text-indent="false"/>
      <style:text-properties fo:font-size="12pt" fo:font-style="italic" style:font-size-asian="12pt" style:font-style-asian="italic"/>
    </style:style>
    <style:style style:name="P214" style:family="paragraph" style:parent-style-name="Standard">
      <style:paragraph-properties fo:margin-left="1.528cm" fo:margin-right="0.557cm" fo:text-indent="0cm" style:auto-text-indent="false"/>
      <style:text-properties fo:font-size="12pt" fo:font-style="italic" style:font-size-asian="12pt" style:font-style-asian="italic"/>
    </style:style>
    <style:style style:name="P215" style:family="paragraph" style:parent-style-name="Standard">
      <style:paragraph-properties fo:margin-left="1.632cm" fo:margin-right="2.08cm" fo:text-align="center" style:justify-single-word="false" fo:text-indent="0cm" style:auto-text-indent="false"/>
      <style:text-properties fo:font-size="10pt" style:font-size-asian="10pt"/>
    </style:style>
    <style:style style:name="P216" style:family="paragraph" style:parent-style-name="Contents_20_1" style:list-style-name="WWNum15">
      <style:paragraph-properties fo:margin-left="1.549cm" fo:margin-right="0cm" fo:text-indent="-0.637cm" style:auto-text-indent="false">
        <style:tab-stops>
          <style:tab-stop style:position="1.55cm"/>
          <style:tab-stop style:position="14.52cm" style:type="right" style:leader-style="dotted" style:leader-text="."/>
        </style:tab-stops>
      </style:paragraph-properties>
    </style:style>
    <style:style style:name="P217" style:family="paragraph" style:parent-style-name="Contents_20_1" style:list-style-name="WWNum15">
      <style:paragraph-properties fo:margin-left="1.549cm" fo:margin-right="0cm" fo:margin-top="0.282cm" fo:margin-bottom="0cm" style:contextual-spacing="false" fo:text-indent="-0.637cm" style:auto-text-indent="false">
        <style:tab-stops>
          <style:tab-stop style:position="1.55cm"/>
          <style:tab-stop style:position="14.52cm" style:type="right" style:leader-style="dotted" style:leader-text="."/>
        </style:tab-stops>
      </style:paragraph-properties>
    </style:style>
    <style:style style:name="P218" style:family="paragraph" style:parent-style-name="Contents_20_1" style:list-style-name="WWNum15">
      <style:paragraph-properties fo:margin-left="1.808cm" fo:margin-right="0cm" fo:margin-top="0.282cm" fo:margin-bottom="0cm" style:contextual-spacing="false" fo:text-indent="-0.9cm" style:auto-text-indent="false">
        <style:tab-stops>
          <style:tab-stop style:position="1.808cm"/>
          <style:tab-stop style:position="1.81cm"/>
          <style:tab-stop style:position="14.52cm" style:type="right" style:leader-style="dotted" style:leader-text="."/>
        </style:tab-stops>
      </style:paragraph-properties>
    </style:style>
    <style:style style:name="P219" style:family="paragraph" style:parent-style-name="Contents_20_2" style:list-style-name="WWNum16">
      <style:paragraph-properties fo:margin-left="2.819cm" fo:margin-right="0cm" fo:margin-top="0.282cm" fo:margin-bottom="0cm" style:contextual-spacing="false" fo:text-indent="-1.272cm" style:auto-text-indent="false">
        <style:tab-stops>
          <style:tab-stop style:position="2.819cm"/>
          <style:tab-stop style:position="2.82cm"/>
          <style:tab-stop style:position="14.27cm" style:type="right"/>
        </style:tab-stops>
      </style:paragraph-properties>
    </style:style>
    <style:style style:name="P220" style:family="paragraph" style:parent-style-name="Contents_20_2" style:list-style-name="WWNum15">
      <style:paragraph-properties fo:margin-left="2.819cm" fo:margin-right="0cm" fo:margin-top="0.282cm" fo:margin-bottom="0cm" style:contextual-spacing="false" fo:text-indent="-1.272cm" style:auto-text-indent="false">
        <style:tab-stops>
          <style:tab-stop style:position="2.819cm"/>
          <style:tab-stop style:position="2.82cm"/>
          <style:tab-stop style:position="14.519cm" style:type="right" style:leader-style="dotted" style:leader-text="."/>
        </style:tab-stops>
      </style:paragraph-properties>
    </style:style>
    <style:style style:name="P221" style:family="paragraph" style:parent-style-name="Contents_20_2" style:list-style-name="WWNum16">
      <style:paragraph-properties fo:margin-left="2.819cm" fo:margin-right="0cm" fo:text-indent="-1.272cm" style:auto-text-indent="false">
        <style:tab-stops>
          <style:tab-stop style:position="2.819cm"/>
          <style:tab-stop style:position="2.82cm"/>
          <style:tab-stop style:position="14.519cm" style:type="right"/>
        </style:tab-stops>
      </style:paragraph-properties>
    </style:style>
    <style:style style:name="P222" style:family="paragraph" style:parent-style-name="Contents_20_2" style:list-style-name="WWNum15">
      <style:paragraph-properties fo:margin-left="2.819cm" fo:margin-right="0cm" fo:text-indent="-1.272cm" style:auto-text-indent="false">
        <style:tab-stops>
          <style:tab-stop style:position="2.819cm"/>
          <style:tab-stop style:position="2.82cm"/>
          <style:tab-stop style:position="14.52cm" style:type="right" style:leader-style="dotted" style:leader-text="."/>
        </style:tab-stops>
      </style:paragraph-properties>
    </style:style>
    <style:style style:name="P223" style:family="paragraph" style:parent-style-name="Contents_20_2" style:list-style-name="WWNum15">
      <style:paragraph-properties fo:margin-left="2.819cm" fo:margin-right="0cm" fo:margin-top="0.279cm" fo:margin-bottom="0cm" style:contextual-spacing="false" fo:text-indent="-1.272cm" style:auto-text-indent="false">
        <style:tab-stops>
          <style:tab-stop style:position="2.819cm"/>
          <style:tab-stop style:position="2.82cm"/>
          <style:tab-stop style:position="14.52cm" style:type="right" style:leader-style="dotted" style:leader-text="."/>
        </style:tab-stops>
      </style:paragraph-properties>
    </style:style>
    <style:style style:name="P224" style:family="paragraph" style:parent-style-name="Heading_20_1" style:master-page-name="Converted2">
      <style:paragraph-properties fo:margin-left="1.632cm" fo:margin-right="2.081cm" fo:text-indent="0cm" style:auto-text-indent="false" style:page-number="auto"/>
    </style:style>
    <style:style style:name="P225" style:family="paragraph" style:parent-style-name="Heading_20_1" style:list-style-name="WWNum4" style:master-page-name="Converted23">
      <style:paragraph-properties fo:margin-left="1.549cm" fo:margin-right="0cm" fo:text-indent="-0.637cm" style:auto-text-indent="false" style:page-number="auto">
        <style:tab-stops>
          <style:tab-stop style:position="1.55cm"/>
        </style:tab-stops>
      </style:paragraph-properties>
    </style:style>
    <style:style style:name="P226" style:family="paragraph" style:parent-style-name="Heading_20_2" style:list-style-name="WWNum14" style:master-page-name="Converted4">
      <style:paragraph-properties fo:margin-left="1.549cm" fo:margin-right="0cm" fo:text-indent="-0.637cm" style:auto-text-indent="false" style:page-number="auto">
        <style:tab-stops>
          <style:tab-stop style:position="1.55cm"/>
        </style:tab-stops>
      </style:paragraph-properties>
    </style:style>
    <style:style style:name="P227" style:family="paragraph" style:parent-style-name="Heading_20_2" style:list-style-name="WWNum14" style:master-page-name="Converted5">
      <style:paragraph-properties fo:margin-left="1.549cm" fo:margin-right="0cm" fo:text-indent="-0.637cm" style:auto-text-indent="false" style:page-number="auto">
        <style:tab-stops>
          <style:tab-stop style:position="1.55cm"/>
        </style:tab-stops>
      </style:paragraph-properties>
    </style:style>
    <style:style style:name="P228" style:family="paragraph" style:parent-style-name="Heading_20_2" style:list-style-name="WWNum14" style:master-page-name="Converted6">
      <style:paragraph-properties fo:margin-left="1.549cm" fo:margin-right="0cm" fo:text-indent="-0.637cm" style:auto-text-indent="false" style:page-number="auto">
        <style:tab-stops>
          <style:tab-stop style:position="1.55cm"/>
        </style:tab-stops>
      </style:paragraph-properties>
    </style:style>
    <style:style style:name="P229" style:family="paragraph" style:parent-style-name="Heading_20_2" style:list-style-name="WWNum14" style:master-page-name="Converted8">
      <style:paragraph-properties fo:margin-left="1.549cm" fo:margin-right="0cm" fo:text-indent="-0.637cm" style:auto-text-indent="false" style:page-number="auto">
        <style:tab-stops>
          <style:tab-stop style:position="1.55cm"/>
        </style:tab-stops>
      </style:paragraph-properties>
    </style:style>
    <style:style style:name="P230" style:family="paragraph" style:parent-style-name="Heading_20_2" style:list-style-name="WWNum4" style:master-page-name="Converted15">
      <style:paragraph-properties fo:margin-left="1.549cm" fo:margin-right="0cm" fo:text-indent="-0.637cm" style:auto-text-indent="false" style:page-number="auto">
        <style:tab-stops>
          <style:tab-stop style:position="1.55cm"/>
        </style:tab-stops>
      </style:paragraph-properties>
    </style:style>
    <style:style style:name="P231" style:family="paragraph" style:parent-style-name="Heading_20_2" style:list-style-name="WWNum4" style:master-page-name="Converted16">
      <style:paragraph-properties fo:margin-left="1.549cm" fo:margin-right="0cm" fo:text-indent="-0.637cm" style:auto-text-indent="false" style:page-number="auto">
        <style:tab-stops>
          <style:tab-stop style:position="1.55cm"/>
        </style:tab-stops>
      </style:paragraph-properties>
    </style:style>
    <style:style style:name="P232" style:family="paragraph" style:parent-style-name="Heading_20_2" style:list-style-name="WWNum12">
      <style:paragraph-properties fo:margin-left="2.159cm" fo:margin-right="0cm" fo:margin-top="0cm" fo:margin-bottom="0cm" style:contextual-spacing="false" fo:text-indent="-1.247cm" style:auto-text-indent="false">
        <style:tab-stops>
          <style:tab-stop style:position="2.159cm"/>
          <style:tab-stop style:position="2.161cm"/>
        </style:tab-stops>
      </style:paragraph-properties>
    </style:style>
    <style:style style:name="P233" style:family="paragraph" style:parent-style-name="Heading_20_3" style:master-page-name="Converted1">
      <style:paragraph-properties fo:margin-left="1.753cm" fo:margin-right="0cm" fo:margin-top="0.053cm" fo:margin-bottom="0cm" style:contextual-spacing="false" fo:text-indent="0cm" style:auto-text-indent="false" style:page-number="auto">
        <style:tab-stops>
          <style:tab-stop style:position="10.446cm"/>
        </style:tab-stops>
      </style:paragraph-properties>
    </style:style>
    <style:style style:name="P234" style:family="paragraph" style:parent-style-name="Heading_20_3" style:list-style-name="WWNum12">
      <style:paragraph-properties fo:text-align="start" style:justify-single-word="false">
        <style:tab-stops>
          <style:tab-stop style:position="3.129cm"/>
        </style:tab-stops>
      </style:paragraph-properties>
    </style:style>
    <style:style style:name="P235" style:family="paragraph" style:parent-style-name="Heading_20_3" style:list-style-name="WWNum10">
      <style:paragraph-properties fo:margin-left="1.549cm" fo:margin-right="0.72cm" fo:line-height="108%" fo:text-align="justify" style:justify-single-word="false" fo:text-indent="-0.635cm" style:auto-text-indent="false">
        <style:tab-stops>
          <style:tab-stop style:position="1.55cm"/>
        </style:tab-stops>
      </style:paragraph-properties>
    </style:style>
    <style:style style:name="P236" style:family="paragraph" style:parent-style-name="Heading_20_3" style:list-style-name="WWNum6">
      <style:paragraph-properties fo:margin-left="1.549cm" fo:margin-right="0.72cm" fo:line-height="108%" fo:text-align="justify" style:justify-single-word="false" fo:text-indent="-0.635cm" style:auto-text-indent="false">
        <style:tab-stops>
          <style:tab-stop style:position="1.55cm"/>
        </style:tab-stops>
      </style:paragraph-properties>
    </style:style>
    <style:style style:name="P237" style:family="paragraph" style:parent-style-name="Heading_20_3" style:list-style-name="WWNum5">
      <style:paragraph-properties fo:margin-left="1.549cm" fo:margin-right="0.72cm" fo:line-height="108%" fo:text-align="justify" style:justify-single-word="false" fo:text-indent="-0.635cm" style:auto-text-indent="false">
        <style:tab-stops>
          <style:tab-stop style:position="1.55cm"/>
        </style:tab-stops>
      </style:paragraph-properties>
    </style:style>
    <style:style style:name="P238" style:family="paragraph" style:parent-style-name="Heading_20_3" style:list-style-name="WWNum12">
      <style:paragraph-properties fo:margin-left="1.843cm" fo:margin-right="0cm" fo:margin-top="0.092cm" fo:margin-bottom="0cm" style:contextual-spacing="false" fo:text-align="start" style:justify-single-word="false" fo:text-indent="-0.972cm" style:auto-text-indent="false" fo:break-before="column">
        <style:tab-stops>
          <style:tab-stop style:position="1.845cm"/>
        </style:tab-stops>
      </style:paragraph-properties>
    </style:style>
    <style:style style:name="P239" style:family="paragraph" style:parent-style-name="Heading_20_3" style:list-style-name="WWNum12">
      <style:paragraph-properties fo:margin-left="1.843cm" fo:margin-right="0cm" fo:margin-top="0.053cm" fo:margin-bottom="0cm" style:contextual-spacing="false" fo:text-align="start" style:justify-single-word="false" fo:text-indent="-0.972cm" style:auto-text-indent="false" fo:break-before="column">
        <style:tab-stops>
          <style:tab-stop style:position="1.845cm"/>
        </style:tab-stops>
      </style:paragraph-properties>
    </style:style>
    <style:style style:name="P240" style:family="paragraph" style:parent-style-name="Heading_20_3" style:list-style-name="WWNum9">
      <style:paragraph-properties fo:margin-left="1.549cm" fo:margin-right="0.721cm" fo:margin-top="0.002cm" fo:margin-bottom="0cm" style:contextual-spacing="false" fo:line-height="108%" fo:text-align="justify" style:justify-single-word="false" fo:text-indent="-0.635cm" style:auto-text-indent="false">
        <style:tab-stops>
          <style:tab-stop style:position="1.55cm"/>
        </style:tab-stops>
      </style:paragraph-properties>
    </style:style>
    <style:style style:name="P241" style:family="paragraph" style:parent-style-name="Heading_20_3" style:list-style-name="WWNum8">
      <style:paragraph-properties fo:margin-left="1.549cm" fo:margin-right="0.736cm" fo:margin-top="0.002cm" fo:margin-bottom="0cm" style:contextual-spacing="false" fo:line-height="108%" fo:text-align="justify" style:justify-single-word="false" fo:text-indent="-0.635cm" style:auto-text-indent="false">
        <style:tab-stops>
          <style:tab-stop style:position="1.55cm"/>
        </style:tab-stops>
      </style:paragraph-properties>
    </style:style>
    <style:style style:name="P242" style:family="paragraph" style:parent-style-name="Heading_20_3" style:list-style-name="WWNum12">
      <style:paragraph-properties fo:margin-left="1.842cm" fo:margin-right="0cm" fo:margin-top="0.092cm" fo:margin-bottom="0cm" style:contextual-spacing="false" fo:text-align="start" style:justify-single-word="false" fo:text-indent="-0.97cm" style:auto-text-indent="false" fo:break-before="column">
        <style:tab-stops>
          <style:tab-stop style:position="1.843cm"/>
        </style:tab-stops>
      </style:paragraph-properties>
    </style:style>
    <style:style style:name="P243" style:family="paragraph" style:parent-style-name="Heading_20_3" style:list-style-name="WWNum3">
      <style:paragraph-properties fo:margin-left="0.919cm" fo:margin-right="0cm" fo:text-indent="-0.642cm" style:auto-text-indent="false">
        <style:tab-stops>
          <style:tab-stop style:position="0.921cm"/>
        </style:tab-stops>
      </style:paragraph-properties>
    </style:style>
    <style:style style:name="P244" style:family="paragraph" style:parent-style-name="Heading_20_3" style:list-style-name="WWNum3">
      <style:paragraph-properties fo:margin-left="1.528cm" fo:margin-right="0cm" fo:text-indent="-1.251cm" style:auto-text-indent="false">
        <style:tab-stops>
          <style:tab-stop style:position="1.528cm"/>
          <style:tab-stop style:position="1.529cm"/>
        </style:tab-stops>
      </style:paragraph-properties>
    </style:style>
    <style:style style:name="P245" style:family="paragraph" style:parent-style-name="Heading_20_3" style:list-style-name="WWNum3">
      <style:paragraph-properties fo:margin-left="1.528cm" fo:margin-right="0cm" fo:text-indent="-1.251cm" style:auto-text-indent="false">
        <style:tab-stops>
          <style:tab-stop style:position="1.529cm"/>
        </style:tab-stops>
      </style:paragraph-properties>
    </style:style>
    <style:style style:name="P246" style:family="paragraph" style:parent-style-name="Heading_20_3" style:list-style-name="WWNum3" style:master-page-name="Converted17">
      <style:paragraph-properties fo:margin-left="1.528cm" fo:margin-right="0cm" fo:margin-top="0.053cm" fo:margin-bottom="0cm" style:contextual-spacing="false" fo:text-indent="-1.251cm" style:auto-text-indent="false" style:page-number="auto">
        <style:tab-stops>
          <style:tab-stop style:position="1.528cm"/>
          <style:tab-stop style:position="1.529cm"/>
        </style:tab-stops>
      </style:paragraph-properties>
    </style:style>
    <style:style style:name="P247" style:family="paragraph" style:parent-style-name="Heading_20_3" style:list-style-name="WWNum3" style:master-page-name="Converted18">
      <style:paragraph-properties fo:margin-left="1.528cm" fo:margin-right="0cm" fo:margin-top="0.053cm" fo:margin-bottom="0cm" style:contextual-spacing="false" fo:text-indent="-1.251cm" style:auto-text-indent="false" style:page-number="auto">
        <style:tab-stops>
          <style:tab-stop style:position="1.529cm"/>
        </style:tab-stops>
      </style:paragraph-properties>
    </style:style>
    <style:style style:name="P248" style:family="paragraph" style:parent-style-name="Heading_20_3" style:list-style-name="WWNum3" style:master-page-name="Converted21">
      <style:paragraph-properties fo:margin-left="1.528cm" fo:margin-right="0cm" fo:margin-top="0.053cm" fo:margin-bottom="0cm" style:contextual-spacing="false" fo:text-indent="-1.251cm" style:auto-text-indent="false" style:page-number="auto">
        <style:tab-stops>
          <style:tab-stop style:position="1.528cm"/>
          <style:tab-stop style:position="1.529cm"/>
        </style:tab-stops>
      </style:paragraph-properties>
    </style:style>
    <style:style style:name="P249" style:family="paragraph" style:parent-style-name="Heading_20_3" style:list-style-name="WWNum3">
      <style:paragraph-properties fo:margin-left="1.528cm" fo:margin-right="0cm" fo:margin-top="0.002cm" fo:margin-bottom="0cm" style:contextual-spacing="false" fo:text-indent="-1.251cm" style:auto-text-indent="false">
        <style:tab-stops>
          <style:tab-stop style:position="1.528cm"/>
          <style:tab-stop style:position="1.529cm"/>
        </style:tab-stops>
      </style:paragraph-properties>
    </style:style>
    <style:style style:name="P250" style:family="paragraph" style:parent-style-name="Heading_20_3" style:list-style-name="WWNum3">
      <style:paragraph-properties fo:margin-left="1.528cm" fo:margin-right="0cm" fo:margin-top="0.33cm" fo:margin-bottom="0cm" style:contextual-spacing="false" fo:text-indent="-1.251cm" style:auto-text-indent="false">
        <style:tab-stops>
          <style:tab-stop style:position="1.528cm"/>
          <style:tab-stop style:position="1.529cm"/>
        </style:tab-stops>
      </style:paragraph-properties>
    </style:style>
    <style:style style:name="P251" style:family="paragraph" style:parent-style-name="Heading_20_3" style:list-style-name="WWNum3" style:master-page-name="Converted19">
      <style:paragraph-properties fo:margin-left="1.528cm" fo:margin-right="0cm" fo:margin-top="0.044cm" fo:margin-bottom="0cm" style:contextual-spacing="false" fo:text-indent="-1.251cm" style:auto-text-indent="false" style:page-number="auto">
        <style:tab-stops>
          <style:tab-stop style:position="1.528cm"/>
          <style:tab-stop style:position="1.529cm"/>
        </style:tab-stops>
      </style:paragraph-properties>
    </style:style>
    <style:style style:name="P252" style:family="paragraph" style:parent-style-name="Heading_20_3" style:list-style-name="WWNum3">
      <style:paragraph-properties fo:margin-left="1.528cm" fo:margin-right="0cm" fo:margin-top="0.326cm" fo:margin-bottom="0cm" style:contextual-spacing="false" fo:text-indent="-1.251cm" style:auto-text-indent="false">
        <style:tab-stops>
          <style:tab-stop style:position="1.528cm"/>
          <style:tab-stop style:position="1.529cm"/>
        </style:tab-stops>
      </style:paragraph-properties>
    </style:style>
    <style:style style:name="P253" style:family="paragraph" style:parent-style-name="Heading_20_3" style:list-style-name="WWNum3" style:master-page-name="Converted22">
      <style:paragraph-properties fo:margin-left="1.528cm" fo:margin-right="0cm" fo:margin-top="0.056cm" fo:margin-bottom="0cm" style:contextual-spacing="false" fo:text-indent="-1.251cm" style:auto-text-indent="false" style:page-number="auto">
        <style:tab-stops>
          <style:tab-stop style:position="1.528cm"/>
          <style:tab-stop style:position="1.529cm"/>
        </style:tab-stops>
      </style:paragraph-properties>
    </style:style>
    <style:style style:name="P254" style:family="paragraph" style:parent-style-name="Heading_20_3" style:list-style-name="WWNum3">
      <style:paragraph-properties fo:margin-left="1.464cm" fo:margin-right="0cm" fo:margin-top="0.002cm" fo:margin-bottom="0cm" style:contextual-spacing="false" fo:text-indent="-1.187cm" style:auto-text-indent="false">
        <style:tab-stops>
          <style:tab-stop style:position="1.466cm"/>
        </style:tab-stops>
      </style:paragraph-properties>
    </style:style>
    <style:style style:name="P255" style:family="paragraph" style:parent-style-name="Heading_20_3" style:list-style-name="WWNum3">
      <style:paragraph-properties fo:margin-left="1.464cm" fo:margin-right="0cm" fo:text-indent="-1.187cm" style:auto-text-indent="false">
        <style:tab-stops>
          <style:tab-stop style:position="1.466cm"/>
        </style:tab-stops>
      </style:paragraph-properties>
    </style:style>
    <style:style style:name="P256" style:family="paragraph" style:parent-style-name="Heading_20_3" style:list-style-name="WWNum3">
      <style:paragraph-properties fo:margin-left="1.528cm" fo:margin-right="0cm" fo:text-indent="-1.272cm" style:auto-text-indent="false">
        <style:tab-stops>
          <style:tab-stop style:position="1.529cm"/>
        </style:tab-stops>
      </style:paragraph-properties>
    </style:style>
    <style:style style:name="P257" style:family="paragraph" style:parent-style-name="List_20_Paragraph" style:list-style-name="WWNum12">
      <style:paragraph-properties fo:text-align="start" style:justify-single-word="false">
        <style:tab-stops>
          <style:tab-stop style:position="3.129cm"/>
        </style:tab-stops>
      </style:paragraph-properties>
    </style:style>
    <style:style style:name="P258" style:family="paragraph" style:parent-style-name="List_20_Paragraph" style:list-style-name="WWNum14" style:master-page-name="Converted3">
      <style:paragraph-properties fo:margin-left="1.549cm" fo:margin-right="0cm" fo:margin-top="0.056cm" fo:margin-bottom="0cm" style:contextual-spacing="false" fo:text-indent="-0.637cm" style:auto-text-indent="false" style:page-number="4">
        <style:tab-stops>
          <style:tab-stop style:position="1.55cm"/>
        </style:tab-stops>
      </style:paragraph-properties>
      <style:text-properties fo:font-size="14pt" fo:font-weight="bold" style:font-size-asian="14pt" style:font-weight-asian="bold"/>
    </style:style>
    <style:style style:name="P259" style:family="paragraph" style:parent-style-name="List_20_Paragraph" style:list-style-name="WWNum13">
      <style:paragraph-properties fo:margin-left="1.549cm" fo:margin-right="0cm" fo:line-height="0.54cm" fo:text-indent="-0.637cm" style:auto-text-indent="false">
        <style:tab-stops>
          <style:tab-stop style:position="1.549cm"/>
          <style:tab-stop style:position="1.55cm"/>
        </style:tab-stops>
      </style:paragraph-properties>
    </style:style>
    <style:style style:name="P260" style:family="paragraph" style:parent-style-name="List_20_Paragraph" style:list-style-name="WWNum13">
      <style:paragraph-properties fo:margin-left="1.549cm" fo:margin-right="0cm" fo:text-indent="-0.637cm" style:auto-text-indent="false">
        <style:tab-stops>
          <style:tab-stop style:position="1.549cm"/>
          <style:tab-stop style:position="1.55cm"/>
        </style:tab-stops>
      </style:paragraph-properties>
    </style:style>
    <style:style style:name="P261" style:family="paragraph" style:parent-style-name="List_20_Paragraph" style:list-style-name="WWNum10">
      <style:paragraph-properties fo:margin-left="1.549cm" fo:margin-right="0cm" fo:line-height="0.517cm" fo:text-indent="-0.637cm" style:auto-text-indent="false">
        <style:tab-stops>
          <style:tab-stop style:position="1.55cm"/>
        </style:tab-stops>
      </style:paragraph-properties>
    </style:style>
    <style:style style:name="P262" style:family="paragraph" style:parent-style-name="List_20_Paragraph" style:list-style-name="WWNum8">
      <style:paragraph-properties fo:margin-left="1.549cm" fo:margin-right="0cm" fo:line-height="0.517cm" fo:text-indent="-0.637cm" style:auto-text-indent="false">
        <style:tab-stops>
          <style:tab-stop style:position="1.55cm"/>
        </style:tab-stops>
      </style:paragraph-properties>
    </style:style>
    <style:style style:name="P263" style:family="paragraph" style:parent-style-name="List_20_Paragraph" style:list-style-name="WWNum6">
      <style:paragraph-properties fo:margin-left="1.549cm" fo:margin-right="0cm" fo:line-height="0.517cm" fo:text-indent="-0.637cm" style:auto-text-indent="false">
        <style:tab-stops>
          <style:tab-stop style:position="1.55cm"/>
        </style:tab-stops>
      </style:paragraph-properties>
    </style:style>
    <style:style style:name="P264" style:family="paragraph" style:parent-style-name="List_20_Paragraph" style:list-style-name="WWNum5">
      <style:paragraph-properties fo:margin-left="1.549cm" fo:margin-right="0cm" fo:line-height="0.517cm" fo:text-indent="-0.637cm" style:auto-text-indent="false">
        <style:tab-stops>
          <style:tab-stop style:position="1.55cm"/>
        </style:tab-stops>
      </style:paragraph-properties>
    </style:style>
    <style:style style:name="P265" style:family="paragraph" style:parent-style-name="List_20_Paragraph" style:list-style-name="WWNum9">
      <style:paragraph-properties fo:margin-left="1.549cm" fo:margin-right="0cm" fo:line-height="0.512cm" fo:text-indent="-0.637cm" style:auto-text-indent="false">
        <style:tab-stops>
          <style:tab-stop style:position="1.55cm"/>
        </style:tab-stops>
      </style:paragraph-properties>
    </style:style>
    <style:style style:name="P266" style:family="paragraph" style:parent-style-name="List_20_Paragraph" style:list-style-name="WWNum9">
      <style:paragraph-properties fo:margin-left="1.549cm" fo:margin-right="0cm" fo:text-indent="-0.637cm" style:auto-text-indent="false">
        <style:tab-stops>
          <style:tab-stop style:position="1.55cm"/>
        </style:tab-stops>
      </style:paragraph-properties>
    </style:style>
    <style:style style:name="P267" style:family="paragraph" style:parent-style-name="List_20_Paragraph" style:list-style-name="WWNum8">
      <style:paragraph-properties fo:margin-left="1.549cm" fo:margin-right="0cm" fo:text-indent="-0.637cm" style:auto-text-indent="false">
        <style:tab-stops>
          <style:tab-stop style:position="1.55cm"/>
        </style:tab-stops>
      </style:paragraph-properties>
    </style:style>
    <style:style style:name="P268" style:family="paragraph" style:parent-style-name="List_20_Paragraph" style:list-style-name="WWNum5">
      <style:paragraph-properties fo:margin-left="1.549cm" fo:margin-right="0cm" fo:text-indent="-0.637cm" style:auto-text-indent="false">
        <style:tab-stops>
          <style:tab-stop style:position="1.55cm"/>
        </style:tab-stops>
      </style:paragraph-properties>
    </style:style>
    <style:style style:name="P269" style:family="paragraph" style:parent-style-name="List_20_Paragraph" style:list-style-name="WWNum13">
      <style:paragraph-properties fo:margin-left="1.549cm" fo:margin-right="0cm" fo:line-height="0.538cm" fo:text-indent="-0.637cm" style:auto-text-indent="false">
        <style:tab-stops>
          <style:tab-stop style:position="1.549cm"/>
          <style:tab-stop style:position="1.55cm"/>
        </style:tab-stops>
      </style:paragraph-properties>
    </style:style>
    <style:style style:name="P270" style:family="paragraph" style:parent-style-name="List_20_Paragraph" style:list-style-name="WWNum2">
      <style:paragraph-properties fo:margin-left="1.549cm" fo:margin-right="0cm" fo:line-height="0.538cm" fo:text-indent="-0.637cm" style:auto-text-indent="false">
        <style:tab-stops>
          <style:tab-stop style:position="1.549cm"/>
          <style:tab-stop style:position="1.55cm"/>
        </style:tab-stops>
      </style:paragraph-properties>
    </style:style>
    <style:style style:name="P271" style:family="paragraph" style:parent-style-name="List_20_Paragraph" style:list-style-name="WWNum13">
      <style:paragraph-properties fo:margin-left="1.549cm" fo:margin-right="0cm" fo:line-height="0.538cm" fo:text-indent="-0.637cm" style:auto-text-indent="false">
        <style:tab-stops>
          <style:tab-stop style:position="1.549cm"/>
          <style:tab-stop style:position="1.55cm"/>
        </style:tab-stops>
      </style:paragraph-properties>
      <style:text-properties fo:font-size="12pt" style:font-size-asian="12pt"/>
    </style:style>
    <style:style style:name="P272" style:family="paragraph" style:parent-style-name="List_20_Paragraph" style:list-style-name="WWNum2">
      <style:paragraph-properties fo:margin-left="1.549cm" fo:margin-right="0cm" fo:line-height="0.538cm" fo:text-indent="-0.637cm" style:auto-text-indent="false">
        <style:tab-stops>
          <style:tab-stop style:position="1.549cm"/>
          <style:tab-stop style:position="1.55cm"/>
        </style:tab-stops>
      </style:paragraph-properties>
      <style:text-properties fo:font-size="12pt" style:font-size-asian="12pt"/>
    </style:style>
    <style:style style:name="P273" style:family="paragraph" style:parent-style-name="List_20_Paragraph" style:list-style-name="WWNum11">
      <style:paragraph-properties fo:margin-left="1.549cm" fo:margin-right="0cm" fo:margin-top="0.004cm" fo:margin-bottom="0cm" style:contextual-spacing="false" fo:text-indent="-0.637cm" style:auto-text-indent="false">
        <style:tab-stops>
          <style:tab-stop style:position="1.55cm"/>
        </style:tab-stops>
      </style:paragraph-properties>
    </style:style>
    <style:style style:name="P274" style:family="paragraph" style:parent-style-name="List_20_Paragraph" style:list-style-name="WWNum2">
      <style:paragraph-properties fo:margin-left="1.549cm" fo:margin-right="0cm" fo:margin-top="0.004cm" fo:margin-bottom="0cm" style:contextual-spacing="false" fo:line-height="0.538cm" fo:text-indent="-0.637cm" style:auto-text-indent="false">
        <style:tab-stops>
          <style:tab-stop style:position="1.549cm"/>
          <style:tab-stop style:position="1.55cm"/>
        </style:tab-stops>
      </style:paragraph-properties>
    </style:style>
    <style:style style:name="P275" style:family="paragraph" style:parent-style-name="List_20_Paragraph" style:list-style-name="WWNum6">
      <style:paragraph-properties fo:margin-left="1.549cm" fo:margin-right="0cm" fo:margin-top="0.005cm" fo:margin-bottom="0cm" style:contextual-spacing="false" fo:text-indent="-0.637cm" style:auto-text-indent="false">
        <style:tab-stops>
          <style:tab-stop style:position="1.55cm"/>
        </style:tab-stops>
      </style:paragraph-properties>
    </style:style>
    <style:style style:name="P276" style:family="paragraph" style:parent-style-name="List_20_Paragraph" style:list-style-name="WWNum13">
      <style:paragraph-properties fo:margin-left="1.549cm" fo:margin-right="0cm" fo:margin-top="0.002cm" fo:margin-bottom="0cm" style:contextual-spacing="false" fo:line-height="0.538cm" fo:text-indent="-0.637cm" style:auto-text-indent="false">
        <style:tab-stops>
          <style:tab-stop style:position="1.549cm"/>
          <style:tab-stop style:position="1.55cm"/>
        </style:tab-stops>
      </style:paragraph-properties>
    </style:style>
    <style:style style:name="P277" style:family="paragraph" style:parent-style-name="List_20_Paragraph" style:list-style-name="WWNum2">
      <style:paragraph-properties fo:margin-left="1.549cm" fo:margin-right="0cm" fo:margin-top="0.002cm" fo:margin-bottom="0cm" style:contextual-spacing="false" fo:line-height="0.538cm" fo:text-indent="-0.637cm" style:auto-text-indent="false">
        <style:tab-stops>
          <style:tab-stop style:position="1.549cm"/>
          <style:tab-stop style:position="1.55cm"/>
        </style:tab-stops>
      </style:paragraph-properties>
    </style:style>
    <style:style style:name="P278" style:family="paragraph" style:parent-style-name="List_20_Paragraph" style:list-style-name="WWNum14">
      <style:paragraph-properties fo:margin-top="0.212cm" fo:margin-bottom="0cm" style:contextual-spacing="false" fo:text-align="justify" style:justify-single-word="false">
        <style:tab-stops>
          <style:tab-stop style:position="3.531cm"/>
        </style:tab-stops>
      </style:paragraph-properties>
    </style:style>
    <style:style style:name="P279" style:family="paragraph" style:parent-style-name="List_20_Paragraph" style:list-style-name="WWNum14">
      <style:paragraph-properties fo:margin-top="0.258cm" fo:margin-bottom="0cm" style:contextual-spacing="false" fo:text-align="justify" style:justify-single-word="false">
        <style:tab-stops>
          <style:tab-stop style:position="3.531cm"/>
        </style:tab-stops>
      </style:paragraph-properties>
      <style:text-properties fo:font-size="12pt" style:font-size-asian="12pt"/>
    </style:style>
    <style:style style:name="P280" style:family="paragraph" style:parent-style-name="List_20_Paragraph" style:list-style-name="WWNum14">
      <style:paragraph-properties fo:margin-top="0.258cm" fo:margin-bottom="0cm" style:contextual-spacing="false">
        <style:tab-stops>
          <style:tab-stop style:position="3.531cm"/>
        </style:tab-stops>
      </style:paragraph-properties>
    </style:style>
    <style:style style:name="P281" style:family="paragraph" style:parent-style-name="List_20_Paragraph" style:list-style-name="WWNum14">
      <style:paragraph-properties fo:margin-top="0.263cm" fo:margin-bottom="0cm" style:contextual-spacing="false">
        <style:tab-stops>
          <style:tab-stop style:position="3.531cm"/>
        </style:tab-stops>
      </style:paragraph-properties>
    </style:style>
    <style:style style:name="P282" style:family="paragraph" style:parent-style-name="List_20_Paragraph" style:list-style-name="WWNum14">
      <style:paragraph-properties fo:margin-top="0.263cm" fo:margin-bottom="0cm" style:contextual-spacing="false">
        <style:tab-stops>
          <style:tab-stop style:position="3.531cm"/>
        </style:tab-stops>
      </style:paragraph-properties>
      <style:text-properties fo:font-size="12pt" style:font-size-asian="12pt"/>
    </style:style>
    <style:style style:name="P283" style:family="paragraph" style:parent-style-name="List_20_Paragraph" style:list-style-name="WWNum14">
      <style:paragraph-properties fo:margin-top="0.259cm" fo:margin-bottom="0cm" style:contextual-spacing="false">
        <style:tab-stops>
          <style:tab-stop style:position="3.531cm"/>
        </style:tab-stops>
      </style:paragraph-properties>
    </style:style>
    <style:style style:name="P284" style:family="paragraph" style:parent-style-name="List_20_Paragraph" style:list-style-name="WWNum14">
      <style:paragraph-properties fo:margin-top="0.259cm" fo:margin-bottom="0cm" style:contextual-spacing="false">
        <style:tab-stops>
          <style:tab-stop style:position="3.531cm"/>
        </style:tab-stops>
      </style:paragraph-properties>
      <style:text-properties fo:font-size="12pt" style:font-size-asian="12pt"/>
    </style:style>
    <style:style style:name="P285" style:family="paragraph" style:parent-style-name="List_20_Paragraph" style:list-style-name="WWNum13">
      <style:paragraph-properties fo:margin-left="1.549cm" fo:margin-right="0.725cm" fo:line-height="100%" fo:text-align="justify" style:justify-single-word="false" fo:text-indent="-0.635cm" style:auto-text-indent="false">
        <style:tab-stops>
          <style:tab-stop style:position="1.55cm"/>
        </style:tab-stops>
      </style:paragraph-properties>
    </style:style>
    <style:style style:name="P286" style:family="paragraph" style:parent-style-name="List_20_Paragraph" style:list-style-name="WWNum11">
      <style:paragraph-properties fo:margin-left="1.549cm" fo:margin-right="0.725cm" fo:text-indent="-0.635cm" style:auto-text-indent="false">
        <style:tab-stops>
          <style:tab-stop style:position="1.55cm"/>
        </style:tab-stops>
      </style:paragraph-properties>
    </style:style>
    <style:style style:name="P287" style:family="paragraph" style:parent-style-name="List_20_Paragraph" style:list-style-name="WWNum13">
      <style:paragraph-properties fo:margin-left="1.549cm" fo:margin-right="0.721cm" fo:text-align="justify" style:justify-single-word="false" fo:text-indent="-0.635cm" style:auto-text-indent="false">
        <style:tab-stops>
          <style:tab-stop style:position="1.55cm"/>
        </style:tab-stops>
      </style:paragraph-properties>
    </style:style>
    <style:style style:name="P288" style:family="paragraph" style:parent-style-name="List_20_Paragraph" style:list-style-name="WWNum11">
      <style:paragraph-properties fo:margin-left="1.549cm" fo:margin-right="0.721cm" fo:text-align="justify" style:justify-single-word="false" fo:text-indent="-0.635cm" style:auto-text-indent="false">
        <style:tab-stops>
          <style:tab-stop style:position="1.55cm"/>
        </style:tab-stops>
      </style:paragraph-properties>
    </style:style>
    <style:style style:name="P289" style:family="paragraph" style:parent-style-name="List_20_Paragraph" style:list-style-name="WWNum4">
      <style:paragraph-properties fo:margin-left="1.549cm" fo:margin-right="0.721cm" fo:line-height="100%" fo:text-indent="-0.635cm" style:auto-text-indent="false">
        <style:tab-stops>
          <style:tab-stop style:position="1.55cm"/>
        </style:tab-stops>
      </style:paragraph-properties>
    </style:style>
    <style:style style:name="P290" style:family="paragraph" style:parent-style-name="List_20_Paragraph" style:list-style-name="WWNum13">
      <style:paragraph-properties fo:margin-left="1.549cm" fo:margin-right="0.721cm" fo:line-height="100%" fo:text-align="justify" style:justify-single-word="false" fo:text-indent="-0.635cm" style:auto-text-indent="false">
        <style:tab-stops>
          <style:tab-stop style:position="1.55cm"/>
        </style:tab-stops>
      </style:paragraph-properties>
    </style:style>
    <style:style style:name="P291" style:family="paragraph" style:parent-style-name="List_20_Paragraph" style:list-style-name="WWNum4">
      <style:paragraph-properties fo:margin-left="1.549cm" fo:margin-right="0.721cm" fo:margin-top="0.33cm" fo:margin-bottom="0cm" style:contextual-spacing="false" fo:text-align="justify" style:justify-single-word="false" fo:text-indent="-0.635cm" style:auto-text-indent="false">
        <style:tab-stops>
          <style:tab-stop style:position="1.55cm"/>
        </style:tab-stops>
      </style:paragraph-properties>
    </style:style>
    <style:style style:name="P292" style:family="paragraph" style:parent-style-name="List_20_Paragraph" style:list-style-name="WWNum13">
      <style:paragraph-properties fo:margin-left="1.549cm" fo:margin-right="0.721cm" fo:margin-top="0.004cm" fo:margin-bottom="0cm" style:contextual-spacing="false" fo:text-align="justify" style:justify-single-word="false" fo:text-indent="-0.635cm" style:auto-text-indent="false">
        <style:tab-stops>
          <style:tab-stop style:position="1.55cm"/>
        </style:tab-stops>
      </style:paragraph-properties>
    </style:style>
    <style:style style:name="P293" style:family="paragraph" style:parent-style-name="List_20_Paragraph" style:list-style-name="WWNum13">
      <style:paragraph-properties fo:margin-left="1.528cm" fo:margin-right="0.73cm" fo:text-indent="-0.635cm" style:auto-text-indent="false">
        <style:tab-stops>
          <style:tab-stop style:position="1.528cm"/>
          <style:tab-stop style:position="1.529cm"/>
        </style:tab-stops>
      </style:paragraph-properties>
    </style:style>
    <style:style style:name="P294" style:family="paragraph" style:parent-style-name="List_20_Paragraph" style:list-style-name="WWNum13">
      <style:paragraph-properties fo:margin-left="1.528cm" fo:margin-right="0cm" fo:line-height="0.536cm" fo:text-indent="-0.637cm" style:auto-text-indent="false">
        <style:tab-stops>
          <style:tab-stop style:position="1.528cm"/>
          <style:tab-stop style:position="1.529cm"/>
        </style:tab-stops>
      </style:paragraph-properties>
    </style:style>
    <style:style style:name="P295" style:family="paragraph" style:parent-style-name="List_20_Paragraph" style:list-style-name="WWNum13">
      <style:paragraph-properties fo:margin-left="1.528cm" fo:margin-right="0cm" fo:line-height="0.536cm" fo:text-align="justify" style:justify-single-word="false" fo:text-indent="-0.637cm" style:auto-text-indent="false">
        <style:tab-stops>
          <style:tab-stop style:position="1.529cm"/>
        </style:tab-stops>
      </style:paragraph-properties>
    </style:style>
    <style:style style:name="P296" style:family="paragraph" style:parent-style-name="List_20_Paragraph" style:list-style-name="WWNum13">
      <style:paragraph-properties fo:margin-left="1.528cm" fo:margin-right="0cm" fo:line-height="0.538cm" fo:text-indent="-0.637cm" style:auto-text-indent="false">
        <style:tab-stops>
          <style:tab-stop style:position="1.528cm"/>
          <style:tab-stop style:position="1.529cm"/>
        </style:tab-stops>
      </style:paragraph-properties>
    </style:style>
    <style:style style:name="P297" style:family="paragraph" style:parent-style-name="List_20_Paragraph" style:list-style-name="WWNum13">
      <style:paragraph-properties fo:margin-left="1.528cm" fo:margin-right="0cm" fo:text-indent="-0.637cm" style:auto-text-indent="false">
        <style:tab-stops>
          <style:tab-stop style:position="1.528cm"/>
          <style:tab-stop style:position="1.529cm"/>
        </style:tab-stops>
      </style:paragraph-properties>
    </style:style>
    <style:style style:name="P298" style:family="paragraph" style:parent-style-name="List_20_Paragraph" style:list-style-name="WWNum13">
      <style:paragraph-properties fo:margin-left="1.528cm" fo:margin-right="0cm" fo:margin-top="0.004cm" fo:margin-bottom="0cm" style:contextual-spacing="false" fo:line-height="0.538cm" fo:text-indent="-0.637cm" style:auto-text-indent="false">
        <style:tab-stops>
          <style:tab-stop style:position="1.528cm"/>
          <style:tab-stop style:position="1.529cm"/>
        </style:tab-stops>
      </style:paragraph-properties>
    </style:style>
    <style:style style:name="P299" style:family="paragraph" style:parent-style-name="List_20_Paragraph" style:list-style-name="WWNum13">
      <style:paragraph-properties fo:margin-left="1.528cm" fo:margin-right="0cm" fo:margin-top="0.002cm" fo:margin-bottom="0cm" style:contextual-spacing="false" fo:line-height="0.538cm" fo:text-indent="-0.637cm" style:auto-text-indent="false">
        <style:tab-stops>
          <style:tab-stop style:position="1.528cm"/>
          <style:tab-stop style:position="1.529cm"/>
        </style:tab-stops>
      </style:paragraph-properties>
    </style:style>
    <style:style style:name="P300" style:family="paragraph" style:parent-style-name="List_20_Paragraph" style:list-style-name="WWNum13">
      <style:paragraph-properties fo:margin-left="1.528cm" fo:margin-right="0.72cm" fo:margin-top="0.002cm" fo:margin-bottom="0cm" style:contextual-spacing="false" fo:text-align="justify" style:justify-single-word="false" fo:text-indent="-0.635cm" style:auto-text-indent="false">
        <style:tab-stops>
          <style:tab-stop style:position="1.529cm"/>
        </style:tab-stops>
      </style:paragraph-properties>
    </style:style>
    <style:style style:name="P301" style:family="paragraph" style:parent-style-name="List_20_Paragraph" style:list-style-name="WWNum13">
      <style:paragraph-properties fo:margin-left="1.528cm" fo:margin-right="0.734cm" fo:line-height="100%" fo:text-align="justify" style:justify-single-word="false" fo:text-indent="-0.635cm" style:auto-text-indent="false">
        <style:tab-stops>
          <style:tab-stop style:position="1.529cm"/>
        </style:tab-stops>
      </style:paragraph-properties>
    </style:style>
    <style:style style:name="P302" style:family="paragraph" style:parent-style-name="List_20_Paragraph" style:list-style-name="WWNum13">
      <style:paragraph-properties fo:margin-left="1.528cm" fo:margin-right="0.725cm" fo:text-align="justify" style:justify-single-word="false" fo:text-indent="-0.635cm" style:auto-text-indent="false">
        <style:tab-stops>
          <style:tab-stop style:position="1.529cm"/>
        </style:tab-stops>
      </style:paragraph-properties>
      <style:text-properties fo:font-size="12pt" style:font-size-asian="12pt"/>
    </style:style>
    <style:style style:name="P303" style:family="paragraph" style:parent-style-name="List_20_Paragraph" style:list-style-name="WWNum13">
      <style:paragraph-properties fo:margin-left="1.528cm" fo:margin-right="0.736cm" fo:margin-top="0.004cm" fo:margin-bottom="0cm" style:contextual-spacing="false" fo:text-indent="-0.635cm" style:auto-text-indent="false">
        <style:tab-stops>
          <style:tab-stop style:position="1.528cm"/>
          <style:tab-stop style:position="1.529cm"/>
        </style:tab-stops>
      </style:paragraph-properties>
      <style:text-properties fo:font-size="12pt" style:font-size-asian="12pt"/>
    </style:style>
    <style:style style:name="P304" style:family="paragraph" style:parent-style-name="List_20_Paragraph" style:list-style-name="WWNum11">
      <style:paragraph-properties fo:margin-left="1.549cm" fo:margin-right="0.73cm" fo:text-indent="-0.635cm" style:auto-text-indent="false">
        <style:tab-stops>
          <style:tab-stop style:position="1.55cm"/>
        </style:tab-stops>
      </style:paragraph-properties>
    </style:style>
    <style:style style:name="P305" style:family="paragraph" style:parent-style-name="List_20_Paragraph" style:list-style-name="WWNum10">
      <style:paragraph-properties fo:margin-left="1.549cm" fo:margin-right="0.73cm" fo:text-indent="-0.635cm" style:auto-text-indent="false">
        <style:tab-stops>
          <style:tab-stop style:position="1.55cm"/>
        </style:tab-stops>
      </style:paragraph-properties>
    </style:style>
    <style:style style:name="P306" style:family="paragraph" style:parent-style-name="List_20_Paragraph" style:list-style-name="WWNum11">
      <style:paragraph-properties fo:margin-left="1.549cm" fo:margin-right="0.73cm" fo:text-align="justify" style:justify-single-word="false" fo:text-indent="-0.635cm" style:auto-text-indent="false">
        <style:tab-stops>
          <style:tab-stop style:position="1.55cm"/>
        </style:tab-stops>
      </style:paragraph-properties>
    </style:style>
    <style:style style:name="P307" style:family="paragraph" style:parent-style-name="List_20_Paragraph" style:list-style-name="WWNum7">
      <style:paragraph-properties fo:margin-left="1.549cm" fo:margin-right="0.73cm" fo:text-align="justify" style:justify-single-word="false" fo:text-indent="-0.635cm" style:auto-text-indent="false">
        <style:tab-stops>
          <style:tab-stop style:position="1.55cm"/>
        </style:tab-stops>
      </style:paragraph-properties>
    </style:style>
    <style:style style:name="P308" style:family="paragraph" style:parent-style-name="List_20_Paragraph" style:list-style-name="WWNum4">
      <style:paragraph-properties fo:margin-left="1.549cm" fo:margin-right="0.73cm" fo:text-align="justify" style:justify-single-word="false" fo:text-indent="-0.635cm" style:auto-text-indent="false">
        <style:tab-stops>
          <style:tab-stop style:position="1.55cm"/>
        </style:tab-stops>
      </style:paragraph-properties>
    </style:style>
    <style:style style:name="P309" style:family="paragraph" style:parent-style-name="List_20_Paragraph" style:list-style-name="WWNum10" style:master-page-name="Converted10">
      <style:paragraph-properties fo:margin-left="1.549cm" fo:margin-right="0.73cm" fo:margin-top="0.056cm" fo:margin-bottom="0cm" style:contextual-spacing="false" fo:text-align="justify" style:justify-single-word="false" fo:text-indent="-0.635cm" style:auto-text-indent="false" style:page-number="auto">
        <style:tab-stops>
          <style:tab-stop style:position="1.55cm"/>
        </style:tab-stops>
      </style:paragraph-properties>
    </style:style>
    <style:style style:name="P310" style:family="paragraph" style:parent-style-name="List_20_Paragraph" style:list-style-name="WWNum11" style:master-page-name="Converted9">
      <style:paragraph-properties fo:margin-left="1.549cm" fo:margin-right="0.72cm" fo:margin-top="0.056cm" fo:margin-bottom="0cm" style:contextual-spacing="false" fo:text-align="justify" style:justify-single-word="false" fo:text-indent="-0.635cm" style:auto-text-indent="false" style:page-number="auto">
        <style:tab-stops>
          <style:tab-stop style:position="1.55cm"/>
        </style:tab-stops>
      </style:paragraph-properties>
    </style:style>
    <style:style style:name="P311" style:family="paragraph" style:parent-style-name="List_20_Paragraph" style:list-style-name="WWNum4" style:master-page-name="Converted14">
      <style:paragraph-properties fo:margin-left="1.549cm" fo:margin-right="0.72cm" fo:margin-top="0.056cm" fo:margin-bottom="0cm" style:contextual-spacing="false" fo:text-align="justify" style:justify-single-word="false" fo:text-indent="-0.635cm" style:auto-text-indent="false" style:page-number="auto">
        <style:tab-stops>
          <style:tab-stop style:position="1.55cm"/>
        </style:tab-stops>
      </style:paragraph-properties>
    </style:style>
    <style:style style:name="P312" style:family="paragraph" style:parent-style-name="List_20_Paragraph" style:list-style-name="WWNum10">
      <style:paragraph-properties fo:margin-left="1.549cm" fo:margin-right="0.72cm" fo:margin-top="0.326cm" fo:margin-bottom="0cm" style:contextual-spacing="false" fo:text-indent="-0.635cm" style:auto-text-indent="false">
        <style:tab-stops>
          <style:tab-stop style:position="1.55cm"/>
        </style:tab-stops>
      </style:paragraph-properties>
    </style:style>
    <style:style style:name="P313" style:family="paragraph" style:parent-style-name="List_20_Paragraph" style:list-style-name="WWNum10">
      <style:paragraph-properties fo:margin-left="1.549cm" fo:margin-right="0.72cm" fo:text-align="justify" style:justify-single-word="false" fo:text-indent="-0.635cm" style:auto-text-indent="false">
        <style:tab-stops>
          <style:tab-stop style:position="1.55cm"/>
        </style:tab-stops>
      </style:paragraph-properties>
    </style:style>
    <style:style style:name="P314" style:family="paragraph" style:parent-style-name="List_20_Paragraph" style:list-style-name="WWNum7">
      <style:paragraph-properties fo:margin-left="1.549cm" fo:margin-right="0.72cm" fo:text-align="justify" style:justify-single-word="false" fo:text-indent="-0.635cm" style:auto-text-indent="false">
        <style:tab-stops>
          <style:tab-stop style:position="1.55cm"/>
        </style:tab-stops>
      </style:paragraph-properties>
    </style:style>
    <style:style style:name="P315" style:family="paragraph" style:parent-style-name="List_20_Paragraph" style:list-style-name="WWNum10">
      <style:paragraph-properties fo:margin-left="1.549cm" fo:margin-right="0.734cm" fo:margin-top="0.004cm" fo:margin-bottom="0cm" style:contextual-spacing="false" fo:text-align="justify" style:justify-single-word="false" fo:text-indent="-0.635cm" style:auto-text-indent="false">
        <style:tab-stops>
          <style:tab-stop style:position="1.55cm"/>
        </style:tab-stops>
      </style:paragraph-properties>
    </style:style>
    <style:style style:name="P316" style:family="paragraph" style:parent-style-name="List_20_Paragraph" style:list-style-name="WWNum8">
      <style:paragraph-properties fo:margin-left="1.549cm" fo:margin-right="0.734cm" fo:text-align="justify" style:justify-single-word="false" fo:text-indent="-0.635cm" style:auto-text-indent="false">
        <style:tab-stops>
          <style:tab-stop style:position="1.55cm"/>
        </style:tab-stops>
      </style:paragraph-properties>
    </style:style>
    <style:style style:name="P317" style:family="paragraph" style:parent-style-name="List_20_Paragraph" style:list-style-name="WWNum6">
      <style:paragraph-properties fo:margin-left="1.549cm" fo:margin-right="0.734cm" fo:text-align="justify" style:justify-single-word="false" fo:text-indent="-0.635cm" style:auto-text-indent="false">
        <style:tab-stops>
          <style:tab-stop style:position="1.55cm"/>
        </style:tab-stops>
      </style:paragraph-properties>
    </style:style>
    <style:style style:name="P318" style:family="paragraph" style:parent-style-name="List_20_Paragraph" style:list-style-name="WWNum5">
      <style:paragraph-properties fo:margin-left="1.549cm" fo:margin-right="0.734cm" fo:text-align="justify" style:justify-single-word="false" fo:text-indent="-0.635cm" style:auto-text-indent="false">
        <style:tab-stops>
          <style:tab-stop style:position="1.55cm"/>
        </style:tab-stops>
      </style:paragraph-properties>
    </style:style>
    <style:style style:name="P319" style:family="paragraph" style:parent-style-name="List_20_Paragraph" style:list-style-name="WWNum9">
      <style:paragraph-properties fo:margin-left="1.549cm" fo:margin-right="0.728cm" fo:margin-top="0.092cm" fo:margin-bottom="0cm" style:contextual-spacing="false" fo:line-height="100%" fo:text-indent="-0.635cm" style:auto-text-indent="false">
        <style:tab-stops>
          <style:tab-stop style:position="1.55cm"/>
        </style:tab-stops>
      </style:paragraph-properties>
    </style:style>
    <style:style style:name="P320" style:family="paragraph" style:parent-style-name="List_20_Paragraph" style:list-style-name="WWNum8">
      <style:paragraph-properties fo:margin-left="1.549cm" fo:margin-right="0.728cm" fo:margin-top="0.092cm" fo:margin-bottom="0cm" style:contextual-spacing="false" fo:text-indent="-0.635cm" style:auto-text-indent="false">
        <style:tab-stops>
          <style:tab-stop style:position="1.55cm"/>
        </style:tab-stops>
      </style:paragraph-properties>
    </style:style>
    <style:style style:name="P321" style:family="paragraph" style:parent-style-name="List_20_Paragraph" style:list-style-name="WWNum7">
      <style:paragraph-properties fo:margin-left="1.549cm" fo:margin-right="0.728cm" fo:margin-top="0.33cm" fo:margin-bottom="0cm" style:contextual-spacing="false" fo:text-align="justify" style:justify-single-word="false" fo:text-indent="-0.635cm" style:auto-text-indent="false">
        <style:tab-stops>
          <style:tab-stop style:position="1.55cm"/>
        </style:tab-stops>
      </style:paragraph-properties>
    </style:style>
    <style:style style:name="P322" style:family="paragraph" style:parent-style-name="List_20_Paragraph" style:list-style-name="WWNum6">
      <style:paragraph-properties fo:margin-left="1.549cm" fo:margin-right="0.728cm" fo:margin-top="0.09cm" fo:margin-bottom="0cm" style:contextual-spacing="false" fo:text-indent="-0.635cm" style:auto-text-indent="false">
        <style:tab-stops>
          <style:tab-stop style:position="1.55cm"/>
        </style:tab-stops>
      </style:paragraph-properties>
    </style:style>
    <style:style style:name="P323" style:family="paragraph" style:parent-style-name="List_20_Paragraph" style:list-style-name="WWNum5">
      <style:paragraph-properties fo:margin-left="1.549cm" fo:margin-right="0.728cm" fo:margin-top="0.09cm" fo:margin-bottom="0cm" style:contextual-spacing="false" fo:text-indent="-0.635cm" style:auto-text-indent="false">
        <style:tab-stops>
          <style:tab-stop style:position="1.55cm"/>
        </style:tab-stops>
      </style:paragraph-properties>
    </style:style>
    <style:style style:name="P324" style:family="paragraph" style:parent-style-name="List_20_Paragraph" style:list-style-name="WWNum13">
      <style:paragraph-properties fo:margin-left="1.549cm" fo:margin-right="0.728cm" fo:text-align="justify" style:justify-single-word="false" fo:text-indent="-0.635cm" style:auto-text-indent="false">
        <style:tab-stops>
          <style:tab-stop style:position="1.55cm"/>
        </style:tab-stops>
      </style:paragraph-properties>
    </style:style>
    <style:style style:name="P325" style:family="paragraph" style:parent-style-name="List_20_Paragraph" style:list-style-name="WWNum9">
      <style:paragraph-properties fo:margin-left="1.549cm" fo:margin-right="0.736cm" fo:text-align="justify" style:justify-single-word="false" fo:text-indent="-0.635cm" style:auto-text-indent="false">
        <style:tab-stops>
          <style:tab-stop style:position="1.55cm"/>
        </style:tab-stops>
      </style:paragraph-properties>
    </style:style>
    <style:style style:name="P326" style:family="paragraph" style:parent-style-name="List_20_Paragraph" style:list-style-name="WWNum8">
      <style:paragraph-properties fo:margin-left="1.549cm" fo:margin-right="0.736cm" fo:text-align="justify" style:justify-single-word="false" fo:text-indent="-0.635cm" style:auto-text-indent="false">
        <style:tab-stops>
          <style:tab-stop style:position="1.55cm"/>
        </style:tab-stops>
      </style:paragraph-properties>
    </style:style>
    <style:style style:name="P327" style:family="paragraph" style:parent-style-name="List_20_Paragraph" style:list-style-name="WWNum7">
      <style:paragraph-properties fo:margin-left="1.549cm" fo:margin-right="0.736cm" fo:text-align="justify" style:justify-single-word="false" fo:text-indent="-0.635cm" style:auto-text-indent="false">
        <style:tab-stops>
          <style:tab-stop style:position="1.55cm"/>
        </style:tab-stops>
      </style:paragraph-properties>
    </style:style>
    <style:style style:name="P328" style:family="paragraph" style:parent-style-name="List_20_Paragraph" style:list-style-name="WWNum6">
      <style:paragraph-properties fo:margin-left="1.549cm" fo:margin-right="0.736cm" fo:text-align="justify" style:justify-single-word="false" fo:text-indent="-0.635cm" style:auto-text-indent="false">
        <style:tab-stops>
          <style:tab-stop style:position="1.55cm"/>
        </style:tab-stops>
      </style:paragraph-properties>
    </style:style>
    <style:style style:name="P329" style:family="paragraph" style:parent-style-name="List_20_Paragraph" style:list-style-name="WWNum5">
      <style:paragraph-properties fo:margin-left="1.549cm" fo:margin-right="0.736cm" fo:text-align="justify" style:justify-single-word="false" fo:text-indent="-0.635cm" style:auto-text-indent="false">
        <style:tab-stops>
          <style:tab-stop style:position="1.55cm"/>
        </style:tab-stops>
      </style:paragraph-properties>
    </style:style>
    <style:style style:name="P330" style:family="paragraph" style:parent-style-name="List_20_Paragraph" style:list-style-name="WWNum9">
      <style:paragraph-properties fo:margin-left="1.549cm" fo:margin-right="0.723cm" fo:text-align="justify" style:justify-single-word="false" fo:text-indent="-0.635cm" style:auto-text-indent="false">
        <style:tab-stops>
          <style:tab-stop style:position="1.55cm"/>
        </style:tab-stops>
      </style:paragraph-properties>
    </style:style>
    <style:style style:name="P331" style:family="paragraph" style:parent-style-name="List_20_Paragraph" style:list-style-name="WWNum13">
      <style:paragraph-properties fo:margin-left="1.549cm" fo:margin-right="0.723cm" fo:text-align="justify" style:justify-single-word="false" fo:text-indent="-0.635cm" style:auto-text-indent="false">
        <style:tab-stops>
          <style:tab-stop style:position="1.55cm"/>
        </style:tab-stops>
      </style:paragraph-properties>
    </style:style>
    <style:style style:name="P332" style:family="paragraph" style:parent-style-name="List_20_Paragraph" style:list-style-name="WWNum7">
      <style:paragraph-properties fo:margin-left="1.549cm" fo:margin-right="0.718cm" fo:text-align="justify" style:justify-single-word="false" fo:text-indent="-0.635cm" style:auto-text-indent="false">
        <style:tab-stops>
          <style:tab-stop style:position="1.55cm"/>
        </style:tab-stops>
      </style:paragraph-properties>
    </style:style>
    <style:style style:name="P333" style:family="paragraph" style:parent-style-name="List_20_Paragraph" style:list-style-name="WWNum4">
      <style:paragraph-properties fo:margin-left="1.549cm" fo:margin-right="0.718cm" fo:text-align="justify" style:justify-single-word="false" fo:text-indent="-0.635cm" style:auto-text-indent="false">
        <style:tab-stops>
          <style:tab-stop style:position="1.55cm"/>
        </style:tab-stops>
      </style:paragraph-properties>
    </style:style>
    <style:style style:name="P334" style:family="paragraph" style:parent-style-name="List_20_Paragraph" style:list-style-name="WWNum13">
      <style:paragraph-properties fo:margin-left="1.549cm" fo:margin-right="0.727cm" fo:text-align="justify" style:justify-single-word="false" fo:text-indent="-0.635cm" style:auto-text-indent="false">
        <style:tab-stops>
          <style:tab-stop style:position="1.55cm"/>
        </style:tab-stops>
      </style:paragraph-properties>
    </style:style>
    <style:style style:name="P335" style:family="paragraph" style:parent-style-name="List_20_Paragraph" style:list-style-name="WWNum13">
      <style:paragraph-properties fo:margin-left="1.549cm" fo:margin-right="0.737cm" fo:text-align="justify" style:justify-single-word="false" fo:text-indent="-0.635cm" style:auto-text-indent="false">
        <style:tab-stops>
          <style:tab-stop style:position="1.55cm"/>
        </style:tab-stops>
      </style:paragraph-properties>
    </style:style>
    <style:style style:name="P336" style:family="paragraph" style:parent-style-name="List_20_Paragraph" style:list-style-name="WWNum1">
      <style:paragraph-properties fo:margin-left="1.528cm" fo:margin-right="0cm" fo:text-indent="-1.251cm" style:auto-text-indent="false">
        <style:tab-stops>
          <style:tab-stop style:position="1.528cm"/>
          <style:tab-stop style:position="1.529cm"/>
        </style:tab-stops>
      </style:paragraph-properties>
    </style:style>
    <style:style style:name="P337" style:family="paragraph" style:parent-style-name="List_20_Paragraph" style:list-style-name="WWNum1">
      <style:paragraph-properties fo:margin-left="1.528cm" fo:margin-right="0cm" fo:margin-top="0.002cm" fo:margin-bottom="0cm" style:contextual-spacing="false" fo:text-indent="-1.251cm" style:auto-text-indent="false">
        <style:tab-stops>
          <style:tab-stop style:position="1.528cm"/>
          <style:tab-stop style:position="1.529cm"/>
        </style:tab-stops>
      </style:paragraph-properties>
    </style:style>
    <style:style style:name="P338" style:family="paragraph" style:parent-style-name="List_20_Paragraph" style:list-style-name="WWNum1" style:master-page-name="Converted25">
      <style:paragraph-properties fo:margin-left="1.528cm" fo:margin-right="0cm" fo:margin-top="0.039cm" fo:margin-bottom="0cm" style:contextual-spacing="false" fo:text-indent="-1.251cm" style:auto-text-indent="false" style:page-number="auto">
        <style:tab-stops>
          <style:tab-stop style:position="1.528cm"/>
          <style:tab-stop style:position="1.529cm"/>
        </style:tab-stops>
      </style:paragraph-properties>
    </style:style>
    <style:style style:name="P339" style:family="paragraph" style:parent-style-name="List_20_Paragraph" style:list-style-name="WWNum1">
      <style:paragraph-properties fo:margin-left="1.528cm" fo:margin-right="0.721cm" fo:margin-top="0.002cm" fo:margin-bottom="0cm" style:contextual-spacing="false" fo:text-align="justify" style:justify-single-word="false" fo:text-indent="0cm" style:auto-text-indent="false">
        <style:tab-stops>
          <style:tab-stop style:position="2.778cm"/>
        </style:tab-stops>
      </style:paragraph-properties>
    </style:style>
    <style:style style:name="P340" style:family="paragraph" style:parent-style-name="List_20_Paragraph" style:list-style-name="WWNum1">
      <style:paragraph-properties fo:margin-left="1.528cm" fo:margin-right="0.721cm" fo:text-align="justify" style:justify-single-word="false" fo:text-indent="0cm" style:auto-text-indent="false">
        <style:tab-stops>
          <style:tab-stop style:position="2.778cm"/>
        </style:tab-stops>
      </style:paragraph-properties>
    </style:style>
    <style:style style:name="P341" style:family="paragraph" style:parent-style-name="List_20_Paragraph" style:list-style-name="WWNum1">
      <style:paragraph-properties fo:margin-left="1.528cm" fo:margin-right="0.721cm" fo:text-align="justify" style:justify-single-word="false" fo:text-indent="0cm" style:auto-text-indent="false">
        <style:tab-stops>
          <style:tab-stop style:position="2.875cm"/>
        </style:tab-stops>
      </style:paragraph-properties>
    </style:style>
    <style:style style:name="P342" style:family="paragraph" style:parent-style-name="List_20_Paragraph" style:list-style-name="WWNum1">
      <style:paragraph-properties fo:margin-left="1.528cm" fo:margin-right="0.727cm" fo:margin-top="0.002cm" fo:margin-bottom="0cm" style:contextual-spacing="false" fo:text-align="justify" style:justify-single-word="false" fo:text-indent="0cm" style:auto-text-indent="false">
        <style:tab-stops>
          <style:tab-stop style:position="2.778cm"/>
        </style:tab-stops>
      </style:paragraph-properties>
    </style:style>
    <style:style style:name="P343" style:family="paragraph" style:parent-style-name="List_20_Paragraph" style:list-style-name="WWNum1">
      <style:paragraph-properties fo:margin-left="1.528cm" fo:margin-right="0.727cm" fo:margin-top="0.002cm" fo:margin-bottom="0cm" style:contextual-spacing="false" fo:text-indent="0cm" style:auto-text-indent="false">
        <style:tab-stops>
          <style:tab-stop style:position="2.776cm"/>
          <style:tab-stop style:position="2.778cm"/>
        </style:tab-stops>
      </style:paragraph-properties>
    </style:style>
    <style:style style:name="P344" style:family="paragraph" style:parent-style-name="List_20_Paragraph" style:list-style-name="WWNum1">
      <style:paragraph-properties fo:margin-left="1.528cm" fo:margin-right="0.727cm" fo:text-align="justify" style:justify-single-word="false" fo:text-indent="0cm" style:auto-text-indent="false">
        <style:tab-stops>
          <style:tab-stop style:position="2.778cm"/>
        </style:tab-stops>
      </style:paragraph-properties>
    </style:style>
    <style:style style:name="P345" style:family="paragraph" style:parent-style-name="List_20_Paragraph" style:list-style-name="WWNum1">
      <style:paragraph-properties fo:margin-left="1.528cm" fo:margin-right="0.728cm" fo:margin-top="0.002cm" fo:margin-bottom="0cm" style:contextual-spacing="false" fo:text-align="justify" style:justify-single-word="false" fo:text-indent="0cm" style:auto-text-indent="false">
        <style:tab-stops>
          <style:tab-stop style:position="2.778cm"/>
        </style:tab-stops>
      </style:paragraph-properties>
    </style:style>
    <style:style style:name="P346" style:family="paragraph" style:parent-style-name="List_20_Paragraph" style:list-style-name="WWNum1">
      <style:paragraph-properties fo:margin-left="1.528cm" fo:margin-right="0.728cm" fo:margin-top="0.002cm" fo:margin-bottom="0cm" style:contextual-spacing="false" fo:text-indent="0cm" style:auto-text-indent="false">
        <style:tab-stops>
          <style:tab-stop style:position="2.776cm"/>
          <style:tab-stop style:position="2.778cm"/>
        </style:tab-stops>
      </style:paragraph-properties>
    </style:style>
    <style:style style:name="P347" style:family="paragraph" style:parent-style-name="List_20_Paragraph" style:list-style-name="WWNum1">
      <style:paragraph-properties fo:margin-left="1.528cm" fo:margin-right="0.728cm" fo:text-align="justify" style:justify-single-word="false" fo:text-indent="0cm" style:auto-text-indent="false">
        <style:tab-stops>
          <style:tab-stop style:position="2.778cm"/>
        </style:tab-stops>
      </style:paragraph-properties>
    </style:style>
    <style:style style:name="P348" style:family="paragraph" style:parent-style-name="List_20_Paragraph" style:list-style-name="WWNum1" style:master-page-name="Converted24">
      <style:paragraph-properties fo:margin-left="1.528cm" fo:margin-right="0.723cm" fo:margin-top="0.056cm" fo:margin-bottom="0cm" style:contextual-spacing="false" fo:text-align="justify" style:justify-single-word="false" fo:text-indent="0cm" style:auto-text-indent="false" style:page-number="auto">
        <style:tab-stops>
          <style:tab-stop style:position="2.778cm"/>
        </style:tab-stops>
      </style:paragraph-properties>
    </style:style>
    <style:style style:name="P349" style:family="paragraph" style:parent-style-name="List_20_Paragraph" style:list-style-name="WWNum1">
      <style:paragraph-properties fo:margin-left="1.528cm" fo:margin-right="0.723cm" fo:text-align="justify" style:justify-single-word="false" fo:text-indent="0cm" style:auto-text-indent="false">
        <style:tab-stops>
          <style:tab-stop style:position="2.778cm"/>
        </style:tab-stops>
      </style:paragraph-properties>
    </style:style>
    <style:style style:name="P350" style:family="paragraph" style:parent-style-name="List_20_Paragraph" style:list-style-name="WWNum1">
      <style:paragraph-properties fo:margin-left="1.528cm" fo:margin-right="1.155cm" fo:margin-top="0.002cm" fo:margin-bottom="0cm" style:contextual-spacing="false" fo:text-indent="0cm" style:auto-text-indent="false">
        <style:tab-stops>
          <style:tab-stop style:position="2.776cm"/>
          <style:tab-stop style:position="2.778cm"/>
        </style:tab-stops>
      </style:paragraph-properties>
    </style:style>
    <style:style style:name="P351" style:family="paragraph" style:parent-style-name="List_20_Paragraph" style:list-style-name="WWNum1">
      <style:paragraph-properties fo:margin-left="1.528cm" fo:margin-right="1.155cm" fo:text-indent="0cm" style:auto-text-indent="false">
        <style:tab-stops>
          <style:tab-stop style:position="2.776cm"/>
          <style:tab-stop style:position="2.778cm"/>
        </style:tab-stops>
      </style:paragraph-properties>
    </style:style>
    <style:style style:name="P352" style:family="paragraph" style:parent-style-name="List_20_Paragraph" style:list-style-name="WWNum1">
      <style:paragraph-properties fo:margin-left="1.528cm" fo:margin-right="1.125cm" fo:text-indent="0cm" style:auto-text-indent="false">
        <style:tab-stops>
          <style:tab-stop style:position="2.776cm"/>
          <style:tab-stop style:position="2.778cm"/>
        </style:tab-stops>
      </style:paragraph-properties>
    </style:style>
    <style:style style:name="P353" style:family="paragraph" style:parent-style-name="List_20_Paragraph" style:list-style-name="WWNum1" style:master-page-name="Converted26">
      <style:paragraph-properties fo:margin-left="1.528cm" fo:margin-right="1.125cm" fo:margin-top="0.056cm" fo:margin-bottom="0cm" style:contextual-spacing="false" fo:text-indent="0cm" style:auto-text-indent="false" style:page-number="auto">
        <style:tab-stops>
          <style:tab-stop style:position="2.776cm"/>
          <style:tab-stop style:position="2.778cm"/>
        </style:tab-stops>
      </style:paragraph-properties>
    </style:style>
    <style:style style:name="P354" style:family="paragraph" style:parent-style-name="List_20_Paragraph" style:list-style-name="WWNum1" style:master-page-name="Converted27">
      <style:paragraph-properties fo:margin-left="1.528cm" fo:margin-right="1.125cm" fo:margin-top="0.056cm" fo:margin-bottom="0cm" style:contextual-spacing="false" fo:text-indent="0cm" style:auto-text-indent="false" style:page-number="auto">
        <style:tab-stops>
          <style:tab-stop style:position="2.778cm"/>
        </style:tab-stops>
      </style:paragraph-properties>
    </style:style>
    <style:style style:name="P355" style:family="paragraph" style:parent-style-name="List_20_Paragraph" style:list-style-name="WWNum1">
      <style:paragraph-properties fo:margin-left="1.528cm" fo:margin-right="1.214cm" fo:text-indent="0cm" style:auto-text-indent="false">
        <style:tab-stops>
          <style:tab-stop style:position="2.776cm"/>
          <style:tab-stop style:position="2.778cm"/>
        </style:tab-stops>
      </style:paragraph-properties>
    </style:style>
    <style:style style:name="P356" style:family="paragraph" style:parent-style-name="List_20_Paragraph" style:list-style-name="WWNum1">
      <style:paragraph-properties fo:margin-left="1.528cm" fo:margin-right="1.214cm" fo:line-height="100%" fo:text-indent="0cm" style:auto-text-indent="false">
        <style:tab-stops>
          <style:tab-stop style:position="2.776cm"/>
          <style:tab-stop style:position="2.778cm"/>
        </style:tab-stops>
      </style:paragraph-properties>
    </style:style>
    <style:style style:name="P357" style:family="paragraph" style:parent-style-name="List_20_Paragraph" style:list-style-name="WWNum1">
      <style:paragraph-properties fo:margin-left="1.528cm" fo:margin-right="1.214cm" fo:line-height="100%" fo:text-indent="0cm" style:auto-text-indent="false">
        <style:tab-stops>
          <style:tab-stop style:position="2.778cm"/>
        </style:tab-stops>
      </style:paragraph-properties>
    </style:style>
    <style:style style:name="P358" style:family="paragraph" style:parent-style-name="List_20_Paragraph" style:list-style-name="WWNum1">
      <style:paragraph-properties fo:margin-left="1.528cm" fo:margin-right="0.951cm" fo:text-indent="0cm" style:auto-text-indent="false">
        <style:tab-stops>
          <style:tab-stop style:position="2.776cm"/>
          <style:tab-stop style:position="2.778cm"/>
        </style:tab-stops>
      </style:paragraph-properties>
    </style:style>
    <style:style style:name="P359" style:family="paragraph" style:parent-style-name="List_20_Paragraph" style:list-style-name="WWNum1">
      <style:paragraph-properties fo:margin-left="1.528cm" fo:margin-right="1.041cm" fo:text-indent="0cm" style:auto-text-indent="false">
        <style:tab-stops>
          <style:tab-stop style:position="2.776cm"/>
          <style:tab-stop style:position="2.778cm"/>
        </style:tab-stops>
      </style:paragraph-properties>
    </style:style>
    <style:style style:name="P360" style:family="paragraph" style:parent-style-name="List_20_Paragraph" style:list-style-name="WWNum1">
      <style:paragraph-properties fo:margin-left="1.528cm" fo:margin-right="0.739cm" fo:text-indent="0cm" style:auto-text-indent="false">
        <style:tab-stops>
          <style:tab-stop style:position="2.776cm"/>
          <style:tab-stop style:position="2.778cm"/>
        </style:tab-stops>
      </style:paragraph-properties>
    </style:style>
    <style:style style:name="P361" style:family="paragraph" style:parent-style-name="List_20_Paragraph" style:list-style-name="WWNum1">
      <style:paragraph-properties fo:margin-left="1.528cm" fo:margin-right="0.739cm" fo:margin-top="0.002cm" fo:margin-bottom="0cm" style:contextual-spacing="false" fo:text-indent="0cm" style:auto-text-indent="false">
        <style:tab-stops>
          <style:tab-stop style:position="2.776cm"/>
          <style:tab-stop style:position="2.778cm"/>
        </style:tab-stops>
      </style:paragraph-properties>
    </style:style>
    <style:style style:name="P362" style:family="paragraph" style:parent-style-name="List_20_Paragraph" style:list-style-name="WWNum1">
      <style:paragraph-properties fo:margin-left="1.528cm" fo:margin-right="1.217cm" fo:margin-top="0.002cm" fo:margin-bottom="0cm" style:contextual-spacing="false" fo:text-indent="0cm" style:auto-text-indent="false">
        <style:tab-stops>
          <style:tab-stop style:position="2.873cm"/>
          <style:tab-stop style:position="2.875cm"/>
        </style:tab-stops>
      </style:paragraph-properties>
    </style:style>
    <style:style style:name="P363" style:family="paragraph" style:parent-style-name="List_20_Paragraph" style:list-style-name="WWNum1">
      <style:paragraph-properties fo:margin-left="1.528cm" fo:margin-right="0.725cm" fo:line-height="100%" fo:text-indent="0cm" style:auto-text-indent="false">
        <style:tab-stops>
          <style:tab-stop style:position="2.873cm"/>
          <style:tab-stop style:position="2.875cm"/>
        </style:tab-stops>
      </style:paragraph-properties>
    </style:style>
    <style:style style:name="P364" style:family="paragraph" style:parent-style-name="List_20_Paragraph" style:list-style-name="WWNum1">
      <style:paragraph-properties fo:margin-left="1.528cm" fo:margin-right="0.725cm" fo:text-align="justify" style:justify-single-word="false" fo:text-indent="0cm" style:auto-text-indent="false">
        <style:tab-stops>
          <style:tab-stop style:position="2.778cm"/>
        </style:tab-stops>
      </style:paragraph-properties>
    </style:style>
    <style:style style:name="P365" style:family="paragraph" style:parent-style-name="List_20_Paragraph" style:list-style-name="WWNum1">
      <style:paragraph-properties fo:margin-left="1.528cm" fo:margin-right="0.725cm" fo:margin-top="0.002cm" fo:margin-bottom="0cm" style:contextual-spacing="false" fo:text-align="justify" style:justify-single-word="false" fo:text-indent="0cm" style:auto-text-indent="false">
        <style:tab-stops>
          <style:tab-stop style:position="2.778cm"/>
        </style:tab-stops>
      </style:paragraph-properties>
    </style:style>
    <style:style style:name="P366" style:family="paragraph" style:parent-style-name="List_20_Paragraph" style:list-style-name="WWNum1">
      <style:paragraph-properties fo:margin-left="1.528cm" fo:margin-right="0.953cm" fo:text-indent="0cm" style:auto-text-indent="false">
        <style:tab-stops>
          <style:tab-stop style:position="2.776cm"/>
          <style:tab-stop style:position="2.778cm"/>
        </style:tab-stops>
      </style:paragraph-properties>
    </style:style>
    <style:style style:name="P367" style:family="paragraph" style:parent-style-name="List_20_Paragraph" style:list-style-name="WWNum1">
      <style:paragraph-properties fo:margin-left="1.528cm" fo:margin-right="1.053cm" fo:text-indent="0cm" style:auto-text-indent="false">
        <style:tab-stops>
          <style:tab-stop style:position="2.776cm"/>
          <style:tab-stop style:position="2.778cm"/>
        </style:tab-stops>
      </style:paragraph-properties>
    </style:style>
    <style:style style:name="P368" style:family="paragraph" style:parent-style-name="List_20_Paragraph" style:list-style-name="WWNum1">
      <style:paragraph-properties fo:margin-left="1.528cm" fo:margin-right="1.053cm" fo:text-indent="0cm" style:auto-text-indent="false">
        <style:tab-stops>
          <style:tab-stop style:position="2.778cm"/>
        </style:tab-stops>
      </style:paragraph-properties>
    </style:style>
    <style:style style:name="P369" style:family="paragraph" style:parent-style-name="List_20_Paragraph" style:list-style-name="WWNum1">
      <style:paragraph-properties fo:margin-left="1.528cm" fo:margin-right="0.72cm" fo:text-align="justify" style:justify-single-word="false" fo:text-indent="0cm" style:auto-text-indent="false">
        <style:tab-stops>
          <style:tab-stop style:position="2.778cm"/>
        </style:tab-stops>
      </style:paragraph-properties>
    </style:style>
    <style:style style:name="P370" style:family="paragraph" style:parent-style-name="Text_20_body" style:master-page-name="Standard">
      <style:paragraph-properties fo:margin-left="7.186cm" fo:margin-right="0cm" fo:text-indent="0cm" style:auto-text-indent="false" style:page-number="auto"/>
    </style:style>
    <style:style style:name="P371" style:family="paragraph" style:parent-style-name="Text_20_body">
      <style:paragraph-properties fo:margin-left="1.549cm" fo:margin-right="0cm" fo:text-indent="0cm" style:auto-text-indent="false"/>
      <style:text-properties fo:font-size="4pt" style:font-size-asian="4pt"/>
    </style:style>
    <style:style style:name="P372" style:family="paragraph" style:parent-style-name="Text_20_body" style:master-page-name="Converted12">
      <style:paragraph-properties fo:margin-left="1.549cm" fo:margin-right="0cm" fo:margin-top="0.056cm" fo:margin-bottom="0cm" style:contextual-spacing="false" fo:text-indent="0cm" style:auto-text-indent="false" style:page-number="auto"/>
    </style:style>
    <style:style style:name="P373" style:family="paragraph" style:parent-style-name="Text_20_body" style:master-page-name="Converted7">
      <style:paragraph-properties fo:margin-left="0.279cm" fo:margin-right="0.728cm" fo:margin-top="0.056cm" fo:margin-bottom="0cm" style:contextual-spacing="false" fo:text-align="justify" style:justify-single-word="false" fo:text-indent="1.501cm" style:auto-text-indent="false" style:page-number="auto"/>
    </style:style>
    <style:style style:name="P374" style:family="paragraph" style:parent-style-name="Text_20_body" style:master-page-name="Converted11">
      <style:paragraph-properties style:page-number="auto"/>
    </style:style>
    <style:style style:name="P375" style:family="paragraph" style:parent-style-name="Text_20_body" style:master-page-name="Converted13">
      <style:paragraph-properties fo:margin-left="0.279cm" fo:margin-right="0.723cm" fo:margin-top="0.053cm" fo:margin-bottom="0cm" style:contextual-spacing="false" fo:line-height="108%" fo:text-align="justify" style:justify-single-word="false" fo:text-indent="0cm" style:auto-text-indent="false" style:page-number="auto"/>
    </style:style>
    <style:style style:name="P376" style:family="paragraph" style:parent-style-name="Text_20_body" style:master-page-name="Converted20">
      <style:paragraph-properties fo:margin-left="0.279cm" fo:margin-right="0.605cm" fo:margin-top="0.056cm" fo:margin-bottom="0cm" style:contextual-spacing="false" fo:text-indent="1.247cm" style:auto-text-indent="false" style:page-number="auto"/>
    </style:style>
    <style:style style:name="P377" style:family="paragraph" style:parent-style-name="Text_20_body" style:master-page-name="Converted28">
      <style:paragraph-properties style:page-number="auto"/>
      <style:text-properties fo:font-size="10pt" style:font-size-asian="10pt"/>
    </style:style>
    <style:style style:name="P378" style:family="paragraph" style:parent-style-name="Text_20_body">
      <style:paragraph-properties fo:margin-top="0.019cm" fo:margin-bottom="0cm" style:contextual-spacing="false"/>
      <style:text-properties fo:font-size="11.5pt" style:font-size-asian="11.5pt"/>
    </style:style>
    <style:style style:name="P379" style:family="paragraph" style:parent-style-name="Text_20_body">
      <style:paragraph-properties fo:margin-left="1.632cm" fo:margin-right="0.813cm" fo:text-align="center" style:justify-single-word="false" fo:text-indent="0cm" style:auto-text-indent="false"/>
    </style:style>
    <style:style style:name="P380" style:family="paragraph" style:parent-style-name="Text_20_body">
      <style:paragraph-properties fo:margin-left="1.632cm" fo:margin-right="0.813cm" fo:margin-top="0.002cm" fo:margin-bottom="0cm" style:contextual-spacing="false" fo:text-align="center" style:justify-single-word="false" fo:text-indent="0cm" style:auto-text-indent="false"/>
    </style:style>
    <style:style style:name="P381" style:family="paragraph" style:parent-style-name="Text_20_body">
      <style:paragraph-properties fo:margin-top="0.018cm" fo:margin-bottom="0cm" style:contextual-spacing="false"/>
      <style:text-properties fo:font-size="12pt" style:font-size-asian="10.5pt" style:font-size-complex="12pt"/>
    </style:style>
    <style:style style:name="P382" style:family="paragraph" style:parent-style-name="Text_20_body">
      <style:paragraph-properties fo:margin-top="0.009cm" fo:margin-bottom="0cm" style:contextual-spacing="false"/>
      <style:text-properties fo:font-size="12pt" style:font-size-asian="10.5pt" style:font-size-complex="12pt"/>
    </style:style>
    <style:style style:name="P383" style:family="paragraph">
      <loext:graphic-properties draw:fill="solid" draw:fill-color="#ffffff"/>
      <style:paragraph-properties fo:text-align="center"/>
    </style:style>
    <style:style style:name="P384" style:family="paragraph">
      <loext:graphic-properties draw:fill="none"/>
      <style:paragraph-properties fo:text-align="center"/>
    </style:style>
    <style:style style:name="T1" style:family="text">
      <style:text-properties fo:letter-spacing="-0.005cm"/>
    </style:style>
    <style:style style:name="T2" style:family="text">
      <style:text-properties fo:letter-spacing="-0.004cm"/>
    </style:style>
    <style:style style:name="T3" style:family="text">
      <style:text-properties fo:font-size="12pt" fo:font-weight="bold" style:font-size-asian="12pt" style:font-weight-asian="bold"/>
    </style:style>
    <style:style style:name="T4" style:family="text">
      <style:text-properties fo:font-size="12pt" style:font-size-asian="12pt"/>
    </style:style>
    <style:style style:name="T5" style:family="text">
      <style:text-properties fo:font-size="12pt" fo:font-style="italic" style:font-size-asian="12pt" style:font-style-asian="italic"/>
    </style:style>
    <style:style style:name="T6" style:family="text">
      <style:text-properties fo:font-size="12pt" fo:font-style="italic" fo:font-weight="bold" style:font-size-asian="12pt" style:font-style-asian="italic" style:font-weight-asian="bold"/>
    </style:style>
    <style:style style:name="T7" style:family="text">
      <style:text-properties fo:font-size="12pt" fo:letter-spacing="-0.018cm" fo:font-style="italic" style:font-size-asian="12pt" style:font-style-asian="italic"/>
    </style:style>
    <style:style style:name="T8" style:family="text">
      <style:text-properties fo:font-size="12pt" fo:letter-spacing="-0.018cm" style:font-size-asian="12pt"/>
    </style:style>
    <style:style style:name="T9" style:family="text">
      <style:text-properties fo:font-size="12pt" fo:letter-spacing="-0.018cm" fo:font-weight="bold" style:font-size-asian="12pt" style:font-weight-asian="bold"/>
    </style:style>
    <style:style style:name="T10" style:family="text">
      <style:text-properties fo:font-size="12pt" fo:letter-spacing="-0.012cm" fo:font-style="italic" style:font-size-asian="12pt" style:font-style-asian="italic"/>
    </style:style>
    <style:style style:name="T11" style:family="text">
      <style:text-properties fo:font-size="12pt" fo:letter-spacing="-0.012cm" style:font-size-asian="12pt"/>
    </style:style>
    <style:style style:name="T12" style:family="text">
      <style:text-properties fo:font-size="12pt" fo:letter-spacing="-0.012cm" fo:font-weight="bold" style:font-size-asian="12pt" style:font-weight-asian="bold"/>
    </style:style>
    <style:style style:name="T13" style:family="text">
      <style:text-properties fo:font-size="12pt" fo:letter-spacing="-0.016cm" fo:font-style="italic" style:font-size-asian="12pt" style:font-style-asian="italic"/>
    </style:style>
    <style:style style:name="T14" style:family="text">
      <style:text-properties fo:font-size="12pt" fo:letter-spacing="-0.016cm" style:font-size-asian="12pt"/>
    </style:style>
    <style:style style:name="T15" style:family="text">
      <style:text-properties fo:font-size="12pt" fo:letter-spacing="-0.016cm" fo:font-weight="bold" style:font-size-asian="12pt" style:font-weight-asian="bold"/>
    </style:style>
    <style:style style:name="T16" style:family="text">
      <style:text-properties fo:font-size="12pt" fo:letter-spacing="-0.011cm" fo:font-style="italic" style:font-size-asian="12pt" style:font-style-asian="italic"/>
    </style:style>
    <style:style style:name="T17" style:family="text">
      <style:text-properties fo:font-size="12pt" fo:letter-spacing="-0.011cm" style:font-size-asian="12pt"/>
    </style:style>
    <style:style style:name="T18" style:family="text">
      <style:text-properties fo:font-size="12pt" fo:letter-spacing="-0.011cm" fo:font-weight="bold" style:font-size-asian="12pt" style:font-weight-asian="bold"/>
    </style:style>
    <style:style style:name="T19" style:family="text">
      <style:text-properties fo:font-size="12pt" fo:letter-spacing="-0.014cm" fo:font-style="italic" style:font-size-asian="12pt" style:font-style-asian="italic"/>
    </style:style>
    <style:style style:name="T20" style:family="text">
      <style:text-properties fo:font-size="12pt" fo:letter-spacing="-0.014cm" style:font-size-asian="12pt"/>
    </style:style>
    <style:style style:name="T21" style:family="text">
      <style:text-properties fo:font-size="12pt" fo:letter-spacing="-0.014cm" fo:font-weight="bold" style:font-size-asian="12pt" style:font-weight-asian="bold"/>
    </style:style>
    <style:style style:name="T22" style:family="text">
      <style:text-properties fo:font-size="12pt" fo:letter-spacing="-0.005cm" fo:font-style="italic" style:font-size-asian="12pt" style:font-style-asian="italic"/>
    </style:style>
    <style:style style:name="T23" style:family="text">
      <style:text-properties fo:font-size="12pt" fo:letter-spacing="-0.005cm" style:font-size-asian="12pt"/>
    </style:style>
    <style:style style:name="T24" style:family="text">
      <style:text-properties fo:font-size="12pt" fo:letter-spacing="-0.005cm" fo:font-weight="bold" style:font-size-asian="12pt" style:font-weight-asian="bold"/>
    </style:style>
    <style:style style:name="T25" style:family="text">
      <style:text-properties fo:font-size="12pt" fo:letter-spacing="-0.019cm" fo:font-style="italic" style:font-size-asian="12pt" style:font-style-asian="italic"/>
    </style:style>
    <style:style style:name="T26" style:family="text">
      <style:text-properties fo:font-size="12pt" fo:letter-spacing="-0.019cm" style:font-size-asian="12pt"/>
    </style:style>
    <style:style style:name="T27" style:family="text">
      <style:text-properties fo:font-size="12pt" fo:letter-spacing="-0.019cm" fo:font-weight="bold" style:font-size-asian="12pt" style:font-weight-asian="bold"/>
    </style:style>
    <style:style style:name="T28" style:family="text">
      <style:text-properties fo:font-size="12pt" fo:letter-spacing="-0.002cm" fo:font-style="italic" style:font-size-asian="12pt" style:font-style-asian="italic"/>
    </style:style>
    <style:style style:name="T29" style:family="text">
      <style:text-properties fo:font-size="12pt" fo:letter-spacing="-0.002cm" style:font-size-asian="12pt"/>
    </style:style>
    <style:style style:name="T30" style:family="text">
      <style:text-properties fo:font-size="12pt" fo:letter-spacing="-0.009cm" fo:font-style="italic" style:font-size-asian="12pt" style:font-style-asian="italic"/>
    </style:style>
    <style:style style:name="T31" style:family="text">
      <style:text-properties fo:font-size="12pt" fo:letter-spacing="-0.009cm" style:font-size-asian="12pt"/>
    </style:style>
    <style:style style:name="T32" style:family="text">
      <style:text-properties fo:font-size="12pt" fo:letter-spacing="-0.009cm" fo:font-weight="bold" style:font-size-asian="12pt" style:font-weight-asian="bold"/>
    </style:style>
    <style:style style:name="T33" style:family="text">
      <style:text-properties fo:font-size="12pt" fo:letter-spacing="-0.004cm" fo:font-style="italic" style:font-size-asian="12pt" style:font-style-asian="italic"/>
    </style:style>
    <style:style style:name="T34" style:family="text">
      <style:text-properties fo:font-size="12pt" fo:letter-spacing="-0.004cm" fo:font-style="italic" fo:font-weight="bold" style:font-size-asian="12pt" style:font-style-asian="italic" style:font-weight-asian="bold"/>
    </style:style>
    <style:style style:name="T35" style:family="text">
      <style:text-properties fo:font-size="12pt" fo:letter-spacing="-0.004cm" style:font-size-asian="12pt"/>
    </style:style>
    <style:style style:name="T36" style:family="text">
      <style:text-properties fo:font-size="12pt" fo:letter-spacing="-0.004cm" fo:font-weight="bold" style:font-size-asian="12pt" style:font-weight-asian="bold"/>
    </style:style>
    <style:style style:name="T37" style:family="text">
      <style:text-properties fo:font-size="12pt" fo:letter-spacing="-0.007cm" fo:font-style="italic" style:font-size-asian="12pt" style:font-style-asian="italic"/>
    </style:style>
    <style:style style:name="T38" style:family="text">
      <style:text-properties fo:font-size="12pt" fo:letter-spacing="-0.007cm" style:font-size-asian="12pt"/>
    </style:style>
    <style:style style:name="T39" style:family="text">
      <style:text-properties fo:font-size="12pt" fo:letter-spacing="-0.007cm" fo:font-weight="bold" style:font-size-asian="12pt" style:font-weight-asian="bold"/>
    </style:style>
    <style:style style:name="T40" style:family="text">
      <style:text-properties fo:font-size="12pt" fo:letter-spacing="0.004cm" style:font-size-asian="12pt"/>
    </style:style>
    <style:style style:name="T41" style:family="text">
      <style:text-properties fo:font-size="12pt" fo:letter-spacing="0.004cm" fo:font-style="italic" style:font-size-asian="12pt" style:font-style-asian="italic"/>
    </style:style>
    <style:style style:name="T42" style:family="text">
      <style:text-properties fo:font-size="12pt" fo:letter-spacing="-0.032cm" style:font-size-asian="12pt"/>
    </style:style>
    <style:style style:name="T43" style:family="text">
      <style:text-properties fo:font-size="12pt" fo:letter-spacing="-0.026cm" style:font-size-asian="12pt"/>
    </style:style>
    <style:style style:name="T44" style:family="text">
      <style:text-properties fo:font-size="12pt" fo:letter-spacing="-0.026cm" fo:font-style="italic" style:font-size-asian="12pt" style:font-style-asian="italic"/>
    </style:style>
    <style:style style:name="T45" style:family="text">
      <style:text-properties fo:font-size="12pt" fo:letter-spacing="-0.03cm" style:font-size-asian="12pt"/>
    </style:style>
    <style:style style:name="T46" style:family="text">
      <style:text-properties fo:font-size="12pt" fo:letter-spacing="-0.023cm" style:font-size-asian="12pt"/>
    </style:style>
    <style:style style:name="T47" style:family="text">
      <style:text-properties fo:font-size="12pt" fo:letter-spacing="-0.023cm" fo:font-style="italic" style:font-size-asian="12pt" style:font-style-asian="italic"/>
    </style:style>
    <style:style style:name="T48" style:family="text">
      <style:text-properties fo:font-size="12pt" fo:letter-spacing="-0.023cm" fo:font-weight="bold" style:font-size-asian="12pt" style:font-weight-asian="bold"/>
    </style:style>
    <style:style style:name="T49" style:family="text">
      <style:text-properties fo:font-size="12pt" fo:letter-spacing="-0.025cm" style:font-size-asian="12pt"/>
    </style:style>
    <style:style style:name="T50" style:family="text">
      <style:text-properties fo:font-size="12pt" fo:letter-spacing="-0.025cm" fo:font-style="italic" style:font-size-asian="12pt" style:font-style-asian="italic"/>
    </style:style>
    <style:style style:name="T51" style:family="text">
      <style:text-properties fo:font-size="12pt" fo:letter-spacing="-0.028cm" style:font-size-asian="12pt"/>
    </style:style>
    <style:style style:name="T52" style:family="text">
      <style:text-properties fo:font-size="12pt" fo:letter-spacing="-0.021cm" fo:font-style="italic" style:font-size-asian="12pt" style:font-style-asian="italic"/>
    </style:style>
    <style:style style:name="T53" style:family="text">
      <style:text-properties fo:font-size="12pt" fo:letter-spacing="-0.021cm" style:font-size-asian="12pt"/>
    </style:style>
    <style:style style:name="T54" style:family="text">
      <style:text-properties fo:font-size="12pt" fo:letter-spacing="-0.021cm" fo:font-weight="bold" style:font-size-asian="12pt" style:font-weight-asian="bold"/>
    </style:style>
    <style:style style:name="T55" style:family="text">
      <style:text-properties fo:font-size="12pt" fo:letter-spacing="-0.039cm" style:font-size-asian="12pt"/>
    </style:style>
    <style:style style:name="T56" style:family="text">
      <style:text-properties fo:font-size="12pt" fo:letter-spacing="0.002cm" style:font-size-asian="12pt"/>
    </style:style>
    <style:style style:name="T57" style:family="text">
      <style:text-properties fo:font-size="12pt" fo:letter-spacing="0.002cm" fo:font-style="italic" style:font-size-asian="12pt" style:font-style-asian="italic"/>
    </style:style>
    <style:style style:name="T58" style:family="text">
      <style:text-properties fo:font-size="12pt" fo:letter-spacing="0.002cm" fo:font-weight="bold" style:font-size-asian="12pt" style:font-weight-asian="bold"/>
    </style:style>
    <style:style style:name="T59" style:family="text">
      <style:text-properties fo:font-size="12pt" fo:letter-spacing="-0.06cm" style:font-size-asian="12pt"/>
    </style:style>
    <style:style style:name="T60" style:family="text">
      <style:text-properties fo:font-size="12pt" fo:letter-spacing="-0.046cm" style:font-size-asian="12pt"/>
    </style:style>
    <style:style style:name="T61" style:family="text">
      <style:text-properties fo:font-size="12pt" fo:letter-spacing="-0.065cm" style:font-size-asian="12pt"/>
    </style:style>
    <style:style style:name="T62" style:family="text">
      <style:text-properties fo:font-size="12pt" fo:letter-spacing="-0.055cm" style:font-size-asian="12pt"/>
    </style:style>
    <style:style style:name="T63" style:family="text">
      <style:text-properties fo:letter-spacing="0.099cm"/>
    </style:style>
    <style:style style:name="T64" style:family="text">
      <style:text-properties fo:letter-spacing="-0.018cm"/>
    </style:style>
    <style:style style:name="T65" style:family="text">
      <style:text-properties fo:letter-spacing="-0.018cm" style:text-underline-style="solid" style:text-underline-width="auto" style:text-underline-color="font-color"/>
    </style:style>
    <style:style style:name="T66" style:family="text">
      <style:text-properties fo:letter-spacing="0.011cm"/>
    </style:style>
    <style:style style:name="T67" style:family="text">
      <style:text-properties fo:letter-spacing="-0.011cm"/>
    </style:style>
    <style:style style:name="T68" style:family="text">
      <style:text-properties fo:letter-spacing="0.007cm"/>
    </style:style>
    <style:style style:name="T69" style:family="text">
      <style:text-properties fo:letter-spacing="-0.014cm"/>
    </style:style>
    <style:style style:name="T70" style:family="text">
      <style:text-properties fo:letter-spacing="0.018cm"/>
    </style:style>
    <style:style style:name="T71" style:family="text">
      <style:text-properties fo:letter-spacing="-0.021cm"/>
    </style:style>
    <style:style style:name="T72" style:family="text">
      <style:text-properties fo:font-size="14pt" style:font-size-asian="14pt"/>
    </style:style>
    <style:style style:name="T73" style:family="text">
      <style:text-properties fo:letter-spacing="-0.019cm"/>
    </style:style>
    <style:style style:name="T74" style:family="text">
      <style:text-properties fo:letter-spacing="-0.007cm"/>
    </style:style>
    <style:style style:name="T75" style:family="text">
      <style:text-properties fo:letter-spacing="-0.002cm"/>
    </style:style>
    <style:style style:name="T76" style:family="text">
      <style:text-properties fo:letter-spacing="-0.012cm"/>
    </style:style>
    <style:style style:name="T77" style:family="text">
      <style:text-properties fo:font-size="8pt" style:font-size-asian="8pt"/>
    </style:style>
    <style:style style:name="T78" style:family="text">
      <style:text-properties fo:font-size="8pt" fo:letter-spacing="-0.016cm" style:font-size-asian="8pt"/>
    </style:style>
    <style:style style:name="T79" style:family="text">
      <style:text-properties fo:letter-spacing="0.046cm"/>
    </style:style>
    <style:style style:name="T80" style:family="text">
      <style:text-properties fo:letter-spacing="0.049cm"/>
    </style:style>
    <style:style style:name="T81" style:family="text">
      <style:text-properties fo:letter-spacing="0.048cm"/>
    </style:style>
    <style:style style:name="T82" style:family="text">
      <style:text-properties fo:letter-spacing="-0.023cm"/>
    </style:style>
    <style:style style:name="T83" style:family="text">
      <style:text-properties fo:letter-spacing="-0.023cm" style:text-underline-style="solid" style:text-underline-width="auto" style:text-underline-color="font-color"/>
    </style:style>
    <style:style style:name="T84" style:family="text">
      <style:text-properties fo:letter-spacing="-0.025cm"/>
    </style:style>
    <style:style style:name="T85" style:family="text">
      <style:text-properties fo:letter-spacing="-0.025cm" style:text-underline-style="solid" style:text-underline-width="auto" style:text-underline-color="font-color"/>
    </style:style>
    <style:style style:name="T86" style:family="text">
      <style:text-properties fo:letter-spacing="-0.026cm"/>
    </style:style>
    <style:style style:name="T87" style:family="text">
      <style:text-properties fo:letter-spacing="-0.028cm"/>
    </style:style>
    <style:style style:name="T88" style:family="text">
      <style:text-properties fo:letter-spacing="-0.016cm"/>
    </style:style>
    <style:style style:name="T89" style:family="text">
      <style:text-properties fo:letter-spacing="-0.016cm" style:text-underline-style="solid" style:text-underline-width="auto" style:text-underline-color="font-color"/>
    </style:style>
    <style:style style:name="T90" style:family="text">
      <style:text-properties fo:letter-spacing="-0.044cm"/>
    </style:style>
    <style:style style:name="T91" style:family="text">
      <style:text-properties style:text-underline-style="solid" style:text-underline-width="auto" style:text-underline-color="font-color"/>
    </style:style>
    <style:style style:name="T92" style:family="text">
      <style:text-properties fo:letter-spacing="-0.009cm"/>
    </style:style>
    <style:style style:name="T93" style:family="text">
      <style:text-properties style:text-position="super 58%"/>
    </style:style>
    <style:style style:name="T94" style:family="text">
      <style:text-properties fo:font-style="italic" style:font-style-asian="italic"/>
    </style:style>
    <style:style style:name="T95" style:family="text">
      <style:text-properties fo:letter-spacing="0.004cm"/>
    </style:style>
    <style:style style:name="T96" style:family="text">
      <style:text-properties fo:letter-spacing="-0.03cm"/>
    </style:style>
    <style:style style:name="T97" style:family="text">
      <style:text-properties fo:letter-spacing="0.002cm"/>
    </style:style>
    <style:style style:name="T98" style:family="text">
      <style:text-properties fo:letter-spacing="-0.041cm"/>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132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4676*" fo:start-indent="0cm" fo:end-indent="0.035cm"/>
          <style:column style:rel-width="60859*" fo:start-indent="0.035cm" fo:end-indent="0cm"/>
        </style:columns>
      </style:section-properties>
    </style:style>
    <style:style style:name="gr1" style:family="graphic">
      <style:graphic-properties draw:stroke="solid" svg:stroke-width="0cm" svg:stroke-color="#a4a4a4"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18cm" svg:stroke-color="#a4a4a4" draw:stroke-linejoin="round" svg:stroke-linecap="butt" draw:fill="none" draw:textarea-horizontal-align="center" draw:textarea-vertical-align="top" draw:auto-grow-height="false" fo:padding-top="0.009cm" fo:padding-bottom="0.009cm" fo:padding-left="0.009cm" fo:padding-right="0.009cm"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3" style:family="graphic">
      <style:graphic-properties draw:stroke="solid" svg:stroke-width="0cm" svg:stroke-color="#a4a4a4" draw:stroke-linejoin="round" svg:stroke-linecap="butt" draw:fill="solid" draw:fill-color="#ffffff"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70"><draw:frame draw:style-name="fr5" draw:name="image1.png" text:anchor-type="as-char" svg:width="2.729cm" svg:height="2.882cm" draw:z-index="3"><draw:image xlink:href="Pictures/10000201000000D6000000E35B8EF9969AD9916F.png" xlink:type="simple" xlink:show="embed" xlink:actuate="onLoad" draw:mime-type="image/png"/></draw:frame></text:p>
        <text:p text:style-name="P75"/>
        <text:h text:style-name="P33" text:outline-level="1">MINISTÉRIO DOS TRANSPORTES, PORTOS E AVIAÇÃO CIVIL</text:h>
        <text:p text:style-name="P194">Secretaria Nacional de Aviação Civil</text:p>
        <text:p text:style-name="P195">COMISSÃO NACIONAL DE AUTORIDADES AEROPORTUÁRIAS</text:p>
        <text:p text:style-name="P196">Comitê Técnico de Desempenho Operacional</text:p>
        <text:p text:style-name="P6"/>
        <text:p text:style-name="P6"/>
        <text:p text:style-name="P6"/>
        <text:p text:style-name="P6"/>
        <text:p text:style-name="P6"/>
        <text:p text:style-name="P6"/>
        <text:p text:style-name="P6"/>
        <text:p text:style-name="P6"/>
        <text:p text:style-name="P81"/>
        <text:p text:style-name="P193">PESQUISA DE DESEMPENHO OPERACIONAL E SATISFAÇÃO DO PASSAGEIRO</text:p>
        <text:p text:style-name="P8"/>
        <text:p text:style-name="P88"/>
        <text:p text:style-name="P197">METODOLOGIA</text:p>
        <text:p text:style-name="P9"/>
        <text:p text:style-name="P9"/>
        <text:p text:style-name="P9"/>
        <text:p text:style-name="P9"/>
        <text:p text:style-name="P9"/>
        <text:p text:style-name="P82"/>
        <text:p text:style-name="P35">Versão 0.0 - Setembro de 2018</text:p>
      </text:section>
      <text:h text:style-name="P233" text:outline-level="3"><draw:frame draw:style-name="fr3" draw:name="image2.png" text:anchor-type="char" svg:x="2.501cm" svg:y="0.455cm" svg:width="8.146cm" svg:height="2.355cm" draw:z-index="26"><draw:image xlink:href="Pictures/10000201000001E10000008BD8AF43848D48AD20.png" xlink:type="simple" xlink:show="embed" xlink:actuate="onLoad" draw:mime-type="image/png"/></draw:frame><draw:line text:anchor-type="char" draw:z-index="24" draw:name="Forma1" draw:style-name="gr1" draw:text-style-name="P383" svg:x1="2.542cm" svg:y1="0.305cm" svg:x2="3.63cm" svg:y2="0.305cm"><text:p/></draw:line><draw:line text:anchor-type="char" draw:z-index="1" draw:name="Forma2" draw:style-name="gr3" draw:text-style-name="P383" svg:x1="9.708cm" svg:y1="0.305cm" svg:x2="12.066cm" svg:y2="0.305cm"><text:p/></draw:line><draw:line text:anchor-type="char" draw:z-index="25" draw:name="Forma3" draw:style-name="gr1" draw:text-style-name="P383" svg:x1="17.508cm" svg:y1="0.305cm" svg:x2="18.746cm" svg:y2="0.305cm"><text:p/></draw:line>COORDENAÇÃO<text:span text:style-name="T1"> </text:span>DA<text:span text:style-name="T2"> </text:span>PESQUISA<text:tab/>EXECUÇÃO DAS COLETAS</text:h>
      <text:p text:style-name="P3"/>
      <text:p text:style-name="P92"><draw:frame draw:style-name="fr4" draw:name="image3.jpeg" text:anchor-type="char" svg:x="13.238cm" svg:y="0.601cm" svg:width="3.588cm" svg:height="0.982cm" draw:z-index="27"><draw:image xlink:href="Pictures/10000000000000D40000003A355FED38DE54F5C9.jpg" xlink:type="simple" xlink:show="embed" xlink:actuate="onLoad" draw:mime-type="image/jpeg"/></draw:frame></text:p>
      <text:p text:style-name="P10"/>
      <text:p text:style-name="P10"/>
      <text:p text:style-name="P198"><draw:line text:anchor-type="char" draw:z-index="20" draw:name="Forma4" draw:style-name="gr1" draw:text-style-name="P383" svg:x1="2.39cm" svg:y1="0.566cm" svg:x2="8.648cm" svg:y2="0.577cm"><text:p/></draw:line><draw:line text:anchor-type="char" draw:z-index="21" draw:name="Forma5" draw:style-name="gr1" draw:text-style-name="P383" svg:x1="12.652cm" svg:y1="0.566cm" svg:x2="18.91cm" svg:y2="0.577cm"><text:p/></draw:line>COLABORADORES</text:p>
      <text:p text:style-name="P3"/>
      <text:p text:style-name="P101"><draw:frame draw:style-name="fr4" draw:name="image4.jpeg" text:anchor-type="char" svg:x="4.374cm" svg:y="0.695cm" svg:width="2.942cm" svg:height="1.281cm" draw:z-index="28"><draw:image xlink:href="Pictures/10000000000000FD0000006E022483018EBFDE14.jpg" xlink:type="simple" xlink:show="embed" xlink:actuate="onLoad" draw:mime-type="image/jpeg"/><svg:desc>BH ARPT</svg:desc></draw:frame><draw:frame draw:style-name="fr4" draw:name="image5.png" text:anchor-type="char" svg:x="8.597cm" svg:y="0.81cm" svg:width="4.965cm" svg:height="1.028cm" draw:z-index="4"><draw:image xlink:href="Pictures/10000201000001FB00000069EBD9C2798598523E.png" xlink:type="simple" xlink:show="embed" xlink:actuate="onLoad" draw:mime-type="image/png"/></draw:frame><draw:frame draw:style-name="fr4" draw:name="image6.png" text:anchor-type="char" svg:x="14.631cm" svg:y="0.684cm" svg:width="3.023cm" svg:height="1.549cm" draw:z-index="5"><draw:image xlink:href="Pictures/100002010000010400000085C632E84C2B43A8B2.png" xlink:type="simple" xlink:show="embed" xlink:actuate="onLoad" draw:mime-type="image/png"/></draw:frame></text:p>
      <text:p text:style-name="P3"/>
      <text:p text:style-name="P102"><draw:frame draw:style-name="fr4" draw:name="image7.jpeg" text:anchor-type="char" svg:x="4.374cm" svg:y="0.766cm" svg:width="4.004cm" svg:height="0.827cm" draw:z-index="6"><draw:image xlink:href="Pictures/100000000000015A000000471C878E77D48D93B6.jpg" xlink:type="simple" xlink:show="embed" xlink:actuate="onLoad" draw:mime-type="image/jpeg"/></draw:frame><draw:frame draw:style-name="fr4" draw:name="image8.jpeg" text:anchor-type="char" svg:x="9.779cm" svg:y="0.512cm" svg:width="2.088cm" svg:height="1.212cm" draw:z-index="7"><draw:image xlink:href="Pictures/10000000000000B400000068D1E6AEE10F678530.jpg" xlink:type="simple" xlink:show="embed" xlink:actuate="onLoad" draw:mime-type="image/jpeg"/></draw:frame><draw:frame draw:style-name="fr4" draw:name="image9.jpeg" text:anchor-type="char" svg:x="13.979cm" svg:y="1.032cm" svg:width="3.941cm" svg:height="0.422cm" draw:z-index="8"><draw:image xlink:href="Pictures/100000000000015700000025DD5793D24D113B4D.jpg" xlink:type="simple" xlink:show="embed" xlink:actuate="onLoad" draw:mime-type="image/jpeg"/></draw:frame></text:p>
      <text:p text:style-name="P3"/>
      <text:p text:style-name="P11"><draw:frame draw:style-name="fr4" draw:name="image10.jpeg" text:anchor-type="char" svg:x="4.473cm" svg:y="0.713cm" svg:width="3.868cm" svg:height="1.154cm" draw:z-index="9"><draw:image xlink:href="Pictures/100000000000012A00000059078FF1C80E80719B.jpg" xlink:type="simple" xlink:show="embed" xlink:actuate="onLoad" draw:mime-type="image/jpeg"/></draw:frame><draw:frame draw:style-name="fr4" draw:name="image11.png" text:anchor-type="char" svg:x="9.23cm" svg:y="0.757cm" svg:width="3.558cm" svg:height="0.921cm" draw:z-index="10"><draw:image xlink:href="Pictures/10000201000001310000004F7C741700B166F727.png" xlink:type="simple" xlink:show="embed" xlink:actuate="onLoad" draw:mime-type="image/png"/><svg:desc>Resultado de imagem para VINCI Airports</svg:desc></draw:frame><draw:frame draw:style-name="fr4" draw:name="image12.jpeg" text:anchor-type="char" svg:x="14.377cm" svg:y="0.564cm" svg:width="3.378cm" svg:height="1.374cm" draw:z-index="11"><draw:image xlink:href="Pictures/10000000000000F00000006269D0CB12B8357B98.jpg" xlink:type="simple" xlink:show="embed" xlink:actuate="onLoad" draw:mime-type="image/jpeg"/></draw:frame></text:p>
      <text:p text:style-name="P10"/>
      <text:p text:style-name="P109"/>
      <text:p text:style-name="P199"><draw:line text:anchor-type="char" draw:z-index="22" draw:name="Forma6" draw:style-name="gr1" draw:text-style-name="P383" svg:x1="2.57cm" svg:y1="0.284cm" svg:x2="5.048cm" svg:y2="0.284cm"><text:p/></draw:line><draw:line text:anchor-type="char" draw:z-index="23" draw:name="Forma7" draw:style-name="gr1" draw:text-style-name="P383" svg:x1="16.462cm" svg:y1="0.344cm" svg:x2="18.94cm" svg:y2="0.344cm"><text:p/></draw:line>INTEGRANTES DO COMITÊ DE DESEMPENHO OPERACIONAL</text:p>
      <text:p text:style-name="P3"/>
      <text:p text:style-name="P113"><draw:frame draw:style-name="fr4" draw:name="image13.jpeg" text:anchor-type="char" svg:x="3.445cm" svg:y="0.609cm" svg:width="2.424cm" svg:height="1.991cm" draw:z-index="12"><draw:image xlink:href="Pictures/10000000000000D0000000AB34E11B0B31CD8400.jpg" xlink:type="simple" xlink:show="embed" xlink:actuate="onLoad" draw:mime-type="image/jpeg"/><svg:desc>C:\Users\carlosegs\Desktop\Material para apresentações CTDO\anac.jpg</svg:desc></draw:frame><draw:frame draw:style-name="fr4" draw:name="image14.jpeg" text:anchor-type="char" svg:x="7.77cm" svg:y="0.497cm" svg:width="1.947cm" svg:height="2.15cm" draw:z-index="13"><draw:image xlink:href="Pictures/10000000000000730000007FCCFFAACF63246FB0.jpg" xlink:type="simple" xlink:show="embed" xlink:actuate="onLoad" draw:mime-type="image/jpeg"/></draw:frame><draw:frame draw:style-name="fr4" draw:name="image15.jpeg" text:anchor-type="char" svg:x="11.882cm" svg:y="0.614cm" svg:width="1.762cm" svg:height="2.073cm" draw:z-index="14"><draw:image xlink:href="Pictures/1000000000000098000000B2F97B4E3BDD72ACD2.jpg" xlink:type="simple" xlink:show="embed" xlink:actuate="onLoad" draw:mime-type="image/jpeg"/></draw:frame><draw:frame draw:style-name="fr4" draw:name="image16.png" text:anchor-type="char" svg:x="16.048cm" svg:y="0.614cm" svg:width="1.84cm" svg:height="2.141cm" draw:z-index="15"><draw:image xlink:href="Pictures/100002010000009E000000B8AE73A3A5B1086D3C.png" xlink:type="simple" xlink:show="embed" xlink:actuate="onLoad" draw:mime-type="image/png"/><svg:desc>https://media.lovemondays.com.br/logos/ac9739/departamento-de-policia-federal-original.gif</svg:desc></draw:frame></text:p>
      <text:p text:style-name="P11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0">AGÊNCIA NACIONAL</text:p>
            <text:p text:style-name="P61">DE AVIAÇÃO CIVIL</text:p>
          </table:table-cell>
          <table:table-cell table:style-name="Tabela1.A1" office:value-type="string">
            <text:p text:style-name="P62">AGÊNCIA NACIONAL</text:p>
            <text:p text:style-name="P63">DE VIGILÂNCIA SANITÁRIA</text:p>
          </table:table-cell>
          <table:table-cell table:style-name="Tabela1.A1" office:value-type="string">
            <text:p text:style-name="P64">DEPARTAMENTO DE</text:p>
            <text:p text:style-name="P65">CONTROLE DO ESPAÇO AÉREO</text:p>
          </table:table-cell>
          <table:table-cell table:style-name="Tabela1.A1" office:value-type="string">
            <text:p text:style-name="P66">DEPARTAMENTO DE</text:p>
            <text:p text:style-name="P67">POLÍCIA FEDERAL</text:p>
          </table:table-cell>
        </table:table-row>
      </table:table>
      <text:p text:style-name="P3"/>
      <text:p text:style-name="P122"><draw:frame draw:style-name="fr4" draw:name="image17.png" text:anchor-type="char" svg:x="4.022cm" svg:y="0.533cm" svg:width="2.418cm" svg:height="2.439cm" draw:z-index="16"><draw:image xlink:href="Pictures/100002010000013B0000013EFE270E311AA978DC.png" xlink:type="simple" xlink:show="embed" xlink:actuate="onLoad" draw:mime-type="image/png"/><svg:desc>C:\Users\carlosegs\Desktop\Material para apresentações CTDO\brasão da república compac.gif</svg:desc></draw:frame><draw:frame draw:style-name="fr4" draw:name="image18.png" text:anchor-type="char" svg:x="9.73cm" svg:y="0.979cm" svg:width="2.436cm" svg:height="2.027cm" draw:z-index="17"><draw:image xlink:href="Pictures/10000201000000D1000000AEDDFA55BDDB6E8B26.png" xlink:type="simple" xlink:show="embed" xlink:actuate="onLoad" draw:mime-type="image/png"/></draw:frame><draw:frame draw:style-name="fr4" draw:name="image19.jpeg" text:anchor-type="char" svg:x="15.025cm" svg:y="0.598cm" svg:width="2.515cm" svg:height="2.526cm" draw:z-index="18"><draw:image xlink:href="Pictures/10000000000000D8000000D976C3659AACAF9252.jpg" xlink:type="simple" xlink:show="embed" xlink:actuate="onLoad" draw:mime-type="image/jpeg"/></draw:frame></text:p>
      <text:p text:style-name="P3"/>
      <text:p text:style-name="P83"/>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68">MINISTÉRIO DO</text:p>
            <text:p text:style-name="P69">PLANEJAMENTO,</text:p>
            <text:p text:style-name="P70">DESENVOLVIMENTO E GESTÃO</text:p>
          </table:table-cell>
          <table:table-cell table:style-name="Tabela2.A1" office:value-type="string">
            <text:p text:style-name="P71">SECRETARIA DA RECEITA</text:p>
            <text:p text:style-name="P72">FEDERAL DO BRASIL</text:p>
          </table:table-cell>
          <table:table-cell table:style-name="Tabela2.A1" office:value-type="string">
            <text:p text:style-name="P73">VIGILÂNCIA AGROPECUÁRIA</text:p>
            <text:p text:style-name="P74">INTERNACIONAL</text:p>
          </table:table-cell>
        </table:table-row>
      </table:table>
      <text:h text:style-name="P224" text:outline-level="1">ÍNDICE</text:h>
      <text:p text:style-name="P7"/>
      <text:p text:style-name="P110"/>
      <text:h text:style-name="P16" text:outline-level="2">1.<text:span text:style-name="T63"> </text:span>INTRODUÇÃO<text:span text:style-name="T64"> </text:span>.................................................................<text:tab/>4</text:h>
      <text:p text:style-name="P29"><text:a xlink:type="simple" xlink:href="#_TOC_250009" text:style-name="Standard" text:visited-style-name="Standard">2. </text:a><text:a xlink:type="simple" xlink:href="#_TOC_250009" text:style-name="Standard" text:visited-style-name="Standard"><text:span text:style-name="T66"><text:s/></text:span></text:a><text:a xlink:type="simple" xlink:href="#_TOC_250009" text:style-name="Standard" text:visited-style-name="Standard">ABRANGÊNCIA</text:a><text:a xlink:type="simple" xlink:href="#_TOC_250009" text:style-name="Standard" text:visited-style-name="Standard"><text:span text:style-name="T67"> </text:span></text:a><text:a xlink:type="simple" xlink:href="#_TOC_250009" text:style-name="Standard" text:visited-style-name="Standard">...............................................................<text:tab/>5</text:a></text:p>
      <text:p text:style-name="P31"><text:a xlink:type="simple" xlink:href="#_TOC_250008" text:style-name="Standard" text:visited-style-name="Standard">3. </text:a><text:a xlink:type="simple" xlink:href="#_TOC_250008" text:style-name="Standard" text:visited-style-name="Standard"><text:span text:style-name="T68"><text:s/></text:span></text:a><text:a xlink:type="simple" xlink:href="#_TOC_250008" text:style-name="Standard" text:visited-style-name="Standard">ESCOPO</text:a><text:a xlink:type="simple" xlink:href="#_TOC_250008" text:style-name="Standard" text:visited-style-name="Standard"><text:span text:style-name="T69"> </text:span></text:a><text:a xlink:type="simple" xlink:href="#_TOC_250008" text:style-name="Standard" text:visited-style-name="Standard">..........................................................................<text:tab/>6</text:a></text:p>
      <text:p text:style-name="P30"><text:a xlink:type="simple" xlink:href="#_TOC_250007" text:style-name="Standard" text:visited-style-name="Standard">4. <text:s/>PERÍODO E DISTRIBUIÇÃO</text:a><text:a xlink:type="simple" xlink:href="#_TOC_250007" text:style-name="Standard" text:visited-style-name="Standard"><text:span text:style-name="T70"> </text:span></text:a><text:a xlink:type="simple" xlink:href="#_TOC_250007" text:style-name="Standard" text:visited-style-name="Standard">DAS</text:a><text:a xlink:type="simple" xlink:href="#_TOC_250007" text:style-name="Standard" text:visited-style-name="Standard"><text:span text:style-name="T1"> </text:span></text:a><text:a xlink:type="simple" xlink:href="#_TOC_250007" text:style-name="Standard" text:visited-style-name="Standard">COLETAS<text:tab/>7</text:a></text:p>
      <text:p text:style-name="P32"><text:a xlink:type="simple" xlink:href="#_TOC_250006" text:style-name="Standard" text:visited-style-name="Standard">5. </text:a><text:a xlink:type="simple" xlink:href="#_TOC_250006" text:style-name="Standard" text:visited-style-name="Standard"><text:span text:style-name="T68"><text:s/></text:span></text:a><text:a xlink:type="simple" xlink:href="#_TOC_250006" text:style-name="Standard" text:visited-style-name="Standard">AMOSTRA</text:a><text:a xlink:type="simple" xlink:href="#_TOC_250006" text:style-name="Standard" text:visited-style-name="Standard"><text:span text:style-name="T67"> </text:span></text:a><text:a xlink:type="simple" xlink:href="#_TOC_250006" text:style-name="Standard" text:visited-style-name="Standard">.......................................................................<text:tab/>9</text:a></text:p>
      <text:list xml:id="list2997050623" text:style-name="WWNum16">
        <text:list-item>
          <text:list>
            <text:list-item>
              <text:p text:style-name="P219"><text:a xlink:type="simple" xlink:href="#_TOC_250005" text:style-name="Standard" text:visited-style-name="Standard">Cálculo amostral para a Pesquisa de Satisfação</text:a><text:a xlink:type="simple" xlink:href="#_TOC_250005" text:style-name="Standard" text:visited-style-name="Standard"><text:span text:style-name="T71"> </text:span></text:a><text:a xlink:type="simple" xlink:href="#_TOC_250005" text:style-name="Standard" text:visited-style-name="Standard">de</text:a><text:a xlink:type="simple" xlink:href="#_TOC_250005" text:style-name="Standard" text:visited-style-name="Standard"><text:span text:style-name="T2"> </text:span></text:a><text:a xlink:type="simple" xlink:href="#_TOC_250005" text:style-name="Standard" text:visited-style-name="Standard">Passageiros<text:tab/></text:a><text:a xlink:type="simple" xlink:href="#_TOC_250005" text:style-name="Standard" text:visited-style-name="Standard"><text:span text:style-name="T72">9</text:span></text:a></text:p>
            </text:list-item>
            <text:list-item>
              <text:p text:style-name="P221"><text:a xlink:type="simple" xlink:href="#_TOC_250004" text:style-name="Standard" text:visited-style-name="Standard">Cálculo amostral para a Pesquisa de</text:a><text:a xlink:type="simple" xlink:href="#_TOC_250004" text:style-name="Standard" text:visited-style-name="Standard"><text:span text:style-name="T73"> </text:span></text:a><text:a xlink:type="simple" xlink:href="#_TOC_250004" text:style-name="Standard" text:visited-style-name="Standard">Desempenho</text:a><text:a xlink:type="simple" xlink:href="#_TOC_250004" text:style-name="Standard" text:visited-style-name="Standard"><text:span text:style-name="T2"> </text:span></text:a><text:a xlink:type="simple" xlink:href="#_TOC_250004" text:style-name="Standard" text:visited-style-name="Standard">Operacional<text:tab/></text:a><text:a xlink:type="simple" xlink:href="#_TOC_250004" text:style-name="Standard" text:visited-style-name="Standard"><text:span text:style-name="T72">10</text:span></text:a></text:p>
            </text:list-item>
          </text:list>
        </text:list-item>
      </text:list>
      <text:list xml:id="list3371684286" text:style-name="WWNum15">
        <text:list-item>
          <text:p text:style-name="P216">PESQUISA DE SATISFAÇÃO<text:span text:style-name="T1"> </text:span>DE<text:span text:style-name="T2"> </text:span>PASSAGEIROS<text:tab/>16</text:p>
        </text:list-item>
        <text:list-item>
          <text:p text:style-name="P217">INDICADORES DE SATISFAÇÃO<text:span text:style-name="T74"> </text:span>DE<text:span text:style-name="T2"> </text:span>PASSAGEIROS<text:tab/>17</text:p>
          <text:list>
            <text:list-item>
              <text:p text:style-name="P223"><text:a xlink:type="simple" xlink:href="#_TOC_250003" text:style-name="Standard" text:visited-style-name="Standard">Indicadores de</text:a><text:a xlink:type="simple" xlink:href="#_TOC_250003" text:style-name="Standard" text:visited-style-name="Standard"><text:span text:style-name="T74"> </text:span></text:a><text:a xlink:type="simple" xlink:href="#_TOC_250003" text:style-name="Standard" text:visited-style-name="Standard">Infraestrutura</text:a><text:a xlink:type="simple" xlink:href="#_TOC_250003" text:style-name="Standard" text:visited-style-name="Standard"><text:span text:style-name="T75"> </text:span></text:a><text:a xlink:type="simple" xlink:href="#_TOC_250003" text:style-name="Standard" text:visited-style-name="Standard">Aeroportuária<text:tab/></text:a><text:a xlink:type="simple" xlink:href="#_TOC_250003" text:style-name="Standard" text:visited-style-name="Standard"><text:span text:style-name="T72">17</text:span></text:a></text:p>
            </text:list-item>
            <text:list-item>
              <text:p text:style-name="P222">Indicadores de Facilidade<text:span text:style-name="T76"> </text:span>ao<text:span text:style-name="T75"> </text:span>Passageiro<text:tab/><text:span text:style-name="T72">19</text:span></text:p>
            </text:list-item>
            <text:list-item>
              <text:p text:style-name="P220"><text:a xlink:type="simple" xlink:href="#_TOC_250002" text:style-name="Standard" text:visited-style-name="Standard">Indicadores de</text:a><text:a xlink:type="simple" xlink:href="#_TOC_250002" text:style-name="Standard" text:visited-style-name="Standard"><text:span text:style-name="T74"> </text:span></text:a><text:a xlink:type="simple" xlink:href="#_TOC_250002" text:style-name="Standard" text:visited-style-name="Standard">Companhias Aéreas<text:tab/></text:a><text:a xlink:type="simple" xlink:href="#_TOC_250002" text:style-name="Standard" text:visited-style-name="Standard"><text:span text:style-name="T72">20</text:span></text:a></text:p>
            </text:list-item>
            <text:list-item>
              <text:p text:style-name="P222"><text:a xlink:type="simple" xlink:href="#_TOC_250001" text:style-name="Standard" text:visited-style-name="Standard">Indicadores de</text:a><text:a xlink:type="simple" xlink:href="#_TOC_250001" text:style-name="Standard" text:visited-style-name="Standard"><text:span text:style-name="T74"> </text:span></text:a><text:a xlink:type="simple" xlink:href="#_TOC_250001" text:style-name="Standard" text:visited-style-name="Standard">Órgãos</text:a><text:a xlink:type="simple" xlink:href="#_TOC_250001" text:style-name="Standard" text:visited-style-name="Standard"><text:span text:style-name="T2"> </text:span></text:a><text:a xlink:type="simple" xlink:href="#_TOC_250001" text:style-name="Standard" text:visited-style-name="Standard">Públicos<text:tab/></text:a><text:a xlink:type="simple" xlink:href="#_TOC_250001" text:style-name="Standard" text:visited-style-name="Standard"><text:span text:style-name="T72">22</text:span></text:a></text:p>
            </text:list-item>
            <text:list-item>
              <text:p text:style-name="P223">Indicadores de<text:span text:style-name="T74"> </text:span>Transporte<text:span text:style-name="T1"> </text:span>Público<text:tab/><text:span text:style-name="T72">23</text:span></text:p>
            </text:list-item>
          </text:list>
        </text:list-item>
        <text:list-item>
          <text:p text:style-name="P218"><text:a xlink:type="simple" xlink:href="#_TOC_250000" text:style-name="Standard" text:visited-style-name="Standard">INDICADORES DE</text:a><text:a xlink:type="simple" xlink:href="#_TOC_250000" text:style-name="Standard" text:visited-style-name="Standard"><text:span text:style-name="T74"> </text:span></text:a><text:a xlink:type="simple" xlink:href="#_TOC_250000" text:style-name="Standard" text:visited-style-name="Standard">DESEMPENHO</text:a><text:a xlink:type="simple" xlink:href="#_TOC_250000" text:style-name="Standard" text:visited-style-name="Standard"><text:span text:style-name="T2"> </text:span></text:a><text:a xlink:type="simple" xlink:href="#_TOC_250000" text:style-name="Standard" text:visited-style-name="Standard">OPERACIONAL<text:tab/>24</text:a></text:p>
        </text:list-item>
      </text:list>
      <text:list xml:id="list204946286" text:style-name="WWNum14">
        <text:list-item>
          <text:p text:style-name="P258">INTRODUÇÃO</text:p>
        </text:list-item>
      </text:list>
      <text:p text:style-name="P127">Do Objeto:</text:p>
      <text:p text:style-name="P36"><text:span text:style-name="T4">“</text:span><text:span text:style-name="T5">Prestação</text:span><text:span text:style-name="T7"> </text:span><text:span text:style-name="T5">de</text:span><text:span text:style-name="T10"> </text:span><text:span text:style-name="T5">serviços</text:span><text:span text:style-name="T13"> </text:span><text:span text:style-name="T5">de</text:span><text:span text:style-name="T10"> </text:span><text:span text:style-name="T5">coleta</text:span><text:span text:style-name="T7"> </text:span><text:span text:style-name="T5">de</text:span><text:span text:style-name="T10"> </text:span><text:span text:style-name="T5">dados</text:span><text:span text:style-name="T16"> </text:span><text:span text:style-name="T5">presencial,</text:span><text:span text:style-name="T13"> </text:span><text:span text:style-name="T5">distribuição</text:span><text:span text:style-name="T13"> </text:span><text:span text:style-name="T5">e</text:span><text:span text:style-name="T10"> </text:span><text:span text:style-name="T5">geração</text:span><text:span text:style-name="T10"> </text:span><text:span text:style-name="T5">de</text:span><text:span text:style-name="T19"> </text:span><text:span text:style-name="T5">resultados de indicadores de desempenho das operações dos aeroportos e elaboração de relatórios, conforme condições, quantidades e exigências estabelecidas no Edital do Pregão eletrônico n° 11/2017 e seus</text:span><text:span text:style-name="T22"> </text:span><text:span text:style-name="T5">anexos”.</text:span></text:p>
      <text:p text:style-name="P38"><text:span text:style-name="T77">Cláusula Primeira, Inciso I - Contrato Nº</text:span><text:span text:style-name="T78"> </text:span><text:span text:style-name="T77">19/2017-MTPA</text:span></text:p>
      <text:p text:style-name="P12"/>
      <text:p text:style-name="P12"/>
      <text:p text:style-name="P111"/>
      <text:p text:style-name="P132">A PESQUISA DE DESEMPENHO OPERACIONAL<text:span text:style-name="T79"> </text:span>E<text:span text:style-name="T80"> </text:span>DE<text:span text:style-name="T81"> </text:span>SATISFAÇÃO<text:span text:style-name="T79"> </text:span>DO<text:span text:style-name="T81"> </text:span>PASSAGEIRO, conduzida desde 2013 pela Secretaria Nacional de Aviação Civil (SAC) e atualmente realizada no âmbito do Contrato nº 19/2017-MTPA, visa permitir o cumprimento das ações estratégicas definidas pelo Decreto nº 6.780, de 18 de fevereiro de 2009, que aprova a Política Nacional de Aviação Civil (PNAC), das com<text:bookmark text:name="_GoBack"/>petências atribuídas ao Ministério dos Transportes, Portos e Aviação Civil (MTPA) e à SAC, por meio do Decreto nº 9.000 de 8 de março de 2017, bem como contribuir para o desenvolvimento da gestão aeroportuária e o aumento da capacidade e eficiência da infraestrutura dos aeroportos do país.</text:p>
      <text:p text:style-name="P103"/>
      <text:p text:style-name="P132">Objetiva-se o monitoramento contínuo, por parte do governo brasileiro, da eficiência operacional de seus principais aeroportos por meio de pesquisa composta de indicadores de desempenho e de satisfação dos passageiros, visando dar transparência da qualidade dos serviços<text:span text:style-name="T82"> </text:span>aeroportuários<text:span text:style-name="T84"> </text:span>para<text:span text:style-name="T71"> </text:span>a<text:span text:style-name="T84"> </text:span>população<text:span text:style-name="T84"> </text:span>e<text:span text:style-name="T73"> </text:span>proporcionar<text:span text:style-name="T84"> </text:span>o<text:span text:style-name="T71"> </text:span>acompanhamento<text:span text:style-name="T84"> </text:span>dos<text:span text:style-name="T84"> </text:span>parâmetros<text:span text:style-name="T84"> </text:span>de desempenho em aeroportos, estabelecidos para os órgãos e entidades públicas pela Comissão Nacional de Autoridades Aeroportuárias (CONAERO), conforme parágrafo 3º do artigo 2º do Decreto nº 7.554, de 15 de agosto de<text:span text:style-name="T1"> </text:span>2011.</text:p>
      <text:p text:style-name="P114"/>
      <text:p text:style-name="P135">A Pesquisa consiste na coleta de dados por meio de execução de entrevistas presenciais, realizadas nas salas de embarque e desembarque dos aeroportos, com passageiros de voos domésticos e internacionais, além da medição de indicadores relativos aos processos aeroportuários aos quais os passageiros são submetidos.</text:p>
      <text:p text:style-name="P103"/>
      <text:p text:style-name="P45">Este manual foi elaborado pela Coordenação-geral de Segurança da Aviação Civil e Desempenho Aeroportuário do Departamento de Planejamento e Gestão Aeroportuária (DPG) da<text:span text:style-name="T71"> </text:span>Secretaria<text:span text:style-name="T82"> </text:span>Nacional<text:span text:style-name="T82"> </text:span>de<text:span text:style-name="T82"> </text:span>Aviação<text:span text:style-name="T82"> </text:span>Civil<text:span text:style-name="T73"> </text:span>(SAC)<text:span text:style-name="T86"> </text:span>do<text:span text:style-name="T86"> </text:span>Ministério<text:span text:style-name="T82"> </text:span>dos<text:span text:style-name="T82"> </text:span>Transportes,<text:span text:style-name="T87"> </text:span>Portos<text:span text:style-name="T82"> </text:span>e<text:span text:style-name="T86"> </text:span>Aviação<text:span text:style-name="T64"> </text:span>Civil (MTPA), a quem cabe a coordenação dos trabalhos desenvolvidos no âmbito do Comitê Técnico de Desempenho Operacional (CTDO) da Comissão Nacional de Autoridades Aeroportuárias (CONAERO), em conjunto com a Praxian Consultoria Ltda., empresa vencedora do processo licitatório para prestação do serviço, ocorrido em<text:span text:style-name="T67"> </text:span>2017.</text:p>
      <text:p text:style-name="P123"/>
      <text:p text:style-name="P41">Seu objetivo é apresentar a metodologia de coleta de dados de indicadores de desempenho<text:span text:style-name="T86"> </text:span>dos<text:span text:style-name="T84"> </text:span>processos<text:span text:style-name="T82"> </text:span>aeroportuários,<text:span text:style-name="T82"> </text:span>coletados<text:span text:style-name="T84"> </text:span>por<text:span text:style-name="T86"> </text:span>meio<text:span text:style-name="T82"> </text:span>de<text:span text:style-name="T86"> </text:span>observação<text:span text:style-name="T73"> </text:span>direta,<text:span text:style-name="T86"> </text:span>bem<text:span text:style-name="T84"> </text:span>como dos indicadores de satisfação de passageiros, coletados por meio de entrevista presencial, no embarque e desembarque das operações domésticas e internacionais dos aeroportos pesquisados.</text:p>
      <text:p text:style-name="P114"/>
      <text:p text:style-name="P134">Seu conteúdo não substitui ou prevalece sobre os dispositivos do Contrato nº 19/2017- MTPA ou seu Termo de Referência.</text:p>
      <text:list xml:id="list85109516395297" text:continue-numbering="true" text:style-name="WWNum14">
        <text:list-item>
          <text:h text:style-name="P226" text:outline-level="2"><text:bookmark text:name="_TOC_250009"/>ABRANGÊNCIA</text:h>
        </text:list-item>
      </text:list>
      <text:p text:style-name="P39"><text:span text:style-name="T4">“</text:span><text:span text:style-name="T5">As coletas deverão ser realizadas nos 20 aeroportos com maior movimentação de passageiros</text:span><text:span text:style-name="T13"> </text:span><text:span text:style-name="T5">de</text:span><text:span text:style-name="T19"> </text:span><text:span text:style-name="T5">voos</text:span><text:span text:style-name="T13"> </text:span><text:span text:style-name="T5">regulares</text:span><text:span text:style-name="T13"> </text:span><text:span text:style-name="T5">no</text:span><text:span text:style-name="T7"> </text:span><text:span text:style-name="T5">ano</text:span><text:span text:style-name="T10"> </text:span><text:span text:style-name="T5">de</text:span><text:span text:style-name="T19"> </text:span><text:span text:style-name="T5">2016,</text:span><text:span text:style-name="T25"> </text:span><text:span text:style-name="T5">abaixo</text:span><text:span text:style-name="T7"> </text:span><text:span text:style-name="T5">discriminados,</text:span><text:span text:style-name="T13"> </text:span><text:span text:style-name="T5">conforme</text:span><text:span text:style-name="T19"> </text:span><text:span text:style-name="T5">dados</text:span><text:span text:style-name="T13"> </text:span><text:span text:style-name="T5">da</text:span><text:span text:style-name="T7"> </text:span><text:span text:style-name="T5">Agência Nacional</text:span><text:span text:style-name="T22"> </text:span><text:span text:style-name="T5">de</text:span><text:span text:style-name="T28"> </text:span><text:span text:style-name="T5">Aviação</text:span><text:span text:style-name="T22"> </text:span><text:span text:style-name="T5">Civil</text:span><text:span text:style-name="T30"> </text:span><text:span text:style-name="T5">(ANAC),</text:span><text:span text:style-name="T33"> </text:span><text:span text:style-name="T5">e</text:span><text:span text:style-name="T28"> </text:span><text:span text:style-name="T5">seus</text:span><text:span text:style-name="T22"> </text:span><text:span text:style-name="T5">resultados</text:span><text:span text:style-name="T33"> </text:span><text:span text:style-name="T5">deverão</text:span><text:span text:style-name="T22"> </text:span><text:span text:style-name="T5">ser</text:span><text:span text:style-name="T30"> </text:span><text:span text:style-name="T5">apresentados</text:span><text:span text:style-name="T22"> </text:span><text:span text:style-name="T5">à</text:span><text:span text:style-name="T22"> </text:span><text:span text:style-name="T5">SAC</text:span><text:span text:style-name="T22"> </text:span><text:span text:style-name="T5">na</text:span><text:span text:style-name="T22"> </text:span><text:span text:style-name="T5">forma</text:span><text:span text:style-name="T37"> </text:span><text:span text:style-name="T5">de relatórios mensais, de acordo com as especificações contidas neste Termo e distintos por aeroporto</text:span><text:span text:style-name="T28"> </text:span><text:span text:style-name="T5">pesquisado”.</text:span></text:p>
      <text:p text:style-name="P200">Item 2.4 - Termo de Referência anexo ao Contrato Nº 19/2017-MTPA</text:p>
      <text:p text:style-name="P12"/>
      <text:p text:style-name="P12"/>
      <text:p text:style-name="P117"/>
      <text:p text:style-name="P133">O Contrato nº 19/2017-MTPA abrange os seguintes aeroportos, aqui relacionados em ordem decrescente, em função da movimentação de passageiros regulares no ano de 2016, segundo dados da Agência Nacional de Aviação Civil – ANAC:</text:p>
      <text:list xml:id="list85111170295509" text:continue-numbering="true" text:style-name="WWNum14">
        <text:list-item>
          <text:list>
            <text:list-item>
              <text:p text:style-name="P278"><text:span text:style-name="T4">Guarulhos / Governador André Franco Montoro (SBGR) –</text:span><text:span text:style-name="T38"> </text:span><text:span text:style-name="T4">Guarulhos/SP;</text:span></text:p>
            </text:list-item>
            <text:list-item>
              <text:p text:style-name="P279">São Paulo / Congonhas (SBSP) – São Paulo/SP;</text:p>
            </text:list-item>
            <text:list-item>
              <text:p text:style-name="P281"><text:span text:style-name="T4">Brasília / Pres. Juscelino Kubitschek (SBBR) –</text:span><text:span text:style-name="T35"> </text:span><text:span text:style-name="T4">Brasília/DF;</text:span></text:p>
            </text:list-item>
            <text:list-item>
              <text:p text:style-name="P280"><text:span text:style-name="T4">Rio de Janeiro / Antônio Carlos Jobim/Galeão (SBGL) – Rio De</text:span><text:span text:style-name="T20"> </text:span><text:span text:style-name="T4">Janeiro/RJ;</text:span></text:p>
            </text:list-item>
            <text:list-item>
              <text:p text:style-name="P280"><text:span text:style-name="T4">Confins / Tancredo Neves (SBCF) –</text:span><text:span text:style-name="T35"> </text:span><text:span text:style-name="T4">Confins/MG;</text:span></text:p>
            </text:list-item>
            <text:list-item>
              <text:p text:style-name="P283"><text:span text:style-name="T4">Campinas / Viracopos (SBKP) –</text:span><text:span text:style-name="T40"> </text:span><text:span text:style-name="T4">Campinas/SP;</text:span></text:p>
            </text:list-item>
            <text:list-item>
              <text:p text:style-name="P280"><text:span text:style-name="T4">Rio de Janeiro / Santos Dumont (SBRJ) – Rio de</text:span><text:span text:style-name="T31"> </text:span><text:span text:style-name="T4">Janeiro/RJ;</text:span></text:p>
            </text:list-item>
            <text:list-item>
              <text:p text:style-name="P280"><text:span text:style-name="T4">Porto Alegre / Salgado Filho (SBPA) – Porto</text:span><text:span text:style-name="T23"> </text:span><text:span text:style-name="T4">Alegre/RS;</text:span></text:p>
            </text:list-item>
            <text:list-item>
              <text:p text:style-name="P280"><text:span text:style-name="T4">Salvador / Deputado Luís Eduardo Magalhães (SBSV) –</text:span><text:span text:style-name="T20"> </text:span><text:span text:style-name="T4">Salvador/BA;</text:span></text:p>
            </text:list-item>
            <text:list-item>
              <text:p text:style-name="P283"><text:span text:style-name="T4">Recife / Gilberto Freyre (SBRF) –</text:span><text:span text:style-name="T29"> </text:span><text:span text:style-name="T4">Guararapes/PE;</text:span></text:p>
            </text:list-item>
            <text:list-item>
              <text:p text:style-name="P280"><text:span text:style-name="T4">Curitiba / Afonso Pena (SBCT) – São José dos</text:span><text:span text:style-name="T31"> </text:span><text:span text:style-name="T4">Pinhais/PR;</text:span></text:p>
            </text:list-item>
            <text:list-item>
              <text:p text:style-name="P280"><text:span text:style-name="T4">Fortaleza / Pinto Martins (SBFZ) –</text:span><text:span text:style-name="T29"> </text:span><text:span text:style-name="T4">Fortaleza/CE;</text:span></text:p>
            </text:list-item>
            <text:list-item>
              <text:p text:style-name="P282">Florianópolis / Hercílio Luz (SBFL) – Florianópolis/SC;</text:p>
            </text:list-item>
            <text:list-item>
              <text:p text:style-name="P280"><text:span text:style-name="T4">Belém / Val de Cans - Júlio Cezar Ribeiro (SBBE) –</text:span><text:span text:style-name="T23"> </text:span><text:span text:style-name="T4">Belém/PA;</text:span></text:p>
            </text:list-item>
            <text:list-item>
              <text:p text:style-name="P280"><text:span text:style-name="T4">Vitória / Eurico de Aguiar Salles (SBVT) –</text:span><text:span text:style-name="T20"> </text:span><text:span text:style-name="T4">Vitória/ES;</text:span></text:p>
            </text:list-item>
            <text:list-item>
              <text:p text:style-name="P284">Goiânia / Santa Genoveva (SBGO) – Goiânia/GO;</text:p>
            </text:list-item>
            <text:list-item>
              <text:p text:style-name="P280"><text:span text:style-name="T4">Cuiabá / Marechal Rondon (SBCY) – Várzea</text:span><text:span text:style-name="T29"> </text:span><text:span text:style-name="T4">Grande/MT;</text:span></text:p>
            </text:list-item>
            <text:list-item>
              <text:p text:style-name="P280"><text:span text:style-name="T4">Manaus / Eduardo Gomes (SBEG) –</text:span><text:span text:style-name="T40"> </text:span><text:span text:style-name="T4">Manaus/AM;</text:span></text:p>
            </text:list-item>
            <text:list-item>
              <text:p text:style-name="P283"><text:span text:style-name="T4">Natal / Governador Aluízio Alves (SBSG) – São Gonçalo do Amarante/RN;</text:span><text:span text:style-name="T26"> </text:span><text:span text:style-name="T4">e</text:span></text:p>
            </text:list-item>
            <text:list-item>
              <text:p text:style-name="P280"><text:span text:style-name="T4">Maceió / Zumbi dos Palmares (SBMO) – Rio</text:span><text:span text:style-name="T38"> </text:span><text:span text:style-name="T4">Largo/AL.</text:span></text:p>
            </text:list-item>
          </text:list>
        </text:list-item>
        <text:list-item>
          <text:h text:style-name="P227" text:outline-level="2"><text:bookmark text:name="_TOC_250008"/>ESCOPO</text:h>
        </text:list-item>
      </text:list>
      <text:p text:style-name="P93"/>
      <text:p text:style-name="P42"><text:span text:style-name="T4">“</text:span><text:span text:style-name="T5">Os serviços objetos deste Termo de Referência consistem na realização de entrevistas presenciais junto a passageiros de voos domésticos e internacionais, nas salas de embarque e desembarque dos aeroportos especificados no item 2.4, acima, bem como na avaliação de indicadores relativos aos processos aeroportuários aos quais os passageiros são submetidos”.</text:span></text:p>
      <text:p text:style-name="P201">Item 4.2 - Termo de Referência anexo ao Contrato Nº 19/2017-MTPA</text:p>
      <text:p text:style-name="P12"/>
      <text:p text:style-name="P12"/>
      <text:p text:style-name="P112"/>
      <text:p text:style-name="P136">A Pesquisa estabelece as seguintes premissas para a definição dos indicadores a serem considerados para avaliação da satisfação do passageiro e do desempenho operacional dos aeroportos pesquisados:</text:p>
      <text:list xml:id="list4234694165" text:style-name="WWNum13">
        <text:list-item>
          <text:p text:style-name="P285"><text:span text:style-name="T4">Seleção de elementos e indicadores de processos/serviços que representem impacto relevante na percepção do nível de serviço dos aeroportos pelo</text:span><text:span text:style-name="T42"> </text:span><text:span text:style-name="T4">passageiro;</text:span></text:p>
        </text:list-item>
        <text:list-item>
          <text:p text:style-name="P287"><text:span text:style-name="T4">Medição do tempo dos processos aeroportuários aos quais os passageiros são submetidos, pelo método de observação</text:span><text:span text:style-name="T23"> </text:span><text:span text:style-name="T4">direta.</text:span></text:p>
        </text:list-item>
      </text:list>
      <text:p text:style-name="P139"/>
      <text:p text:style-name="P47">A forma como a empresa contratada procederá a realização das coletas são definidas em Plano de Pesquisa apresentado pela Praxian Consultoria Ltda. e aprovado pelo MTPA, contendo:</text:p>
      <text:p text:style-name="P76"/>
      <text:list xml:id="list85111492262378" text:continue-numbering="true" text:style-name="WWNum13">
        <text:list-item>
          <text:p text:style-name="P293"><text:span text:style-name="T4">O</text:span><text:span text:style-name="T31"> </text:span><text:span text:style-name="T4">planejamento</text:span><text:span text:style-name="T38"> </text:span><text:span text:style-name="T4">para</text:span><text:span text:style-name="T35"> </text:span><text:span text:style-name="T4">a</text:span><text:span text:style-name="T31"> </text:span><text:span text:style-name="T4">execução</text:span><text:span text:style-name="T23"> </text:span><text:span text:style-name="T4">dos</text:span><text:span text:style-name="T31"> </text:span><text:span text:style-name="T4">serviços</text:span><text:span text:style-name="T38"> </text:span><text:span text:style-name="T4">nos</text:span><text:span text:style-name="T11"> </text:span><text:span text:style-name="T4">aeroportos</text:span><text:span text:style-name="T38"> </text:span><text:span text:style-name="T4">abrangidos</text:span><text:span text:style-name="T38"> </text:span><text:span text:style-name="T4">por</text:span><text:span text:style-name="T38"> </text:span><text:span text:style-name="T4">este</text:span><text:span text:style-name="T38"> </text:span><text:span text:style-name="T4">Termo de Referência;</text:span></text:p>
        </text:list-item>
        <text:list-item>
          <text:p text:style-name="P294"><text:span text:style-name="T4">O detalhamento do procedimento de coleta de</text:span><text:span text:style-name="T8"> </text:span><text:span text:style-name="T4">dados;</text:span></text:p>
        </text:list-item>
        <text:list-item>
          <text:p text:style-name="P296"><text:span text:style-name="T4">O material a ser utilizado para o treinamento dos</text:span><text:span text:style-name="T43"> </text:span><text:span text:style-name="T4">pesquisadores;</text:span></text:p>
        </text:list-item>
        <text:list-item>
          <text:p text:style-name="P298"><text:span text:style-name="T4">A estimativa estratificada dos levantamentos (quantidade de amostras por</text:span><text:span text:style-name="T45"> </text:span><text:span text:style-name="T4">aeroporto);</text:span></text:p>
        </text:list-item>
        <text:list-item>
          <text:p text:style-name="P296"><text:span text:style-name="T4">A descrição do plano amostral estabelecido para cada</text:span><text:span text:style-name="T31"> </text:span><text:span text:style-name="T4">aeroporto;</text:span></text:p>
        </text:list-item>
        <text:list-item>
          <text:p text:style-name="P300"><text:span text:style-name="T4">A descrição logístico-operacional do planejamento da coleta de dados (número de pesquisadores,</text:span><text:span text:style-name="T46"> </text:span><text:span text:style-name="T4">quantidade</text:span><text:span text:style-name="T46"> </text:span><text:span text:style-name="T4">e</text:span><text:span text:style-name="T46"> </text:span><text:span text:style-name="T4">distribuição</text:span><text:span text:style-name="T43"> </text:span><text:span text:style-name="T4">das</text:span><text:span text:style-name="T49"> </text:span><text:span text:style-name="T4">equipes,</text:span><text:span text:style-name="T46"> </text:span><text:span text:style-name="T4">áreas</text:span><text:span text:style-name="T51"> </text:span><text:span text:style-name="T4">do</text:span><text:span text:style-name="T46"> </text:span><text:span text:style-name="T4">aeroporto</text:span><text:span text:style-name="T43"> </text:span><text:span text:style-name="T4">onde</text:span><text:span text:style-name="T43"> </text:span><text:span text:style-name="T4">as</text:span><text:span text:style-name="T49"> </text:span><text:span text:style-name="T4">coletas ocorrerão, composição das equipes,</text:span><text:span text:style-name="T11"> </text:span><text:span text:style-name="T4">etc.);</text:span></text:p>
        </text:list-item>
        <text:list-item>
          <text:p text:style-name="P295"><text:span text:style-name="T4">Especificações de funcionamento do sistema informatizado de coleta de</text:span><text:span text:style-name="T45"> </text:span><text:span text:style-name="T4">dados;</text:span></text:p>
        </text:list-item>
        <text:list-item>
          <text:p text:style-name="P301"><text:span text:style-name="T4">Plano</text:span><text:span text:style-name="T38"> </text:span><text:span text:style-name="T4">de</text:span><text:span text:style-name="T38"> </text:span><text:span text:style-name="T4">Contingência</text:span><text:span text:style-name="T35"> </text:span><text:span text:style-name="T4">relativo</text:span><text:span text:style-name="T29"> </text:span><text:span text:style-name="T4">à</text:span><text:span text:style-name="T38"> </text:span><text:span text:style-name="T4">garantia</text:span><text:span text:style-name="T38"> </text:span><text:span text:style-name="T4">da</text:span><text:span text:style-name="T38"> </text:span><text:span text:style-name="T4">continuidade</text:span><text:span text:style-name="T38"> </text:span><text:span text:style-name="T4">das</text:span><text:span text:style-name="T38"> </text:span><text:span text:style-name="T4">coletas</text:span><text:span text:style-name="T38"> </text:span><text:span text:style-name="T4">em</text:span><text:span text:style-name="T23"> </text:span><text:span text:style-name="T4">casos</text:span><text:span text:style-name="T29"> </text:span><text:span text:style-name="T4">de</text:span><text:span text:style-name="T38"> </text:span><text:span text:style-name="T4">falhas técnicas;</text:span><text:span text:style-name="T29"> </text:span><text:span text:style-name="T4">e</text:span></text:p>
        </text:list-item>
        <text:list-item>
          <text:p text:style-name="P302">Quantitativo adicional de pesquisadores treinados, disponíveis para eventuais substituições.</text:p>
        </text:list-item>
      </text:list>
      <text:p text:style-name="P111"/>
      <text:p text:style-name="P51">O Plano de Pesquisa é elaborado levando em conta os seguintes aspectos, entre outros:</text:p>
      <text:p text:style-name="P103"/>
      <text:list xml:id="list85110917471552" text:continue-numbering="true" text:style-name="WWNum13">
        <text:list-item>
          <text:p text:style-name="P297"><text:span text:style-name="T4">O processo avaliado (embarque ou desembarque, doméstico ou</text:span><text:span text:style-name="T20"> </text:span><text:span text:style-name="T4">internacional);</text:span></text:p>
        </text:list-item>
        <text:list-item>
          <text:p text:style-name="P299"><text:span text:style-name="T4">O indicador de</text:span><text:span text:style-name="T38"> </text:span><text:span text:style-name="T4">desempenho;</text:span></text:p>
        </text:list-item>
        <text:list-item>
          <text:p text:style-name="P296"><text:span text:style-name="T4">A existência de terminais de passageiros em diferentes locais no</text:span><text:span text:style-name="T11"> </text:span><text:span text:style-name="T4">aeroporto;</text:span></text:p>
        </text:list-item>
        <text:list-item>
          <text:p text:style-name="P303">O tipo e quantidade das operações (embarque e desembarque, doméstico e internacional);</text:p>
        </text:list-item>
        <text:list-item>
          <text:p text:style-name="P294"><text:span text:style-name="T4">O perfil do passageiro;</text:span><text:span text:style-name="T31"> </text:span><text:span text:style-name="T4">e</text:span></text:p>
        </text:list-item>
        <text:list-item>
          <text:p text:style-name="P296"><text:span text:style-name="T4">A interação junto ao operador aeroportuário e aos órgãos</text:span><text:span text:style-name="T26"> </text:span><text:span text:style-name="T4">públicos.</text:span></text:p>
        </text:list-item>
      </text:list>
      <text:list xml:id="list85109609066676" text:continue-list="list85111170295509" text:style-name="WWNum14">
        <text:list-item>
          <text:h text:style-name="P228" text:outline-level="2"><text:bookmark-start text:name="_TOC_250007"/>PERÍODO E DISTRIBUIÇÃO DAS<text:span text:style-name="T88"> </text:span><text:bookmark-end text:name="_TOC_250007"/>COLETAS</text:h>
        </text:list-item>
      </text:list>
      <text:p text:style-name="P40"><text:span text:style-name="T4">“</text:span><text:span text:style-name="T5">A coleta de dados será realizada nos períodos de maior fluxo do processo avaliado (embarque/desembarque)</text:span><text:span text:style-name="T52"> </text:span><text:span text:style-name="T5">e</text:span><text:span text:style-name="T25"> </text:span><text:span text:style-name="T5">tipo</text:span><text:span text:style-name="T47"> </text:span><text:span text:style-name="T5">de</text:span><text:span text:style-name="T25"> </text:span><text:span text:style-name="T5">voo</text:span><text:span text:style-name="T47"> </text:span><text:span text:style-name="T5">(doméstico/internacional),</text:span><text:span text:style-name="T47"> </text:span><text:span text:style-name="T5">salvo</text:span><text:span text:style-name="T52"> </text:span><text:span text:style-name="T5">disposição</text:span><text:span text:style-name="T47"> </text:span><text:span text:style-name="T5">em</text:span><text:span text:style-name="T52"> </text:span><text:span text:style-name="T5">contrário por parte do Ministério dos Transportes, Portos e Aviação Civil. As coletas do processo de embarque</text:span><text:span text:style-name="T10"> </text:span><text:span text:style-name="T5">devem</text:span><text:span text:style-name="T16"> </text:span><text:span text:style-name="T5">ser</text:span><text:span text:style-name="T10"> </text:span><text:span text:style-name="T5">iniciadas</text:span><text:span text:style-name="T16"> </text:span><text:span text:style-name="T5">com</text:span><text:span text:style-name="T19"> </text:span><text:span text:style-name="T5">antecedência</text:span><text:span text:style-name="T10"> </text:span><text:span text:style-name="T5">mínima</text:span><text:span text:style-name="T10"> </text:span><text:span text:style-name="T5">de</text:span><text:span text:style-name="T16"> </text:span><text:span text:style-name="T5">60</text:span><text:span text:style-name="T30"> </text:span><text:span text:style-name="T5">(sessenta)</text:span><text:span text:style-name="T7"> </text:span><text:span text:style-name="T5">minutos</text:span><text:span text:style-name="T10"> </text:span><text:span text:style-name="T5">do</text:span><text:span text:style-name="T10"> </text:span><text:span text:style-name="T5">período</text:span><text:span text:style-name="T10"> </text:span><text:span text:style-name="T5">de maior</text:span><text:span text:style-name="T19"> </text:span><text:span text:style-name="T5">fluxo</text:span><text:span text:style-name="T10"> </text:span><text:span text:style-name="T5">no</text:span><text:span text:style-name="T10"> </text:span><text:span text:style-name="T5">processamento</text:span><text:span text:style-name="T10"> </text:span><text:span text:style-name="T5">doméstico</text:span><text:span text:style-name="T10"> </text:span><text:span text:style-name="T5">e</text:span><text:span text:style-name="T19"> </text:span><text:span text:style-name="T5">120</text:span><text:span text:style-name="T10"> </text:span><text:span text:style-name="T5">(cento</text:span><text:span text:style-name="T10"> </text:span><text:span text:style-name="T5">e</text:span><text:span text:style-name="T19"> </text:span><text:span text:style-name="T5">vinte)</text:span><text:span text:style-name="T16"> </text:span><text:span text:style-name="T5">minutos</text:span><text:span text:style-name="T10"> </text:span><text:span text:style-name="T5">do</text:span><text:span text:style-name="T10"> </text:span><text:span text:style-name="T5">período</text:span><text:span text:style-name="T10"> </text:span><text:span text:style-name="T5">de</text:span><text:span text:style-name="T16"> </text:span><text:span text:style-name="T5">maior</text:span><text:span text:style-name="T10"> </text:span><text:span text:style-name="T5">fluxo no processamento internacional, definido no Plano de Trabalho. As coletas do processo de desembarque devem continuar até 60 (sessenta) minutos posteriores à hora de maior</text:span><text:span text:style-name="T50"> </text:span><text:span text:style-name="T5">fluxo”.</text:span></text:p>
      <text:p text:style-name="P203">Item 4.12 - Termo de Referência anexo ao Contrato Nº 19/2017-MTPA</text:p>
      <text:p text:style-name="P12"/>
      <text:p text:style-name="P12"/>
      <text:p text:style-name="P12"/>
      <text:p text:style-name="P142">Os períodos de maior fluxo (Hora de Maior Fluxo - HMF) são definidos em função da quantidade de passageiros embarcados ou desembarcados, conforme o processo avaliado, e validados junto ao operador aeroportuário. Os horários de início e fim das coletas são estabelecidos de modo a abranger o fluxo de chegada dos passageiros para embarque nos voos compreendidos<text:span text:style-name="T88"> </text:span>dentro<text:span text:style-name="T88"> </text:span>do<text:span text:style-name="T88"> </text:span>horário<text:span text:style-name="T64"> </text:span>de<text:span text:style-name="T88"> </text:span>maior<text:span text:style-name="T88"> </text:span>movimentação<text:span text:style-name="T71"> </text:span>de<text:span text:style-name="T69"> </text:span>aeronaves<text:span text:style-name="T71"> </text:span>partindo<text:span text:style-name="T71"> </text:span>do<text:span text:style-name="T69"> </text:span>aeroporto, assim como o fluxo de desembarque dos passageiros dos voos que chegam ao<text:span text:style-name="T90"> </text:span>aeroporto.</text:p>
      <text:p text:style-name="P114"/>
      <text:p text:style-name="P371"><draw:frame draw:style-name="fr2" draw:name="Figura2" text:anchor-type="char" svg:y="0cm" svg:width="9.52cm" svg:height="7.197cm" draw:z-index="54"><draw:image xlink:href="Pictures/10000000000001C8000001545DF1F06C2E52378A.png" xlink:type="simple" xlink:show="embed" xlink:actuate="onLoad" draw:mime-type="image/png"/></draw:frame></text:p>
      <text:p text:style-name="P48">Destaca-se que os horários das coletas são flexíveis e alterados conforme a movimentação típica do aeroporto, sendo permitida a coleta em horários distintos daqueles estabelecidos previamente, caso haja necessidade.</text:p>
      <text:p text:style-name="P103"/>
      <text:p text:style-name="P146">Em geral, os períodos de maior movimento são sequenciais para os elementos processadores que estão conectados em série no processo considerado, seja ele embarque ou desembarque. Desta forma, as equipes de pesquisa seguem roteiro de coletas de medições que se<text:span text:style-name="T64"> </text:span>assemelha<text:span text:style-name="T88"> </text:span>ao<text:span text:style-name="T69"> </text:span>fluxo<text:span text:style-name="T73"> </text:span>dos<text:span text:style-name="T64"> </text:span>processos<text:span text:style-name="T73"> </text:span>de<text:span text:style-name="T73"> </text:span>embarque<text:span text:style-name="T73"> </text:span>e<text:span text:style-name="T64"> </text:span>desembarque<text:span text:style-name="T69"> </text:span>vivenciados<text:span text:style-name="T71"> </text:span>pelos<text:span text:style-name="T73"> </text:span>passageiros nos aeroportos.</text:p>
      <text:p text:style-name="P373">Apresentamos, a seguir, um exemplo da movimentação típica de um aeroporto e os períodos definidos para a coleta dos dados.</text:p>
      <text:p text:style-name="P96"><draw:frame draw:style-name="fr4" draw:name="image23.png" text:anchor-type="char" svg:x="2.535cm" svg:y="0.473cm" svg:width="16.917cm" svg:height="4.277cm" draw:z-index="19"><draw:image xlink:href="Pictures/10000201000005CF000001780A87C1AEE1834CB8.png" xlink:type="simple" xlink:show="embed" xlink:actuate="onLoad" draw:mime-type="image/png"/></draw:frame></text:p>
      <text:p text:style-name="P149"/>
      <text:p text:style-name="P146">No gráfico acima, o eixo “y” representa a participação percentual da quantidade de passageiros previstos no processo de embarque, enquanto o eixo “x” representa as horas ao longo do dia. Pelas informações contidas no gráfico é possível verificar que o horário de maior movimentação no embarque ocorre às 9h da manhã, quando aproximadamente 9% de todos os passageiros previstos ao longo do dia irão embarcar.</text:p>
      <text:p text:style-name="P97"/>
      <text:p text:style-name="P137">Dessa<text:span text:style-name="T76"> </text:span>forma,<text:span text:style-name="T76"> </text:span>em<text:span text:style-name="T76"> </text:span>cumprimento<text:span text:style-name="T76"> </text:span>à<text:span text:style-name="T76"> </text:span>orientação<text:span text:style-name="T76"> </text:span>contida<text:span text:style-name="T76"> </text:span>no<text:span text:style-name="T76"> </text:span>Termo<text:span text:style-name="T67"> </text:span>de<text:span text:style-name="T92"> </text:span>Referência,<text:span text:style-name="T74"> </text:span>as<text:span text:style-name="T76"> </text:span>coletas devem<text:span text:style-name="T64"> </text:span>se<text:span text:style-name="T64"> </text:span>iniciar,<text:span text:style-name="T82"> </text:span>no<text:span text:style-name="T73"> </text:span>mínimo,<text:span text:style-name="T64"> </text:span>às<text:span text:style-name="T84"> </text:span>8h<text:span text:style-name="T73"> </text:span>e<text:span text:style-name="T64"> </text:span>se<text:span text:style-name="T64"> </text:span>encerrar<text:span text:style-name="T82"> </text:span>às<text:span text:style-name="T73"> </text:span>9h30,<text:span text:style-name="T82"> </text:span>não<text:span text:style-name="T82"> </text:span>havendo<text:span text:style-name="T73"> </text:span>restrição<text:span text:style-name="T64"> </text:span>para<text:span text:style-name="T73"> </text:span>a<text:span text:style-name="T82"> </text:span>ampliação dos horários de coleta por parte da empresa<text:span text:style-name="T76"> </text:span>contratada.</text:p>
      <text:p text:style-name="P1"/>
      <text:p text:style-name="P13"><draw:line text:anchor-type="char" draw:z-index="2" draw:name="Forma12" draw:style-name="gr2" draw:text-style-name="P384" svg:x1="2.517cm" svg:y1="0.617cm" svg:x2="18.905cm" svg:y2="0.617cm"><text:p/></draw:line></text:p>
      <text:p text:style-name="Text_20_body"/>
      <text:p text:style-name="P100"/>
      <text:p text:style-name="P43"><text:span text:style-name="T4">“</text:span><text:span text:style-name="T5">A PDO, correspondente ao número de amostras contida no PPF, será distribuída de forma</text:span><text:span text:style-name="T10"> </text:span><text:span text:style-name="T5">diária</text:span><text:span text:style-name="T16"> </text:span><text:span text:style-name="T5">nos</text:span><text:span text:style-name="T30"> </text:span><text:span text:style-name="T5">meses</text:span><text:span text:style-name="T30"> </text:span><text:span text:style-name="T5">de</text:span><text:span text:style-name="T16"> </text:span><text:span text:style-name="T5">janeiro,</text:span><text:span text:style-name="T30"> </text:span><text:span text:style-name="T5">julho</text:span><text:span text:style-name="T16"> </text:span><text:span text:style-name="T5">e</text:span><text:span text:style-name="T30"> </text:span><text:span text:style-name="T5">dezembro,</text:span><text:span text:style-name="T30"> </text:span><text:span text:style-name="T5">ao</text:span><text:span text:style-name="T10"> </text:span><text:span text:style-name="T5">longo</text:span><text:span text:style-name="T16"> </text:span><text:span text:style-name="T5">do</text:span><text:span text:style-name="T16"> </text:span><text:span text:style-name="T5">período</text:span><text:span text:style-name="T37"> </text:span><text:span text:style-name="T5">de</text:span><text:span text:style-name="T16"> </text:span><text:span text:style-name="T5">vigência</text:span><text:span text:style-name="T16"> </text:span><text:span text:style-name="T5">contratual. Nos</text:span><text:span text:style-name="T7"> </text:span><text:span text:style-name="T5">demais</text:span><text:span text:style-name="T19"> </text:span><text:span text:style-name="T5">meses,</text:span><text:span text:style-name="T25"> </text:span><text:span text:style-name="T5">deverá</text:span><text:span text:style-name="T25"> </text:span><text:span text:style-name="T5">ser</text:span><text:span text:style-name="T13"> </text:span><text:span text:style-name="T5">considerado</text:span><text:span text:style-name="T7"> </text:span><text:span text:style-name="T5">o</text:span><text:span text:style-name="T25"> </text:span><text:span text:style-name="T5">período</text:span><text:span text:style-name="T7"> </text:span><text:span text:style-name="T5">mínimo</text:span><text:span text:style-name="T7"> </text:span><text:span text:style-name="T5">de</text:span><text:span text:style-name="T13"> </text:span><text:span text:style-name="T5">20</text:span><text:span text:style-name="T7"> </text:span><text:span text:style-name="T5">(vinte)</text:span><text:span text:style-name="T25"> </text:span><text:span text:style-name="T5">dias</text:span><text:span text:style-name="T7"> </text:span><text:span text:style-name="T5">de</text:span><text:span text:style-name="T19"> </text:span><text:span text:style-name="T5">coleta,</text:span><text:span text:style-name="T13"> </text:span><text:span text:style-name="T5">os</text:span><text:span text:style-name="T52"> </text:span><text:span text:style-name="T5">quais devem obrigatoriamente compreender os dias de maior fluxo, podendo ocorrer em dias úteis, sábados, domingos e feriados”.</text:span></text:p>
      <text:p text:style-name="P124"/>
      <text:p text:style-name="P202">Item 4.8 - Termo de Referência anexo ao Contrato Nº 19/2017-MTPA</text:p>
      <text:p text:style-name="P125"/>
      <text:p text:style-name="P47">Até 5 (cinco) dias antes do início do mês subsequente, a SAC encaminhará aos aeroportos pesquisados, Plano de Trabalho contendo a escala dos pesquisadores, datas e horários de coletas em função de cada processo (embarque/desembarque, doméstico/internacional), referentes ao mês a se iniciar.</text:p>
      <text:p text:style-name="P103"/>
      <text:p text:style-name="P153">Eventualmente, as datas/horários previstas no plano de trabalho poderão sofrer alterações em função das datas/horários dos voos confirmados do mês de referência.</text:p>
      <text:list xml:id="list85111495914095" text:continue-numbering="true" text:style-name="WWNum14">
        <text:list-item>
          <text:h text:style-name="P229" text:outline-level="2"><text:bookmark text:name="_TOC_250006"/>AMOSTRA</text:h>
        </text:list-item>
      </text:list>
      <text:p text:style-name="P93"/>
      <text:p text:style-name="P44"><text:span text:style-name="T4">“</text:span><text:span text:style-name="T5">Para o cálculo do tamanho da amostra, deverá ser considerado o nível de confiança de 95% (noventa e cinco por cento), erro máximo permitido de 5% (cinco por cento) por processo (embarque doméstico, desembarque doméstico, embarque internacional e desembarque internacional),</text:span><text:span text:style-name="T44"> </text:span><text:span text:style-name="T5">em</text:span><text:span text:style-name="T47"> </text:span><text:span text:style-name="T5">cada</text:span><text:span text:style-name="T44"> </text:span><text:span text:style-name="T5">aeroporto</text:span><text:span text:style-name="T50"> </text:span><text:span text:style-name="T5">pesquisado.</text:span><text:span text:style-name="T50"> </text:span><text:span text:style-name="T5">Ao</text:span><text:span text:style-name="T44"> </text:span><text:span text:style-name="T5">final</text:span><text:span text:style-name="T47"> </text:span><text:span text:style-name="T5">de</text:span><text:span text:style-name="T47"> </text:span><text:span text:style-name="T5">cada</text:span><text:span text:style-name="T44"> </text:span><text:span text:style-name="T5">período</text:span><text:span text:style-name="T50"> </text:span><text:span text:style-name="T5">(mensal)</text:span><text:span text:style-name="T44"> </text:span><text:span text:style-name="T5">de</text:span><text:span text:style-name="T47"> </text:span><text:span text:style-name="T5">coleta</text:span><text:span text:style-name="T44"> </text:span><text:span text:style-name="T5">deverá ser</text:span><text:span text:style-name="T10"> </text:span><text:span text:style-name="T5">encaminhado</text:span><text:span text:style-name="T10"> </text:span><text:span text:style-name="T5">laudo</text:span><text:span text:style-name="T10"> </text:span><text:span text:style-name="T5">estatístico</text:span><text:span text:style-name="T10"> </text:span><text:span text:style-name="T5">com</text:span><text:span text:style-name="T16"> </text:span><text:span text:style-name="T5">a</text:span><text:span text:style-name="T10"> </text:span><text:span text:style-name="T5">validação</text:span><text:span text:style-name="T10"> </text:span><text:span text:style-name="T5">desses</text:span><text:span text:style-name="T16"> </text:span><text:span text:style-name="T5">parâmetros</text:span><text:span text:style-name="T30"> </text:span><text:span text:style-name="T5">pela</text:span><text:span text:style-name="T10"> </text:span><text:span text:style-name="T5">empresa</text:span><text:span text:style-name="T10"> </text:span><text:span text:style-name="T5">contratada, assinado por um especialista em amostragem</text:span><text:span text:style-name="T33"> </text:span><text:span text:style-name="T5">estatística”.</text:span></text:p>
      <text:p text:style-name="P204">Item 4.11 - Termo de Referência anexo ao Contrato Nº 19/2017-MTPA</text:p>
      <text:p text:style-name="P12"/>
      <text:p text:style-name="P12"/>
      <text:p text:style-name="P12"/>
      <text:p text:style-name="P147">A amostra é construída respeitando-se a distribuição dos seguintes estratos em cada aeroporto:</text:p>
      <text:p text:style-name="P103"/>
      <text:list xml:id="list85111035699471" text:continue-list="list85110917471552" text:style-name="WWNum13">
        <text:list-item>
          <text:p text:style-name="P259"><text:span text:style-name="T4">Voo doméstico e voo</text:span><text:span text:style-name="T35"> </text:span><text:span text:style-name="T4">internacional;</text:span></text:p>
        </text:list-item>
        <text:list-item>
          <text:p text:style-name="P260"><text:span text:style-name="T4">Embarque e desembarque de</text:span><text:span text:style-name="T17"> </text:span><text:span text:style-name="T4">passageiros.</text:span></text:p>
        </text:list-item>
      </text:list>
      <text:p text:style-name="P46"><text:span text:style-name="T4">Segundo Mattar (MATTAR, N. F. Pesquisa de Marketing, vol. 1, São Paulo, 1993, p.314): “</text:span><text:span text:style-name="T5">O</text:span><text:span text:style-name="T16"> </text:span><text:span text:style-name="T5">processo</text:span><text:span text:style-name="T16"> </text:span><text:span text:style-name="T5">de</text:span><text:span text:style-name="T22"> </text:span><text:span text:style-name="T5">subdividir</text:span><text:span text:style-name="T22"> </text:span><text:span text:style-name="T5">uma</text:span><text:span text:style-name="T30"> </text:span><text:span text:style-name="T5">população</text:span><text:span text:style-name="T16"> </text:span><text:span text:style-name="T5">em</text:span><text:span text:style-name="T37"> </text:span><text:span text:style-name="T5">estratos,</text:span><text:span text:style-name="T37"> </text:span><text:span text:style-name="T5">selecionar</text:span><text:span text:style-name="T16"> </text:span><text:span text:style-name="T5">amostras</text:span><text:span text:style-name="T37"> </text:span><text:span text:style-name="T5">aleatórias</text:span><text:span text:style-name="T30"> </text:span><text:span text:style-name="T5">simples</text:span><text:span text:style-name="T37"> </text:span><text:span text:style-name="T5">de cada estrato e, a seguir, combiná-las em uma amostra única para estimar os parâmetros da população, denominamos de amostragem aleatória</text:span><text:span text:style-name="T28"> </text:span><text:span text:style-name="T5">estratificada</text:span><text:span text:style-name="T4">”.</text:span></text:p>
      <text:p text:style-name="P97"/>
      <text:p text:style-name="P153">Dessa forma, a quantidade de entrevistas a serem realizadas a cada mês é definida de modo<text:span text:style-name="T71"> </text:span>a<text:span text:style-name="T84"> </text:span>respeitar<text:span text:style-name="T71"> </text:span>o<text:span text:style-name="T71"> </text:span>intervalo<text:span text:style-name="T73"> </text:span>de<text:span text:style-name="T82"> </text:span>confiança<text:span text:style-name="T84"> </text:span>definido<text:span text:style-name="T84"> </text:span>pelo<text:span text:style-name="T71"> </text:span>Termo<text:span text:style-name="T71"> </text:span>de<text:span text:style-name="T73"> </text:span>Referência,<text:span text:style-name="T71"> </text:span>variando<text:span text:style-name="T71"> </text:span>conforme o processo avaliado e o aeroporto<text:span text:style-name="T74"> </text:span>pesquisado.</text:p>
      <text:p text:style-name="P103"/>
      <text:p text:style-name="P156">Mensalmente, como anexo ao relatório das coletas realizadas no mês anterior, é encaminhado laudo estatístico atestando o atendimento aos indicadores estatísticos exigidos. A amostra de determinado aeroporto pode sofrer variação em função no nível de atendimento à margem de erro. Com vistas a estabelecer uma margem de segurança no atendimento aos indicadores estatísticos, acordou-se com a Praxian Consultoria Ltda. a manutenção da margem de erro em 3% por extrato em cada aeroporto.</text:p>
      <text:p text:style-name="P97"/>
      <text:p text:style-name="P156">Eventualmente, em função de dificuldades operacionais, a margem de erro pode vir a exceder aquela exigida em contrato, acarretando o aumento na quantidade de entrevistas no mês subsequente. O não atendimento aos indicadores estatísticos definidos em contrato deve ser justificado pela empresa.</text:p>
      <text:p text:style-name="P114"/>
      <text:list xml:id="list302769470" text:style-name="WWNum12">
        <text:list-item>
          <text:list>
            <text:list-item>
              <text:h text:style-name="P232" text:outline-level="2"><text:bookmark-start text:name="_TOC_250005"/>Cálculo Amostral para a Pesquisa de Satisfação de<text:span text:style-name="T88"> </text:span><text:bookmark-end text:name="_TOC_250005"/>Passageiros</text:h>
            </text:list-item>
          </text:list>
        </text:list-item>
      </text:list>
      <text:p text:style-name="P158">A metodologia de distribuição das entrevistas com passageiros baseia-se na proporção de oferta de assentos por empresa e por voos domésticos e internacionais, considerando-se a planilha de horário dos voos vigentes, divulgada no site da ANAC, conforme sequência:</text:p>
      <text:p text:style-name="P97"/>
      <text:list xml:id="list3693499918" text:style-name="WWNum11">
        <text:list-item>
          <text:p text:style-name="P286"><text:span text:style-name="T4">Estudo</text:span><text:span text:style-name="T53"> </text:span><text:span text:style-name="T4">de</text:span><text:span text:style-name="T8"> </text:span><text:span text:style-name="T4">todas</text:span><text:span text:style-name="T26"> </text:span><text:span text:style-name="T4">as</text:span><text:span text:style-name="T26"> </text:span><text:span text:style-name="T4">companhias</text:span><text:span text:style-name="T26"> </text:span><text:span text:style-name="T4">aéreas</text:span><text:span text:style-name="T26"> </text:span><text:span text:style-name="T4">que</text:span><text:span text:style-name="T8"> </text:span><text:span text:style-name="T4">operam</text:span><text:span text:style-name="T26"> </text:span><text:span text:style-name="T4">na</text:span><text:span text:style-name="T26"> </text:span><text:span text:style-name="T4">hora</text:span><text:span text:style-name="T26"> </text:span><text:span text:style-name="T4">de</text:span><text:span text:style-name="T8"> </text:span><text:span text:style-name="T4">maior</text:span><text:span text:style-name="T46"> </text:span><text:span text:style-name="T4">fluxo</text:span><text:span text:style-name="T46"> </text:span><text:span text:style-name="T4">de</text:span><text:span text:style-name="T8"> </text:span><text:span text:style-name="T4">passageiros em</text:span><text:span text:style-name="T49"> </text:span><text:span text:style-name="T4">cada</text:span><text:span text:style-name="T51"> </text:span><text:span text:style-name="T4">aeroporto</text:span><text:span text:style-name="T43"> </text:span><text:span text:style-name="T4">nos</text:span><text:span text:style-name="T51"> </text:span><text:span text:style-name="T4">4</text:span><text:span text:style-name="T42"> </text:span><text:span text:style-name="T4">estratos:</text:span><text:span text:style-name="T43"> </text:span><text:span text:style-name="T4">embarque</text:span><text:span text:style-name="T43"> </text:span><text:span text:style-name="T4">e</text:span><text:span text:style-name="T49"> </text:span><text:span text:style-name="T4">desembarque</text:span><text:span text:style-name="T43"> </text:span><text:span text:style-name="T4">/</text:span><text:span text:style-name="T45"> </text:span><text:span text:style-name="T4">doméstico</text:span><text:span text:style-name="T43"> </text:span><text:span text:style-name="T4">e</text:span><text:span text:style-name="T51"> </text:span><text:span text:style-name="T4">internacional;</text:span></text:p>
        </text:list-item>
        <text:list-item>
          <text:p text:style-name="P304"><text:span text:style-name="T4">Percentual de participação de cada companhia no horário de maior fluxo de passageiros (horário de Brasília), considerado o número de assentos na hora de maior</text:span><text:span text:style-name="T55"> </text:span><text:span text:style-name="T4">fluxo;</text:span></text:p>
        </text:list-item>
        <text:list-item>
          <text:p text:style-name="P273"><text:span text:style-name="T4">Aplicação do </text:span><text:span text:style-name="T5">loadfactor </text:span><text:span text:style-name="T4">de</text:span><text:span text:style-name="T56"> </text:span><text:span text:style-name="T4">0,8;</text:span></text:p>
        </text:list-item>
        <text:list-item>
          <text:p text:style-name="P310"><text:span text:style-name="T4">Cálculo do número de assentos por mês, na hora de maior fluxo de passageiros, considerando-se o número de assentos</text:span><text:span text:style-name="T23"> </text:span><text:span text:style-name="T4">semanal;</text:span></text:p>
        </text:list-item>
        <text:list-item>
          <text:p text:style-name="P306"><text:span text:style-name="T4">Cálculo estatístico para população finita, uma vez que há o número exato de assentos disponíveis (p= 0,5: proporção da amostra que representa a população (=) q=0,5: proporção da amostra que não representa a</text:span><text:span text:style-name="T11"> </text:span><text:span text:style-name="T4">população).</text:span></text:p>
        </text:list-item>
      </text:list>
      <text:p text:style-name="P159">Observação: fórmula utilizada para calcular o número de elementos na amostra para população finita:</text:p>
      <text:p text:style-name="P84"/>
      <text:p text:style-name="P161">N=N.Z<text:span text:style-name="T93">2</text:span>.p.q/e<text:span text:style-name="T93">2</text:span>.(n-1)+Z<text:span text:style-name="T93">2</text:span>.p.q</text:p>
      <text:p text:style-name="P84"/>
      <text:p text:style-name="P144">onde:</text:p>
      <text:p text:style-name="P143">N=número de elementos da população</text:p>
      <text:p text:style-name="P163">Z=valor da ordenada na curva normal padronizada p=proporção da amostra que representa a população q=proporção da amostra que não representa a população e=erro máximo amostral</text:p>
      <text:p text:style-name="P164"/>
      <text:list xml:id="list85109947300241" text:continue-numbering="true" text:style-name="WWNum11">
        <text:list-item>
          <text:p text:style-name="P288"><text:span text:style-name="T4">Amostras distribuídas por companhia aérea, ou seja, número de medições a serem aplicadas por companhia aérea</text:span><text:span text:style-name="T38"> </text:span><text:span text:style-name="T4">diariamente/mensalmente.</text:span></text:p>
        </text:list-item>
      </text:list>
      <text:p text:style-name="P382"/>
      <text:list xml:id="list85110669144601" text:continue-list="list302769470" text:style-name="WWNum12">
        <text:list-item>
          <text:list>
            <text:list-item>
              <text:h text:style-name="P232" text:outline-level="2"><text:bookmark-start text:name="_TOC_250004"/>Cálculo Amostral para a Pesquisa de Desempenho<text:span text:style-name="T76"> </text:span><text:bookmark-end text:name="_TOC_250004"/>Operacional</text:h>
            </text:list-item>
          </text:list>
        </text:list-item>
      </text:list>
      <text:p text:style-name="P167">A metodologia adotada para o cálculo amostral da Pesquisa de Desempenho Operacional é demostrada a seguir, em função do elemento e indicador de desempenho a ser coletado.</text:p>
      <text:p text:style-name="P381"/>
      <text:list xml:id="list85110405056931" text:continue-numbering="true" text:style-name="WWNum12">
        <text:list-item>
          <text:list>
            <text:list-item>
              <text:list>
                <text:list-item>
                  <text:p text:style-name="P257"><text:span text:style-name="T3">Medições de C</text:span><text:span text:style-name="T6">heck-in</text:span><text:span text:style-name="T34"> </text:span><text:span text:style-name="T3">convencional</text:span></text:p>
                </text:list-item>
              </text:list>
            </text:list-item>
          </text:list>
        </text:list-item>
      </text:list>
      <text:p text:style-name="P56">Metodologia para definição do número de medições (passageiros observados nas filas):</text:p>
      <text:list xml:id="list3845435212" text:style-name="WWNum10">
        <text:list-item>
          <text:p text:style-name="P312"><text:span text:style-name="T4">Estudo</text:span><text:span text:style-name="T26"> </text:span><text:span text:style-name="T4">de</text:span><text:span text:style-name="T8"> </text:span><text:span text:style-name="T4">todas</text:span><text:span text:style-name="T26"> </text:span><text:span text:style-name="T4">as</text:span><text:span text:style-name="T8"> </text:span><text:span text:style-name="T4">companhias</text:span><text:span text:style-name="T26"> </text:span><text:span text:style-name="T4">aéreas</text:span><text:span text:style-name="T26"> </text:span><text:span text:style-name="T4">que</text:span><text:span text:style-name="T14"> </text:span><text:span text:style-name="T4">operam</text:span><text:span text:style-name="T26"> </text:span><text:span text:style-name="T4">na</text:span><text:span text:style-name="T26"> </text:span><text:span text:style-name="T4">hora</text:span><text:span text:style-name="T8"> </text:span><text:span text:style-name="T4">de</text:span><text:span text:style-name="T8"> </text:span><text:span text:style-name="T4">maior</text:span><text:span text:style-name="T46"> </text:span><text:span text:style-name="T4">fluxo</text:span><text:span text:style-name="T53"> </text:span><text:span text:style-name="T4">de</text:span><text:span text:style-name="T8"> </text:span><text:span text:style-name="T4">passageiros em cada aeroporto nos 2 estratos: embarque doméstico e embarque</text:span><text:span text:style-name="T43"> </text:span><text:span text:style-name="T4">internacional;</text:span></text:p>
        </text:list-item>
        <text:list-item>
          <text:p text:style-name="P305"><text:span text:style-name="T4">Percentual de participação de cada companhia no horário de maior fluxo de passageiros (horário de Brasília), considerado o número de assentos na hora de maior</text:span><text:span text:style-name="T55"> </text:span><text:span text:style-name="T4">fluxo;</text:span></text:p>
        </text:list-item>
        <text:list-item>
          <text:p text:style-name="P261"><text:span text:style-name="T4">Aplicação do </text:span><text:span text:style-name="T5">loadfactor </text:span><text:span text:style-name="T4">de</text:span><text:span text:style-name="T56"> </text:span><text:span text:style-name="T4">0,8;</text:span></text:p>
        </text:list-item>
        <text:list-item>
          <text:p text:style-name="P313"><text:span text:style-name="T4">Cálculo do número de assentos por mês, na hora de maior fluxo de passageiros, considerando-se o número de assentos</text:span><text:span text:style-name="T23"> </text:span><text:span text:style-name="T4">semanal;</text:span></text:p>
        </text:list-item>
        <text:list-item>
          <text:p text:style-name="P315"><text:span text:style-name="T4">Cálculo estatístico para população finita, uma vez que há o número exato de assentos disponíveis (p= 0,5: proporção da amostra que representa a população (=) q=0,5: proporção da amostra que não representa a</text:span><text:span text:style-name="T11"> </text:span><text:span text:style-name="T4">população).</text:span></text:p>
        </text:list-item>
      </text:list>
      <text:p text:style-name="P160">Observação: fórmula utilizada para calcular o número de elementos na amostra para população finita:</text:p>
      <text:p text:style-name="P84"/>
      <text:p text:style-name="P162">N=N.Z<text:span text:style-name="T93">2</text:span>.p.q/e<text:span text:style-name="T93">2</text:span>.(n-1)+Z<text:span text:style-name="T93">2</text:span>.p.q</text:p>
      <text:p text:style-name="Text_20_body"/>
      <text:p text:style-name="P143">onde:</text:p>
      <text:p text:style-name="P143">N=número de elementos da população</text:p>
      <text:p text:style-name="P163">Z=valor da ordenada na curva normal padronizada p=proporção da amostra que representa a população q=proporção da amostra que não representa a população e=erro máximo amostral</text:p>
      <text:list xml:id="list85109554936503" text:continue-numbering="true" text:style-name="WWNum10">
        <text:list-item>
          <text:p text:style-name="P309"><text:span text:style-name="T4">Amostras distribuídas por companhia aérea, ou seja, número de medições a serem aplicadas por companhia aérea</text:span><text:span text:style-name="T38"> </text:span><text:span text:style-name="T4">diariamente/mensalmente.</text:span></text:p>
        </text:list-item>
        <text:list-item>
          <text:h text:style-name="P235" text:outline-level="3">A quantidade mensal de medições (número de passageiros observados nas filas), bem como a divisão por companhia aérea nos aeroportos, segue o mesmo número da pesquisa de satisfação de passageiros para o embarque doméstico e o embarque internacional.</text:h>
        </text:list-item>
      </text:list>
      <text:p text:style-name="P128"><text:span text:style-name="T91">Método de coleta</text:span>: as medições são diárias nos dias de coleta, com meta de 5 medições ao dia e intervalo mínimo de 5 minutos entre uma coleta e outra na mesma fila de <text:span text:style-name="T94">check-in</text:span>.</text:p>
      <text:p text:style-name="P1"/>
      <text:p text:style-name="P79"/>
      <text:section text:style-name="Sect2" text:name="Seção1">
        <text:p text:style-name="Text_20_body"/>
        <text:p text:style-name="Text_20_body"/>
        <text:p text:style-name="P165"/>
        <text:p text:style-name="P129">filas):</text:p>
        <text:list xml:id="list85110661436447" text:continue-list="list85110405056931" text:style-name="WWNum12">
          <text:list-item>
            <text:list>
              <text:list-item>
                <text:list>
                  <text:list-item>
                    <text:h text:style-name="P238" text:outline-level="3">Medições de Inspeção de<text:span text:style-name="T92"> </text:span>Segurança</text:h>
                  </text:list-item>
                </text:list>
              </text:list-item>
            </text:list>
          </text:list-item>
        </text:list>
        <text:p text:style-name="P168">Metodologia para definição do número de medições (passageiros a serem observados nas</text:p>
      </text:section>
      <text:section text:style-name="Sect1" text:name="Seção2">
        <text:p text:style-name="P85"/>
        <text:list xml:id="list3678960393" text:style-name="WWNum9">
          <text:list-item>
            <text:p text:style-name="P319"><text:span text:style-name="T4">Estudo</text:span><text:span text:style-name="T53"> </text:span><text:span text:style-name="T4">de</text:span><text:span text:style-name="T8"> </text:span><text:span text:style-name="T4">todas</text:span><text:span text:style-name="T26"> </text:span><text:span text:style-name="T4">as</text:span><text:span text:style-name="T26"> </text:span><text:span text:style-name="T4">companhias</text:span><text:span text:style-name="T26"> </text:span><text:span text:style-name="T4">aéreas</text:span><text:span text:style-name="T26"> </text:span><text:span text:style-name="T4">que</text:span><text:span text:style-name="T8"> </text:span><text:span text:style-name="T4">operam</text:span><text:span text:style-name="T26"> </text:span><text:span text:style-name="T4">na</text:span><text:span text:style-name="T26"> </text:span><text:span text:style-name="T4">hora</text:span><text:span text:style-name="T26"> </text:span><text:span text:style-name="T4">de</text:span><text:span text:style-name="T8"> </text:span><text:span text:style-name="T4">maior</text:span><text:span text:style-name="T46"> </text:span><text:span text:style-name="T4">fluxo</text:span><text:span text:style-name="T46"> </text:span><text:span text:style-name="T4">de</text:span><text:span text:style-name="T8"> </text:span><text:span text:style-name="T4">passageiros em cada aeroporto nos estratos embarque doméstico e embarque</text:span><text:span text:style-name="T46"> </text:span><text:span text:style-name="T4">internacional;</text:span></text:p>
          </text:list-item>
          <text:list-item>
            <text:p text:style-name="P265"><text:span text:style-name="T4">Cálculo do número de assentos por semana na hora de maior</text:span><text:span text:style-name="T46"> </text:span><text:span text:style-name="T4">fluxo;</text:span></text:p>
          </text:list-item>
          <text:list-item>
            <text:p text:style-name="P266"><text:span text:style-name="T4">Aplicação do </text:span><text:span text:style-name="T5">loadfactor </text:span><text:span text:style-name="T4">de</text:span><text:span text:style-name="T56"> </text:span><text:span text:style-name="T4">0,8;</text:span></text:p>
          </text:list-item>
          <text:list-item>
            <text:p text:style-name="P325"><text:span text:style-name="T4">Cálculo de número de assentos por mês na hora de maior fluxo de passageiros, considerando-se o número de assentos</text:span><text:span text:style-name="T23"> </text:span><text:span text:style-name="T4">semanal;</text:span></text:p>
          </text:list-item>
          <text:list-item>
            <text:p text:style-name="P330"><text:span text:style-name="T4">Cálculo estatístico para população finita, uma vez que há o número exato de assentos disponíveis (p= 0,5: proporção da amostra que representa a população (=) q=0,5: proporção da amostra que não representa a</text:span><text:span text:style-name="T11"> </text:span><text:span text:style-name="T4">população).</text:span></text:p>
          </text:list-item>
        </text:list>
        <text:p text:style-name="P170">Observação: fórmula utilizada para calcular o número de elementos na amostra para população finita:</text:p>
        <text:p text:style-name="P119"/>
        <text:p text:style-name="P162">N=N.Z<text:span text:style-name="T93">2</text:span>.p.q/e<text:span text:style-name="T93">2</text:span>.(n-1)+Z<text:span text:style-name="T93">2</text:span>.p.q</text:p>
        <text:p text:style-name="Text_20_body"/>
        <text:p text:style-name="P144">onde:</text:p>
        <text:p text:style-name="P145">N=número de elementos da população</text:p>
        <text:p text:style-name="P163">Z=valor da ordenada na curva normal padronizada p=proporção da amostra que representa a população q=proporção da amostra que não representa a população e=erro máximo amostral</text:p>
        <text:p text:style-name="P94"/>
        <text:list xml:id="list85110663126332" text:continue-numbering="true" text:style-name="WWNum9">
          <text:list-item>
            <text:h text:style-name="P240" text:outline-level="3">A<text:span text:style-name="T76"> </text:span>quantidade<text:span text:style-name="T76"> </text:span>mensal<text:span text:style-name="T76"> </text:span>de<text:span text:style-name="T71"> </text:span>medições<text:span text:style-name="T67"> </text:span>(número<text:span text:style-name="T88"> </text:span>de<text:span text:style-name="T64"> </text:span>passageiros<text:span text:style-name="T67"> </text:span>observados<text:span text:style-name="T88"> </text:span>nas<text:span text:style-name="T67"> </text:span>filas),<text:span text:style-name="T69"> </text:span>segue o<text:span text:style-name="T88"> </text:span>mesmo<text:span text:style-name="T64"> </text:span>número<text:span text:style-name="T73"> </text:span>da<text:span text:style-name="T64"> </text:span>pesquisa<text:span text:style-name="T82"> </text:span>de<text:span text:style-name="T64"> </text:span>satisfação<text:span text:style-name="T71"> </text:span>de<text:span text:style-name="T71"> </text:span>passageiros<text:span text:style-name="T88"> </text:span>para<text:span text:style-name="T82"> </text:span>o<text:span text:style-name="T69"> </text:span>embarque<text:span text:style-name="T74"> </text:span>doméstico e o embarque internacional, <text:span text:style-name="T91">desconsiderando-se a divisão por companhia</text:span><text:span text:style-name="T83"> </text:span><text:span text:style-name="T91">aérea</text:span>.</text:h>
          </text:list-item>
        </text:list>
        <text:p text:style-name="P130"><text:span text:style-name="T91">Método de coleta</text:span>: as medições são diárias nos dias de coleta, com meta de 3 medições ao dia e intervalo<text:span text:style-name="T64"> </text:span>mínimo<text:span text:style-name="T84"> </text:span>de<text:span text:style-name="T82"> </text:span>5<text:span text:style-name="T71"> </text:span>minutos<text:span text:style-name="T82"> </text:span>entre<text:span text:style-name="T71"> </text:span>uma<text:span text:style-name="T82"> </text:span>coleta<text:span text:style-name="T71"> </text:span>e<text:span text:style-name="T86"> </text:span>outra<text:span text:style-name="T84"> </text:span>na<text:span text:style-name="T82"> </text:span>mesma<text:span text:style-name="T71"> </text:span>fila<text:span text:style-name="T71"> </text:span>de<text:span text:style-name="T71"> </text:span>inspeção<text:span text:style-name="T71"> </text:span>de<text:span text:style-name="T82"> </text:span>segurança.</text:p>
      </text:section>
      <text:section text:style-name="Sect2" text:name="Seção3">
        <text:p text:style-name="P374"/>
        <text:p text:style-name="Text_20_body"/>
        <text:p text:style-name="P89"/>
        <text:p text:style-name="P129">filas):</text:p>
        <text:list xml:id="list85109574617053" text:continue-list="list85110661436447" text:style-name="WWNum12">
          <text:list-item>
            <text:list>
              <text:list-item>
                <text:list>
                  <text:list-item>
                    <text:h text:style-name="P239" text:outline-level="3">Medições de<text:span text:style-name="T2"> </text:span>Emigração</text:h>
                  </text:list-item>
                </text:list>
              </text:list-item>
            </text:list>
          </text:list-item>
        </text:list>
        <text:p text:style-name="P169">Metodologia para definição do número de medições (passageiros a serem observados nas</text:p>
      </text:section>
      <text:section text:style-name="Sect1" text:name="Seção4">
        <text:p text:style-name="P166"/>
        <text:list xml:id="list3166641739" text:style-name="WWNum8">
          <text:list-item>
            <text:p text:style-name="P320"><text:span text:style-name="T4">Estudo</text:span><text:span text:style-name="T53"> </text:span><text:span text:style-name="T4">de</text:span><text:span text:style-name="T8"> </text:span><text:span text:style-name="T4">todas</text:span><text:span text:style-name="T26"> </text:span><text:span text:style-name="T4">as</text:span><text:span text:style-name="T26"> </text:span><text:span text:style-name="T4">companhias</text:span><text:span text:style-name="T26"> </text:span><text:span text:style-name="T4">aéreas</text:span><text:span text:style-name="T26"> </text:span><text:span text:style-name="T4">que</text:span><text:span text:style-name="T8"> </text:span><text:span text:style-name="T4">operam</text:span><text:span text:style-name="T26"> </text:span><text:span text:style-name="T4">na</text:span><text:span text:style-name="T26"> </text:span><text:span text:style-name="T4">hora</text:span><text:span text:style-name="T26"> </text:span><text:span text:style-name="T4">de</text:span><text:span text:style-name="T8"> </text:span><text:span text:style-name="T4">maior</text:span><text:span text:style-name="T46"> </text:span><text:span text:style-name="T4">fluxo</text:span><text:span text:style-name="T46"> </text:span><text:span text:style-name="T4">de</text:span><text:span text:style-name="T8"> </text:span><text:span text:style-name="T4">passageiros em cada aeroporto no estrato embarque</text:span><text:span text:style-name="T38"> </text:span><text:span text:style-name="T4">internacional;</text:span></text:p>
          </text:list-item>
          <text:list-item>
            <text:p text:style-name="P262"><text:span text:style-name="T4">Cálculo do número de assentos por semana na hora de maior</text:span><text:span text:style-name="T49"> </text:span><text:span text:style-name="T4">fluxo;</text:span></text:p>
          </text:list-item>
          <text:list-item>
            <text:p text:style-name="P267"><text:span text:style-name="T4">Aplicação do </text:span><text:span text:style-name="T5">loadfactor </text:span><text:span text:style-name="T4">de</text:span><text:span text:style-name="T56"> </text:span><text:span text:style-name="T4">0,8;</text:span></text:p>
          </text:list-item>
          <text:list-item>
            <text:p text:style-name="P326"><text:span text:style-name="T4">Cálculo de número de assentos por mês na hora de maior fluxo de passageiros, considerando-se o número de assentos</text:span><text:span text:style-name="T23"> </text:span><text:span text:style-name="T4">semanal;</text:span></text:p>
          </text:list-item>
          <text:list-item>
            <text:p text:style-name="P316"><text:span text:style-name="T4">Cálculo estatístico para população finita, uma vez que há o número exato de assentos disponíveis (p= 0,5: proporção da amostra que representa a população (=) q=0,5: proporção da amostra que não representa a</text:span><text:span text:style-name="T11"> </text:span><text:span text:style-name="T4">população).</text:span></text:p>
          </text:list-item>
        </text:list>
        <text:p text:style-name="P171">Observação: fórmula utilizada para calcular o número de elementos na amostra para população finita:</text:p>
        <text:p text:style-name="Text_20_body"/>
        <text:p text:style-name="P162">N=N.Z<text:span text:style-name="T93">2</text:span>.p.q/e<text:span text:style-name="T93">2</text:span>.(n-1)+Z<text:span text:style-name="T93">2</text:span>.p.q</text:p>
        <text:p text:style-name="Text_20_body"/>
        <text:p text:style-name="P143">onde:</text:p>
        <text:p text:style-name="P143">N=número de elementos da população</text:p>
        <text:p text:style-name="P163">Z=valor da ordenada na curva normal padronizada p=proporção da amostra que representa a população q=proporção da amostra que não representa a população e=erro máximo amostral</text:p>
        <text:p text:style-name="P94"/>
        <text:list xml:id="list85110057925748" text:continue-numbering="true" text:style-name="WWNum8">
          <text:list-item>
            <text:h text:style-name="P241" text:outline-level="3">A<text:span text:style-name="T76"> </text:span>quantidade<text:span text:style-name="T76"> </text:span>mensal<text:span text:style-name="T76"> </text:span>de<text:span text:style-name="T71"> </text:span>medições<text:span text:style-name="T67"> </text:span>(número<text:span text:style-name="T88"> </text:span>de<text:span text:style-name="T64"> </text:span>passageiros<text:span text:style-name="T76"> </text:span>observados<text:span text:style-name="T69"> </text:span>nas<text:span text:style-name="T67"> </text:span>filas),<text:span text:style-name="T88"> </text:span>segue o mesmo número da pesquisa de satisfação de passageiros para o embarque internacional, <text:span text:style-name="T91">desconsiderando-se a divisão por companhia</text:span><text:span text:style-name="T65"> </text:span><text:span text:style-name="T91">aérea</text:span>.</text:h>
          </text:list-item>
        </text:list>
        <text:p text:style-name="P131"><text:span text:style-name="T91">Método de coleta</text:span>: as medições são diárias nos dias de coleta, com meta de 3 medições ao dia e intervalo mínimo de 2 minutos entre uma coleta e outra na mesma fila de emigração.</text:p>
        <text:p text:style-name="Text_20_body"/>
        <text:p text:style-name="P106"/>
        <text:list xml:id="list85110601278748" text:continue-list="list85109574617053" text:style-name="WWNum12">
          <text:list-item>
            <text:list>
              <text:list-item>
                <text:list>
                  <text:list-item>
                    <text:h text:style-name="P234" text:outline-level="3">Medições de Cartão de<text:span text:style-name="T74"> </text:span>Embarque</text:h>
                  </text:list-item>
                </text:list>
              </text:list-item>
            </text:list>
          </text:list-item>
        </text:list>
        <text:p text:style-name="P57">Metodologia para definição do número de medições (voos a serem observados):</text:p>
        <text:list xml:id="list4290281370" text:style-name="WWNum7">
          <text:list-item>
            <text:p text:style-name="P321"><text:span text:style-name="T4">Estudo</text:span><text:span text:style-name="T53"> </text:span><text:span text:style-name="T4">de</text:span><text:span text:style-name="T8"> </text:span><text:span text:style-name="T4">todas</text:span><text:span text:style-name="T26"> </text:span><text:span text:style-name="T4">as</text:span><text:span text:style-name="T26"> </text:span><text:span text:style-name="T4">companhias</text:span><text:span text:style-name="T26"> </text:span><text:span text:style-name="T4">aéreas</text:span><text:span text:style-name="T26"> </text:span><text:span text:style-name="T4">que</text:span><text:span text:style-name="T8"> </text:span><text:span text:style-name="T4">operam</text:span><text:span text:style-name="T26"> </text:span><text:span text:style-name="T4">na</text:span><text:span text:style-name="T26"> </text:span><text:span text:style-name="T4">hora</text:span><text:span text:style-name="T26"> </text:span><text:span text:style-name="T4">de</text:span><text:span text:style-name="T8"> </text:span><text:span text:style-name="T4">maior</text:span><text:span text:style-name="T46"> </text:span><text:span text:style-name="T4">fluxo</text:span><text:span text:style-name="T46"> </text:span><text:span text:style-name="T4">de</text:span><text:span text:style-name="T8"> </text:span><text:span text:style-name="T4">passageiros em cada aeroporto nos 2 estratos: embarque doméstico e embarque</text:span><text:span text:style-name="T43"> </text:span><text:span text:style-name="T4">internacional;</text:span></text:p>
          </text:list-item>
          <text:list-item>
            <text:p text:style-name="P307"><text:span text:style-name="T4">Percentual de participação de cada companhia no horário de maior fluxo de passageiros (horário de Brasília), considerado o número de voos por semana na hora de maior</text:span><text:span text:style-name="T59"> </text:span><text:span text:style-name="T4">fluxo;</text:span></text:p>
          </text:list-item>
          <text:list-item>
            <text:p text:style-name="P332"><text:span text:style-name="T4">Cálculo</text:span><text:span text:style-name="T26"> </text:span><text:span text:style-name="T4">do</text:span><text:span text:style-name="T46"> </text:span><text:span text:style-name="T4">número</text:span><text:span text:style-name="T26"> </text:span><text:span text:style-name="T4">de</text:span><text:span text:style-name="T14"> </text:span><text:span text:style-name="T4">voos</text:span><text:span text:style-name="T26"> </text:span><text:span text:style-name="T4">por</text:span><text:span text:style-name="T46"> </text:span><text:span text:style-name="T4">mês</text:span><text:span text:style-name="T49"> </text:span><text:span text:style-name="T4">na</text:span><text:span text:style-name="T46"> </text:span><text:span text:style-name="T4">hora</text:span><text:span text:style-name="T26"> </text:span><text:span text:style-name="T4">de</text:span><text:span text:style-name="T8"> </text:span><text:span text:style-name="T4">maior</text:span><text:span text:style-name="T8"> </text:span><text:span text:style-name="T4">fluxo</text:span><text:span text:style-name="T46"> </text:span><text:span text:style-name="T4">de</text:span><text:span text:style-name="T46"> </text:span><text:span text:style-name="T4">passageiros,</text:span><text:span text:style-name="T53"> </text:span><text:span text:style-name="T4">considerando- se o número de voos semanal;</text:span></text:p>
          </text:list-item>
          <text:list-item>
            <text:p text:style-name="P314"><text:span text:style-name="T4">Cálculo estatístico para população finita, uma vez que há o número exato de voos disponíveis (p= 0,9: proporção da amostra que representa a população (=) q=0,1: proporção da amostra que não representa a população), justificado pela alta proporção da</text:span><text:span text:style-name="T31"> </text:span><text:span text:style-name="T4">amostra</text:span><text:span text:style-name="T14"> </text:span><text:span text:style-name="T4">que</text:span><text:span text:style-name="T17"> </text:span><text:span text:style-name="T4">representa</text:span><text:span text:style-name="T31"> </text:span><text:span text:style-name="T4">a</text:span><text:span text:style-name="T14"> </text:span><text:span text:style-name="T4">população</text:span><text:span text:style-name="T17"> </text:span><text:span text:style-name="T4">neste</text:span><text:span text:style-name="T11"> </text:span><text:span text:style-name="T4">elemento</text:span><text:span text:style-name="T38"> </text:span><text:span text:style-name="T4">avaliado</text:span><text:span text:style-name="T20"> </text:span><text:span text:style-name="T4">por</text:span><text:span text:style-name="T17"> </text:span><text:span text:style-name="T4">ser</text:span><text:span text:style-name="T17"> </text:span><text:span text:style-name="T4">trâmite</text:span><text:span text:style-name="T11"> </text:span><text:span text:style-name="T4">padrão, com desvio amostral baixo e dispersão praticamente</text:span><text:span text:style-name="T17"> </text:span><text:span text:style-name="T4">nula;</text:span></text:p>
          </text:list-item>
        </text:list>
      </text:section>
      <text:p text:style-name="P372">Observação: fórmula utilizada para calcular o número de elementos na amostra para população finita:</text:p>
      <text:p text:style-name="P138"/>
      <text:p text:style-name="P162">N=N.Z<text:span text:style-name="T93">2</text:span>.p.q/e<text:span text:style-name="T93">2</text:span>.(n-1)+Z<text:span text:style-name="T93">2</text:span>.p.q</text:p>
      <text:p text:style-name="Text_20_body"/>
      <text:p text:style-name="P143">onde:</text:p>
      <text:p text:style-name="P143">N=número de elementos da população</text:p>
      <text:p text:style-name="P163">Z=valor da ordenada na curva normal padronizada p=proporção da amostra que representa a população q=proporção da amostra que não representa a população e=erro máximo amostral</text:p>
      <text:p text:style-name="P84"/>
      <text:list xml:id="list85109955928266" text:continue-numbering="true" text:style-name="WWNum7">
        <text:list-item>
          <text:p text:style-name="P327"><text:span text:style-name="T4">Amostras distribuídas por companhia aérea, ou seja, número de medições a serem coletadas por cia. aérea</text:span><text:span text:style-name="T35"> </text:span><text:span text:style-name="T4">diariamente/mensalmente;</text:span></text:p>
        </text:list-item>
      </text:list>
      <text:p text:style-name="P173">Observação: para o cálculo da amostra do elemento Cartão de Embarque não foi considerado o <text:span text:style-name="T94">load factor </text:span>de 0,8, uma vez que a população em análise é o número de voos.</text:p>
      <text:p text:style-name="P174"><text:span text:style-name="T91">Método de coleta</text:span>: as medições são diárias nos dias de coleta, garantindo-se a representatividade da amostra mensal.</text:p>
      <text:p text:style-name="P1"/>
      <text:p text:style-name="P126"/>
      <text:section text:style-name="Sect2" text:name="Seção5">
        <text:p text:style-name="Text_20_body"/>
        <text:p text:style-name="Text_20_body"/>
        <text:p text:style-name="P140"/>
        <text:p text:style-name="P129">filas):</text:p>
        <text:list xml:id="list85110573135396" text:continue-list="list85110601278748" text:style-name="WWNum12">
          <text:list-item>
            <text:list>
              <text:list-item>
                <text:list>
                  <text:list-item>
                    <text:h text:style-name="P242" text:outline-level="3">Medições de<text:span text:style-name="T74"> </text:span>Imigração</text:h>
                  </text:list-item>
                </text:list>
              </text:list-item>
            </text:list>
          </text:list-item>
        </text:list>
        <text:p text:style-name="P168">Metodologia para definição do número de medições (passageiros a serem observados nas</text:p>
      </text:section>
      <text:section text:style-name="Sect1" text:name="Seção6">
        <text:p text:style-name="P85"/>
        <text:list xml:id="list1621914959" text:style-name="WWNum6">
          <text:list-item>
            <text:p text:style-name="P322"><text:span text:style-name="T4">Estudo</text:span><text:span text:style-name="T53"> </text:span><text:span text:style-name="T4">de</text:span><text:span text:style-name="T8"> </text:span><text:span text:style-name="T4">todas</text:span><text:span text:style-name="T26"> </text:span><text:span text:style-name="T4">as</text:span><text:span text:style-name="T26"> </text:span><text:span text:style-name="T4">companhias</text:span><text:span text:style-name="T26"> </text:span><text:span text:style-name="T4">aéreas</text:span><text:span text:style-name="T26"> </text:span><text:span text:style-name="T4">que</text:span><text:span text:style-name="T8"> </text:span><text:span text:style-name="T4">operam</text:span><text:span text:style-name="T26"> </text:span><text:span text:style-name="T4">na</text:span><text:span text:style-name="T26"> </text:span><text:span text:style-name="T4">hora</text:span><text:span text:style-name="T26"> </text:span><text:span text:style-name="T4">de</text:span><text:span text:style-name="T8"> </text:span><text:span text:style-name="T4">maior</text:span><text:span text:style-name="T46"> </text:span><text:span text:style-name="T4">fluxo</text:span><text:span text:style-name="T46"> </text:span><text:span text:style-name="T4">de</text:span><text:span text:style-name="T8"> </text:span><text:span text:style-name="T4">passageiros em cada aeroporto no estrato desembarque</text:span><text:span text:style-name="T35"> </text:span><text:span text:style-name="T4">internacional;</text:span></text:p>
          </text:list-item>
          <text:list-item>
            <text:p text:style-name="P263"><text:span text:style-name="T4">Cálculo do número de assentos por semana na hora de maior</text:span><text:span text:style-name="T49"> </text:span><text:span text:style-name="T4">fluxo;</text:span></text:p>
          </text:list-item>
          <text:list-item>
            <text:p text:style-name="P275"><text:span text:style-name="T4">Aplicação do </text:span><text:span text:style-name="T5">loadfactor </text:span><text:span text:style-name="T4">de 0,8;</text:span></text:p>
          </text:list-item>
          <text:list-item>
            <text:p text:style-name="P328"><text:span text:style-name="T4">Cálculo de número de assentos por mês na hora de maior fluxo de passageiros, considerando-se o número de assentos</text:span><text:span text:style-name="T23"> </text:span><text:span text:style-name="T4">semanal;</text:span></text:p>
          </text:list-item>
          <text:list-item>
            <text:p text:style-name="P317"><text:span text:style-name="T4">Cálculo estatístico para população finita, uma vez que há o número exato de assentos disponíveis (p= 0,5: proporção da amostra que representa a população (=) q=0,5: proporção da amostra que não representa a</text:span><text:span text:style-name="T11"> </text:span><text:span text:style-name="T4">população).</text:span></text:p>
          </text:list-item>
        </text:list>
        <text:p text:style-name="P160">Observação: fórmula utilizada para calcular o número de elementos na amostra para população finita:</text:p>
        <text:p text:style-name="P119"/>
        <text:p text:style-name="P161">N=N.Z<text:span text:style-name="T93">2</text:span>.p.q/e<text:span text:style-name="T93">2</text:span>.(n-1)+Z<text:span text:style-name="T93">2</text:span>.p.q</text:p>
        <text:p text:style-name="P84"/>
        <text:p text:style-name="P144">onde:</text:p>
        <text:p text:style-name="P143">N=número de elementos da população</text:p>
        <text:p text:style-name="P163">Z=valor da ordenada na curva normal padronizada p=proporção da amostra que representa a população q=proporção da amostra que não representa a população e=erro máximo amostral</text:p>
        <text:p text:style-name="P84"/>
        <text:list xml:id="list85109593381003" text:continue-numbering="true" text:style-name="WWNum6">
          <text:list-item>
            <text:h text:style-name="P236" text:outline-level="3">A<text:span text:style-name="T76"> </text:span>quantidade<text:span text:style-name="T76"> </text:span>mensal<text:span text:style-name="T76"> </text:span>de<text:span text:style-name="T71"> </text:span>medições<text:span text:style-name="T67"> </text:span>(número<text:span text:style-name="T69"> </text:span><text:span text:style-name="T95">de</text:span><text:span text:style-name="T64"> </text:span>passageiros<text:span text:style-name="T76"> </text:span>observados<text:span text:style-name="T69"> </text:span>nas<text:span text:style-name="T67"> </text:span>filas),<text:span text:style-name="T88"> </text:span>segue o mesmo número da pesquisa de satisfação de passageiros para o desembarque internacional, <text:span text:style-name="T91">desconsiderando-se a divisão por companhia</text:span><text:span text:style-name="T89"> </text:span><text:span text:style-name="T91">aérea</text:span>.</text:h>
          </text:list-item>
        </text:list>
      </text:section>
      <text:p text:style-name="P375"><text:span text:style-name="T91">Método de coleta</text:span>: as medições são diárias nos dias de coleta, com meta mínima de 3 medições ao dia na mesma fila de emigração: medição de tempo de espera na fila dos passageiros que ocupam as posições n.20, n.80 e último passageiro da fila.</text:p>
      <text:p text:style-name="P1"/>
      <text:p text:style-name="P1"/>
      <text:p text:style-name="P107"/>
      <text:section text:style-name="Sect2" text:name="Seção7">
        <text:p text:style-name="Text_20_body"/>
        <text:p text:style-name="Text_20_body"/>
        <text:p text:style-name="P140"/>
        <text:p text:style-name="P129">filas):</text:p>
        <text:list xml:id="list85110894481227" text:continue-list="list85110573135396" text:style-name="WWNum12">
          <text:list-item>
            <text:list>
              <text:list-item>
                <text:list>
                  <text:list-item>
                    <text:h text:style-name="P242" text:outline-level="3">Medições de Controle<text:span text:style-name="T92"> </text:span>Aduaneiro</text:h>
                  </text:list-item>
                </text:list>
              </text:list-item>
            </text:list>
          </text:list-item>
        </text:list>
        <text:p text:style-name="P168">Metodologia para definição do número de medições (passageiros a serem observados nas</text:p>
      </text:section>
      <text:section text:style-name="Sect1" text:name="Seção8">
        <text:p text:style-name="P85"/>
        <text:list xml:id="list1201326767" text:style-name="WWNum5">
          <text:list-item>
            <text:p text:style-name="P323"><text:span text:style-name="T4">Estudo</text:span><text:span text:style-name="T53"> </text:span><text:span text:style-name="T4">de</text:span><text:span text:style-name="T8"> </text:span><text:span text:style-name="T4">todas</text:span><text:span text:style-name="T26"> </text:span><text:span text:style-name="T4">as</text:span><text:span text:style-name="T26"> </text:span><text:span text:style-name="T4">companhias</text:span><text:span text:style-name="T26"> </text:span><text:span text:style-name="T4">aéreas</text:span><text:span text:style-name="T26"> </text:span><text:span text:style-name="T4">que</text:span><text:span text:style-name="T8"> </text:span><text:span text:style-name="T4">operam</text:span><text:span text:style-name="T26"> </text:span><text:span text:style-name="T4">na</text:span><text:span text:style-name="T26"> </text:span><text:span text:style-name="T4">hora</text:span><text:span text:style-name="T26"> </text:span><text:span text:style-name="T4">de</text:span><text:span text:style-name="T8"> </text:span><text:span text:style-name="T4">maior</text:span><text:span text:style-name="T46"> </text:span><text:span text:style-name="T4">fluxo</text:span><text:span text:style-name="T46"> </text:span><text:span text:style-name="T4">de</text:span><text:span text:style-name="T8"> </text:span><text:span text:style-name="T4">passageiros em cada aeroporto no estrato desembarque</text:span><text:span text:style-name="T35"> </text:span><text:span text:style-name="T4">internacional;</text:span></text:p>
          </text:list-item>
          <text:list-item>
            <text:p text:style-name="P264"><text:span text:style-name="T4">Cálculo do número de assentos por semana na hora de maior</text:span><text:span text:style-name="T49"> </text:span><text:span text:style-name="T4">fluxo;</text:span></text:p>
          </text:list-item>
          <text:list-item>
            <text:p text:style-name="P268"><text:span text:style-name="T4">Aplicação do </text:span><text:span text:style-name="T5">loadfactor </text:span><text:span text:style-name="T4">de</text:span><text:span text:style-name="T56"> </text:span><text:span text:style-name="T4">0,8;</text:span></text:p>
          </text:list-item>
          <text:list-item>
            <text:p text:style-name="P329"><text:span text:style-name="T4">Cálculo de número de assentos por mês na hora de maior fluxo de passageiros, considerando-se o número de assentos</text:span><text:span text:style-name="T23"> </text:span><text:span text:style-name="T4">semanal;</text:span></text:p>
          </text:list-item>
          <text:list-item>
            <text:p text:style-name="P318"><text:span text:style-name="T4">Cálculo estatístico para população finita, uma vez que há o número exato de assentos disponíveis (p= 0,5: proporção da amostra que representa a população (=) q=0,5: proporção da amostra que não representa a</text:span><text:span text:style-name="T11"> </text:span><text:span text:style-name="T4">população).</text:span></text:p>
          </text:list-item>
        </text:list>
        <text:p text:style-name="P159">Observação: fórmula utilizada para calcular o número de elementos na amostra para população finita:</text:p>
        <text:p text:style-name="Text_20_body"/>
        <text:p text:style-name="P162">N=N.Z<text:span text:style-name="T93">2</text:span>.p.q/e<text:span text:style-name="T93">2</text:span>.(n-1)+Z<text:span text:style-name="T93">2</text:span>.p.q</text:p>
        <text:p text:style-name="P176"/>
        <text:p text:style-name="P143">onde:</text:p>
        <text:p text:style-name="P143">N=número de elementos da população</text:p>
        <text:p text:style-name="P163">Z=valor da ordenada na curva normal padronizada p=proporção da amostra que representa a população q=proporção da amostra que não representa a população e=erro máximo amostral</text:p>
        <text:p text:style-name="P84"/>
        <text:list xml:id="list85110554319845" text:continue-numbering="true" text:style-name="WWNum5">
          <text:list-item>
            <text:h text:style-name="P237" text:outline-level="3">A<text:span text:style-name="T76"> </text:span>quantidade<text:span text:style-name="T67"> </text:span>mensal<text:span text:style-name="T67"> </text:span>de<text:span text:style-name="T71"> </text:span>medições<text:span text:style-name="T67"> </text:span>(número<text:span text:style-name="T69"> </text:span>de<text:span text:style-name="T64"> </text:span>passageiros<text:span text:style-name="T67"> </text:span>observados<text:span text:style-name="T69"> </text:span>nas<text:span text:style-name="T67"> </text:span>filas),<text:span text:style-name="T69"> </text:span>segue o mesmo número da pesquisa de satisfação de passageiros para o desembarque internacional, <text:span text:style-name="T91">desconsiderando-se a divisão por companhia</text:span><text:span text:style-name="T89"> </text:span><text:span text:style-name="T91">aérea</text:span>.</text:h>
          </text:list-item>
        </text:list>
        <text:p text:style-name="P175"><text:span text:style-name="T91">Método de coleta</text:span>: as medições são diárias nos dias de coleta, com meta mínima de 3 medições ao dia: 2 medições na fila de “nada a declarar” e 1 medição na fila de “bens a declarar”.</text:p>
        <text:p text:style-name="Text_20_body"/>
        <text:p text:style-name="P141"/>
        <text:list xml:id="list85110903715943" text:continue-list="list85110894481227" text:style-name="WWNum12">
          <text:list-item>
            <text:list>
              <text:list-item>
                <text:list>
                  <text:list-item>
                    <text:h text:style-name="P234" text:outline-level="3">Medições de Restituição de<text:span text:style-name="T76"> </text:span>Bagagem</text:h>
                  </text:list-item>
                </text:list>
              </text:list-item>
            </text:list>
          </text:list-item>
        </text:list>
        <text:p text:style-name="P57">Metodologia para definição do número de medições (voos a serem observados):</text:p>
        <text:list xml:id="list2268321637" text:style-name="WWNum4">
          <text:list-item>
            <text:p text:style-name="P291"><text:span text:style-name="T4">Estudo</text:span><text:span text:style-name="T53"> </text:span><text:span text:style-name="T4">de</text:span><text:span text:style-name="T8"> </text:span><text:span text:style-name="T4">todas</text:span><text:span text:style-name="T8"> </text:span><text:span text:style-name="T4">as</text:span><text:span text:style-name="T26"> </text:span><text:span text:style-name="T4">companhias</text:span><text:span text:style-name="T26"> </text:span><text:span text:style-name="T4">aéreas</text:span><text:span text:style-name="T26"> </text:span><text:span text:style-name="T4">que</text:span><text:span text:style-name="T8"> </text:span><text:span text:style-name="T4">operam</text:span><text:span text:style-name="T26"> </text:span><text:span text:style-name="T4">na</text:span><text:span text:style-name="T26"> </text:span><text:span text:style-name="T4">hora</text:span><text:span text:style-name="T26"> </text:span><text:span text:style-name="T4">de</text:span><text:span text:style-name="T8"> </text:span><text:span text:style-name="T4">maior</text:span><text:span text:style-name="T46"> </text:span><text:span text:style-name="T4">fluxo</text:span><text:span text:style-name="T46"> </text:span><text:span text:style-name="T4">de</text:span><text:span text:style-name="T8"> </text:span><text:span text:style-name="T4">passageiros em cada aeroporto nos 2 estratos: desembarque doméstico e desembarque internacional;</text:span></text:p>
          </text:list-item>
          <text:list-item>
            <text:p text:style-name="P308"><text:span text:style-name="T4">Percentual de participação de cada companhia no horário de maior fluxo de passageiros (horário de Brasília), considerado o número de voos por semana na hora de maior</text:span><text:span text:style-name="T59"> </text:span><text:span text:style-name="T4">fluxo;</text:span></text:p>
          </text:list-item>
          <text:list-item>
            <text:p text:style-name="P333"><text:span text:style-name="T4">Cálculo</text:span><text:span text:style-name="T26"> </text:span><text:span text:style-name="T4">do</text:span><text:span text:style-name="T46"> </text:span><text:span text:style-name="T4">número</text:span><text:span text:style-name="T26"> </text:span><text:span text:style-name="T4">de</text:span><text:span text:style-name="T14"> </text:span><text:span text:style-name="T4">voos</text:span><text:span text:style-name="T26"> </text:span><text:span text:style-name="T4">por</text:span><text:span text:style-name="T46"> </text:span><text:span text:style-name="T4">mês</text:span><text:span text:style-name="T49"> </text:span><text:span text:style-name="T4">na</text:span><text:span text:style-name="T46"> </text:span><text:span text:style-name="T4">hora</text:span><text:span text:style-name="T26"> </text:span><text:span text:style-name="T4">de</text:span><text:span text:style-name="T8"> </text:span><text:span text:style-name="T4">maior</text:span><text:span text:style-name="T8"> </text:span><text:span text:style-name="T4">fluxo</text:span><text:span text:style-name="T46"> </text:span><text:span text:style-name="T4">de</text:span><text:span text:style-name="T46"> </text:span><text:span text:style-name="T4">passageiros,</text:span><text:span text:style-name="T53"> </text:span><text:span text:style-name="T4">considerando- se o número de voos semanal;</text:span></text:p>
          </text:list-item>
        </text:list>
      </text:section>
      <text:list xml:id="list85111494070961" text:continue-numbering="true" text:style-name="WWNum4">
        <text:list-item>
          <text:p text:style-name="P311"><text:span text:style-name="T4">Cálculo estatístico para população finita, uma vez que há o número exato de voos disponíveis (p= 0,9: proporção da amostra que representa a população (=) q=0,1: proporção da amostra que não representa a população), justificado pela alta proporção da</text:span><text:span text:style-name="T31"> </text:span><text:span text:style-name="T4">amostra</text:span><text:span text:style-name="T20"> </text:span><text:span text:style-name="T4">que</text:span><text:span text:style-name="T11"> </text:span><text:span text:style-name="T4">representa</text:span><text:span text:style-name="T38"> </text:span><text:span text:style-name="T4">a</text:span><text:span text:style-name="T14"> </text:span><text:span text:style-name="T4">população</text:span><text:span text:style-name="T17"> </text:span><text:span text:style-name="T4">neste</text:span><text:span text:style-name="T17"> </text:span><text:span text:style-name="T4">elemento</text:span><text:span text:style-name="T38"> </text:span><text:span text:style-name="T4">avaliado</text:span><text:span text:style-name="T20"> </text:span><text:span text:style-name="T4">por</text:span><text:span text:style-name="T31"> </text:span><text:span text:style-name="T4">ser</text:span><text:span text:style-name="T11"> </text:span><text:span text:style-name="T4">trâmite</text:span><text:span text:style-name="T17"> </text:span><text:span text:style-name="T4">padrão, com desvio amostral baixo e dispersão praticamente</text:span><text:span text:style-name="T17"> </text:span><text:span text:style-name="T4">nula;</text:span></text:p>
        </text:list-item>
      </text:list>
      <text:p text:style-name="P159">Observação: fórmula utilizada para calcular o número de elementos na amostra para população finita:</text:p>
      <text:p text:style-name="P84"/>
      <text:p text:style-name="P161">N=N.Z<text:span text:style-name="T93">2</text:span>.p.q/e<text:span text:style-name="T93">2</text:span>.(n-1)+Z<text:span text:style-name="T93">2</text:span>.p.q</text:p>
      <text:p text:style-name="P84"/>
      <text:p text:style-name="P144">onde:</text:p>
      <text:p text:style-name="P143">N=número de elementos da população</text:p>
      <text:p text:style-name="P163">Z=valor da ordenada na curva normal padronizada p=proporção da amostra que representa a população q=proporção da amostra que não representa a população e=erro máximo amostral</text:p>
      <text:list xml:id="list85109626914201" text:continue-numbering="true" text:style-name="WWNum4">
        <text:list-item>
          <text:p text:style-name="P289"><text:span text:style-name="T4">Amostras distribuídas por companhia aérea, ou seja, número de medições a serem coletadas por companhia aérea</text:span><text:span text:style-name="T29"> </text:span><text:span text:style-name="T4">diariamente/mensalmente;</text:span></text:p>
        </text:list-item>
      </text:list>
      <text:p text:style-name="P106"/>
      <text:p text:style-name="P172">Observação: para o cálculo da amostra do elemento Restituição de Bagagem não foi considerado o <text:span text:style-name="T94">load factor </text:span>de 0,8, uma vez que a população em análise é o número de voos.</text:p>
      <text:p text:style-name="P150"/>
      <text:p text:style-name="P177"><text:span text:style-name="T91">Método</text:span><text:span text:style-name="T85"> </text:span><text:span text:style-name="T91">de</text:span><text:span text:style-name="T85"> </text:span><text:span text:style-name="T91">coleta</text:span>:<text:span text:style-name="T73"> </text:span>as<text:span text:style-name="T86"> </text:span>medições<text:span text:style-name="T71"> </text:span>são<text:span text:style-name="T82"> </text:span>diárias<text:span text:style-name="T71"> </text:span>nos<text:span text:style-name="T71"> </text:span>dias<text:span text:style-name="T71"> </text:span>de<text:span text:style-name="T73"> </text:span>coleta,<text:span text:style-name="T71"> </text:span>garantindo-se<text:span text:style-name="T71"> </text:span>a<text:span text:style-name="T71"> </text:span>representatividade da amostra<text:span text:style-name="T2"> </text:span>mensal.</text:p>
      <text:list xml:id="list85111534758861" text:continue-numbering="true" text:style-name="WWNum4">
        <text:list-item>
          <text:h text:style-name="P230" text:outline-level="2">PESQUISA DE SATISFAÇÃO DO<text:span text:style-name="T92"> </text:span>PASSAGEIRO</text:h>
        </text:list-item>
      </text:list>
      <text:p text:style-name="P178">A<text:span text:style-name="T92"> </text:span>pesquisa<text:span text:style-name="T76"> </text:span>de<text:span text:style-name="T74"> </text:span>satisfação<text:span text:style-name="T76"> </text:span>do<text:span text:style-name="T76"> </text:span>passageiro<text:span text:style-name="T92"> </text:span>consiste<text:span text:style-name="T76"> </text:span>na<text:span text:style-name="T92"> </text:span>realização<text:span text:style-name="T76"> </text:span>de<text:span text:style-name="T74"> </text:span>entrevistas<text:span text:style-name="T75"> </text:span>presenciais e individuais, por meio da aplicação de questionário padrão, com passageiros dentro das salas de embarque e desembarque dos aeroportos pesquisados, onde são avaliados diversos indicadores<text:span text:style-name="T76"> </text:span>referentes<text:span text:style-name="T67"> </text:span>a<text:span text:style-name="T64"> </text:span>aspectos<text:span text:style-name="T67"> </text:span>relacionados<text:span text:style-name="T74"> </text:span>à<text:span text:style-name="T76"> </text:span>infraestrutura,<text:span text:style-name="T74"> </text:span>serviços<text:span text:style-name="T92"> </text:span>e<text:span text:style-name="T69"> </text:span>processos<text:span text:style-name="T76"> </text:span>aos<text:span text:style-name="T69"> </text:span>quais<text:span text:style-name="T88"> </text:span>o passageiro foi<text:span text:style-name="T74"> </text:span>submetido.</text:p>
      <text:p text:style-name="P103"/>
      <text:p text:style-name="P137">A cada um dos indicadores deve ser atribuída uma nota pelo entrevistado que represente seu nível de satisfação com o serviço/processo experimentado, em uma escala <text:span text:style-name="T94">likert </text:span>de 5 pontos (1 = muito ruim / 2 = ruim / 3 = regular / 4 = bom / 5 = muito bom). Além dos indicadores referentes a cada serviço/processo, também é avaliada a satisfação geral do passageiro com sua experiência com aquele aeroporto específico.</text:p>
      <text:p text:style-name="P103"/>
      <text:p text:style-name="P156">Juntamente com a pesquisa de satisfação também são coletadas informações pessoais dos entrevistados, de modo a estabelecer o perfil dos passageiros objeto de pesquisa, que não necessariamente será igual ao perfil de passageiros do aeroporto avaliado.</text:p>
      <text:p text:style-name="P86"/>
      <text:p text:style-name="P137">Trata-se de uma pesquisa quantitativa tipo <text:span text:style-name="T94">survey</text:span>, onde não são questionadas as justificativas<text:span text:style-name="T69"> </text:span>para<text:span text:style-name="T67"> </text:span>as<text:span text:style-name="T67"> </text:span>notas<text:span text:style-name="T74"> </text:span>atribuídas<text:span text:style-name="T67"> </text:span>a<text:span text:style-name="T67"> </text:span>cada<text:span text:style-name="T67"> </text:span>indicador.<text:span text:style-name="T67"> </text:span>Isso<text:span text:style-name="T67"> </text:span>a<text:span text:style-name="T67"> </text:span>torna<text:span text:style-name="T88"> </text:span>uma<text:span text:style-name="T67"> </text:span>pesquisa<text:span text:style-name="T67"> </text:span>subjetiva,<text:span text:style-name="T74"> </text:span>visto que cada entrevistado irá avaliar os diversos componentes dos aeroportos de modo único e pessoal.<text:span text:style-name="T69"> </text:span>A<text:span text:style-name="T76"> </text:span>satisfação<text:span text:style-name="T69"> </text:span>do<text:span text:style-name="T69"> </text:span>usuário<text:span text:style-name="T69"> </text:span>de<text:span text:style-name="T69"> </text:span>um<text:span text:style-name="T69"> </text:span>serviço<text:span text:style-name="T69"> </text:span>é<text:span text:style-name="T67"> </text:span>composta<text:span text:style-name="T76"> </text:span>pelo<text:span text:style-name="T69"> </text:span>binômio<text:span text:style-name="T69"> </text:span>expectativa<text:span text:style-name="T69"> </text:span>e<text:span text:style-name="T76"> </text:span>realidade, já que ela depende daquilo que é esperado pelo entrevistado e aquilo que é entregue pelo prestador do<text:span text:style-name="T92"> </text:span>serviço.</text:p>
      <text:p text:style-name="P103"/>
      <text:p text:style-name="P137">Apresentamos abaixo as orientações para a coleta de dados de satisfação dos passageiros:</text:p>
      <text:p text:style-name="P103"/>
      <text:list xml:id="list85110246935497" text:continue-list="list85111035699471" text:style-name="WWNum13">
        <text:list-item>
          <text:p text:style-name="P287"><text:span text:style-name="T4">A seleção dos passageiros é feita por amostragem probabilística aleatória simples, onde todos os passageiros têm a mesma chance de serem escolhidos como objeto de entrevista, porém buscando manter uma proporção de idade e</text:span><text:span text:style-name="T20"> </text:span><text:span text:style-name="T4">sexo;</text:span></text:p>
        </text:list-item>
        <text:list-item>
          <text:p text:style-name="P292"><text:span text:style-name="T4">As entrevistas são realizadas em diferentes pontos das salas de embarque e de desembarque, de modo a coletar avaliações de toda a área de espera dos</text:span><text:span text:style-name="T60"> </text:span><text:span text:style-name="T4">passageiros;</text:span></text:p>
        </text:list-item>
        <text:list-item>
          <text:p text:style-name="P290"><text:span text:style-name="T4">A aplicação das entrevistas é realizada por meio de equipamento eletrônico portátil, em software </text:span><text:span text:style-name="T5">off-line </text:span><text:span text:style-name="T4">de coletas, desenvolvido pela Praxian Consultoria</text:span><text:span text:style-name="T35"> </text:span><text:span text:style-name="T4">Ltda.;</text:span></text:p>
        </text:list-item>
        <text:list-item>
          <text:p text:style-name="P334"><text:span text:style-name="T4">O questionário da entrevista está disponível em 3 (três) idiomas: português, inglês e espanhol. Cada pesquisador possui questionários impressos nesses idiomas, em caso de falhas técnicas que impeçam a utilização dos equipamentos</text:span><text:span text:style-name="T14"> </text:span><text:span text:style-name="T4">eletrônicos;</text:span></text:p>
        </text:list-item>
        <text:list-item>
          <text:p text:style-name="P285"><text:span text:style-name="T4">Todas</text:span><text:span text:style-name="T17"> </text:span><text:span text:style-name="T4">as</text:span><text:span text:style-name="T17"> </text:span><text:span text:style-name="T4">entrevistas</text:span><text:span text:style-name="T17"> </text:span><text:span text:style-name="T4">realizadas</text:span><text:span text:style-name="T38"> </text:span><text:span text:style-name="T4">possuem</text:span><text:span text:style-name="T31"> </text:span><text:span text:style-name="T4">gravações</text:span><text:span text:style-name="T17"> </text:span><text:span text:style-name="T4">de</text:span><text:span text:style-name="T17"> </text:span><text:span text:style-name="T4">voz</text:span><text:span text:style-name="T31"> </text:span><text:span text:style-name="T4">das</text:span><text:span text:style-name="T14"> </text:span><text:span text:style-name="T4">perguntas</text:span><text:span text:style-name="T17"> </text:span><text:span text:style-name="T4">realizadas</text:span><text:span text:style-name="T20"> </text:span><text:span text:style-name="T4">pelos pesquisadores e das respectivas respostas dos</text:span><text:span text:style-name="T11"> </text:span><text:span text:style-name="T4">entrevistados;</text:span></text:p>
        </text:list-item>
        <text:list-item>
          <text:p text:style-name="P335"><text:span text:style-name="T4">Para orientar o passageiro no momento da entrevista, são disponibilizados cartões contendo as opções de resposta a cada item avaliado, de uso</text:span><text:span text:style-name="T49"> </text:span><text:span text:style-name="T4">obrigatório;</text:span></text:p>
        </text:list-item>
        <text:list-item>
          <text:p text:style-name="P331"><text:span text:style-name="T4">Caso o passageiro não tenha utilizado algum serviço disponibilizado pelo aeroporto ele não</text:span><text:span text:style-name="T11"> </text:span><text:span text:style-name="T4">avalia</text:span><text:span text:style-name="T17"> </text:span><text:span text:style-name="T4">tal</text:span><text:span text:style-name="T17"> </text:span><text:span text:style-name="T4">serviço,</text:span><text:span text:style-name="T17"> </text:span><text:span text:style-name="T4">sendo</text:span><text:span text:style-name="T17"> </text:span><text:span text:style-name="T4">atribuída</text:span><text:span text:style-name="T17"> </text:span><text:span text:style-name="T4">a</text:span><text:span text:style-name="T14"> </text:span><text:span text:style-name="T4">opção</text:span><text:span text:style-name="T31"> </text:span><text:span text:style-name="T4">“não</text:span><text:span text:style-name="T17"> </text:span><text:span text:style-name="T4">sabe”</text:span><text:span text:style-name="T17"> </text:span><text:span text:style-name="T4">ou</text:span><text:span text:style-name="T31"> </text:span><text:span text:style-name="T4">“não</text:span><text:span text:style-name="T17"> </text:span><text:span text:style-name="T4">se</text:span><text:span text:style-name="T17"> </text:span><text:span text:style-name="T4">aplica”,</text:span><text:span text:style-name="T17"> </text:span><text:span text:style-name="T4">conforme</text:span><text:span text:style-name="T11"> </text:span><text:span text:style-name="T4">o caso;</text:span></text:p>
        </text:list-item>
        <text:list-item>
          <text:p text:style-name="P324"><text:span text:style-name="T4">Em caso de passageiros viajando em grupo, apenas uma pessoa é entrevistada, solicitando-se aos demais que não interfiram em suas</text:span><text:span text:style-name="T26"> </text:span><text:span text:style-name="T4">respostas;</text:span></text:p>
        </text:list-item>
      </text:list>
      <text:list xml:id="list85111079446611" text:continue-list="list85111534758861" text:style-name="WWNum4">
        <text:list-item>
          <text:h text:style-name="P231" text:outline-level="2">INDICADORES DE SATISFAÇÃO DO<text:span text:style-name="T67"> </text:span>PASSAGEIRO</text:h>
        </text:list-item>
      </text:list>
      <text:p text:style-name="P154">Foram definidos 37 indicadores de satisfação do passageiro, os quais são agrupados tematicamente em função do responsável direto pelo processo/serviço, como segue:</text:p>
      <text:p text:style-name="P97"/>
      <text:list xml:id="list85110934485165" text:continue-list="list85110246935497" text:style-name="WWNum13">
        <text:list-item>
          <text:p text:style-name="P271">16 Indicadores de infraestrutura aeroportuária;</text:p>
        </text:list-item>
        <text:list-item>
          <text:p text:style-name="P269"><text:span text:style-name="T4">8 Indicadores de facilidades aos</text:span><text:span text:style-name="T31"> </text:span><text:span text:style-name="T4">passageiros;</text:span></text:p>
        </text:list-item>
        <text:list-item>
          <text:p text:style-name="P276"><text:span text:style-name="T4">6 Indicadores de companhias</text:span><text:span text:style-name="T38"> </text:span><text:span text:style-name="T4">aéreas;</text:span></text:p>
        </text:list-item>
        <text:list-item>
          <text:p text:style-name="P269"><text:span text:style-name="T4">6 Indicadores de órgãos públicos;</text:span><text:span text:style-name="T20"> </text:span><text:span text:style-name="T4">e</text:span></text:p>
        </text:list-item>
        <text:list-item>
          <text:p text:style-name="P269"><text:span text:style-name="T4">1 Indicador de transporte</text:span><text:span text:style-name="T35"> </text:span><text:span text:style-name="T4">público.</text:span></text:p>
        </text:list-item>
      </text:list>
      <text:p text:style-name="P148">Além<text:span text:style-name="T88"> </text:span>dos<text:span text:style-name="T88"> </text:span>indicadores<text:span text:style-name="T64"> </text:span>abaixo<text:span text:style-name="T64"> </text:span>discriminados,<text:span text:style-name="T71"> </text:span>o<text:span text:style-name="T71"> </text:span>passageiro<text:span text:style-name="T88"> </text:span>também<text:span text:style-name="T64"> </text:span>atribui<text:span text:style-name="T64"> </text:span>uma<text:span text:style-name="T88"> </text:span>nota<text:span text:style-name="T71"> </text:span>para sua satisfação geral com o aeroporto naquele dia, compondo um total de 38 indicadores coletados.</text:p>
      <text:p text:style-name="Text_20_body"/>
      <text:p text:style-name="P97"/>
      <text:list xml:id="list220346785" text:style-name="WWNum3">
        <text:list-item>
          <text:list>
            <text:list-item>
              <text:h text:style-name="P243" text:outline-level="3"><text:bookmark-start text:name="_TOC_250003"/>INDICADORES DE INFRAESTRUTURA<text:span text:style-name="T2"> </text:span><text:bookmark-end text:name="_TOC_250003"/>AEROPORTUÁRIA</text:h>
            </text:list-item>
          </text:list>
        </text:list-item>
      </text:list>
      <text:p text:style-name="P98"/>
      <text:p text:style-name="P179">Os<text:span text:style-name="T73"> </text:span>indicadores<text:span text:style-name="T71"> </text:span>de<text:span text:style-name="T64"> </text:span>infraestrutura<text:span text:style-name="T71"> </text:span>aeroportuária<text:span text:style-name="T64"> </text:span>avaliam<text:span text:style-name="T64"> </text:span>os<text:span text:style-name="T71"> </text:span>processos/serviços<text:span text:style-name="T88"> </text:span>prestados diretamente pelo operador do aeroporto, como a inspeção de segurança, os painéis de informação de voo e a qualidade da internet/<text:span text:style-name="T94">wi-fi</text:span>, bem como as instalações físicas do terminal, como banheiros, tomadas, limpeza e conforto das salas de<text:span text:style-name="T84"> </text:span>embarque.</text:p>
      <text:p text:style-name="P97"/>
      <text:list xml:id="list85111088598076" text:continue-numbering="true" text:style-name="WWNum3">
        <text:list-item>
          <text:list>
            <text:list-item>
              <text:list>
                <text:list-item>
                  <text:h text:style-name="P244" text:outline-level="3">Facilidade de Desembarque no<text:span text:style-name="T67"> </text:span>meio-fio</text:h>
                </text:list-item>
              </text:list>
            </text:list-item>
          </text:list>
        </text:list-item>
      </text:list>
      <text:p text:style-name="P113"/>
      <text:p text:style-name="P18">Esse<text:span text:style-name="T73"> </text:span>indicador<text:span text:style-name="T73"> </text:span>avalia<text:span text:style-name="T73"> </text:span>a<text:span text:style-name="T73"> </text:span>satisfação<text:span text:style-name="T71"> </text:span>do<text:span text:style-name="T73"> </text:span>passageiro<text:span text:style-name="T73"> </text:span>com<text:span text:style-name="T64"> </text:span>a<text:span text:style-name="T73"> </text:span>organização<text:span text:style-name="T73"> </text:span>geral<text:span text:style-name="T82"> </text:span>da<text:span text:style-name="T71"> </text:span>via<text:span text:style-name="T67"> </text:span>pública<text:span text:style-name="T64"> </text:span>em frente<text:span text:style-name="T88"> </text:span>ao<text:span text:style-name="T64"> </text:span>terminal<text:span text:style-name="T69"> </text:span>ao<text:span text:style-name="T64"> </text:span>desembarcar<text:span text:style-name="T73"> </text:span>do<text:span text:style-name="T88"> </text:span>meio<text:span text:style-name="T64"> </text:span>de<text:span text:style-name="T64"> </text:span>transporte<text:span text:style-name="T64"> </text:span>utilizado<text:span text:style-name="T67"> </text:span>em<text:span text:style-name="T64"> </text:span>seu<text:span text:style-name="T71"> </text:span>deslocamento até o aeroporto e a facilidade em realizar esse<text:span text:style-name="T67"> </text:span>procedimento.</text:p>
      <text:p text:style-name="P103"/>
      <text:p text:style-name="P205">Não respondem: passageiros em conexão; usuários de estacionamento.</text:p>
      <text:p text:style-name="P99"/>
      <text:list xml:id="list85109640478157" text:continue-numbering="true" text:style-name="WWNum3">
        <text:list-item>
          <text:list>
            <text:list-item>
              <text:list>
                <text:list-item>
                  <text:h text:style-name="P244" text:outline-level="3">Tempo de fila na inspeção de<text:span text:style-name="T92"> </text:span>segurança</text:h>
                </text:list-item>
              </text:list>
            </text:list-item>
          </text:list>
        </text:list-item>
      </text:list>
      <text:p text:style-name="P98"/>
      <text:p text:style-name="P24">Nesse<text:span text:style-name="T1"> </text:span>indicador<text:span text:style-name="T67"> </text:span>é<text:span text:style-name="T1"> </text:span>avaliada<text:span text:style-name="T74"> </text:span>a<text:span text:style-name="T92"> </text:span>satisfação<text:span text:style-name="T67"> </text:span>do<text:span text:style-name="T67"> </text:span>passageiro<text:span text:style-name="T1"> </text:span>com<text:span text:style-name="T92"> </text:span>o<text:span text:style-name="T92"> </text:span>tempo<text:span text:style-name="T67"> </text:span>de<text:span text:style-name="T67"> </text:span>espera<text:span text:style-name="T74"> </text:span>na<text:span text:style-name="T1"> </text:span>fila<text:span text:style-name="T67"> </text:span>para a inspeção de segurança<text:span text:style-name="T1"> </text:span>(raio-x).</text:p>
      <text:p text:style-name="P103"/>
      <text:p text:style-name="P207">Não respondem: passageiros em conexão que não saíram da área restrita.</text:p>
      <text:p text:style-name="P99"/>
      <text:list xml:id="list85109883615423" text:continue-numbering="true" text:style-name="WWNum3">
        <text:list-item>
          <text:list>
            <text:list-item>
              <text:list>
                <text:list-item>
                  <text:h text:style-name="P244" text:outline-level="3">Confiabilidade da inspeção de<text:span text:style-name="T67"> </text:span>segurança</text:h>
                </text:list-item>
              </text:list>
            </text:list-item>
          </text:list>
        </text:list-item>
      </text:list>
      <text:p text:style-name="P98"/>
      <text:p text:style-name="P18">Nesse indicador o passageiro avalia sua percepção sobre o quanto o procedimento realizado na inspeção de segurança mantem seguro o transporte aéreo e o quanto essa inspeção o faz se sentir seguro dentro da sala de embarque.</text:p>
      <text:p text:style-name="P97"/>
      <text:p text:style-name="P207">Não respondem: passageiros em conexão que não saíram da área restrita.</text:p>
      <text:p text:style-name="P99"/>
      <text:list xml:id="list85110574441257" text:continue-numbering="true" text:style-name="WWNum3">
        <text:list-item>
          <text:list>
            <text:list-item>
              <text:list>
                <text:list-item>
                  <text:h text:style-name="P244" text:outline-level="3">Cordialidade e prestatividade dos funcionários da inspeção de<text:span text:style-name="T96"> </text:span>segurança</text:h>
                </text:list-item>
              </text:list>
            </text:list-item>
          </text:list>
        </text:list-item>
      </text:list>
      <text:p text:style-name="P113"/>
      <text:p text:style-name="P19">Nesse indicador o passageiro avalia o atendimento prestado pelos funcionários responsáveis pela inspeção de segurança.</text:p>
      <text:p text:style-name="P103"/>
      <text:p text:style-name="P207">Não respondem: passageiros em conexão que não saíram da área restrita.</text:p>
      <text:list xml:id="list85110605382881" text:continue-numbering="true" text:style-name="WWNum3">
        <text:list-item>
          <text:list>
            <text:list-item>
              <text:list>
                <text:list-item>
                  <text:h text:style-name="P246" text:outline-level="3">Qualidade da sinalização do<text:span text:style-name="T74"> </text:span>aeroporto</text:h>
                </text:list-item>
              </text:list>
            </text:list-item>
          </text:list>
        </text:list-item>
      </text:list>
      <text:p text:style-name="P80"/>
      <text:p text:style-name="P180">Esse indicador avalia a satisfação do passageiro com a sinalização orientativa disponível e a facilidade de localização e deslocamento dentro do aeroporto.</text:p>
      <text:p text:style-name="P97"/>
      <text:list xml:id="list85111519582796" text:continue-numbering="true" text:style-name="WWNum3">
        <text:list-item>
          <text:list>
            <text:list-item>
              <text:list>
                <text:list-item>
                  <text:h text:style-name="P249" text:outline-level="3">Disponibilidade e qualidade das informações nos painéis de<text:span text:style-name="T64"> </text:span>voo</text:h>
                </text:list-item>
              </text:list>
            </text:list-item>
          </text:list>
        </text:list-item>
      </text:list>
      <text:p text:style-name="P151"/>
      <text:p text:style-name="P181">Nesse indicador é avaliada a satisfação do passageiro com as informações disponíveis nos painéis de voo distribuídos pelo aeroporto e a exatidão das informações neles contidas.</text:p>
      <text:p text:style-name="P86"/>
      <text:list xml:id="list85111613396648" text:continue-numbering="true" text:style-name="WWNum3">
        <text:list-item>
          <text:list>
            <text:list-item>
              <text:list>
                <text:list-item>
                  <text:h text:style-name="P244" text:outline-level="3">Disponibilidade de<text:span text:style-name="T92"> </text:span>tomadas</text:h>
                </text:list-item>
              </text:list>
            </text:list-item>
          </text:list>
        </text:list-item>
      </text:list>
      <text:p text:style-name="P98"/>
      <text:p text:style-name="P182">Nesse indicador o passageiro avalia sua percepção sobre a quantidade de tomadas existentes pelo terminal.</text:p>
      <text:p text:style-name="P97"/>
      <text:list xml:id="list85109984870299" text:continue-numbering="true" text:style-name="WWNum3">
        <text:list-item>
          <text:list>
            <text:list-item>
              <text:list>
                <text:list-item>
                  <text:h text:style-name="P244" text:outline-level="3">Qualidade da internet / wi-fi disponibilizada pelo<text:span text:style-name="T92"> </text:span>aeroporto</text:h>
                </text:list-item>
              </text:list>
            </text:list-item>
          </text:list>
        </text:list-item>
      </text:list>
      <text:p text:style-name="P98"/>
      <text:p text:style-name="P182">Nesse indicador o passageiro avalia a qualidade do sinal de internet wi-fi disponibilizado pelo aeroporto.</text:p>
      <text:p text:style-name="P97"/>
      <text:p text:style-name="P206">Não respondem: passageiros que não utilizaram o serviço.</text:p>
      <text:p text:style-name="P99"/>
      <text:list xml:id="list85109703081731" text:continue-numbering="true" text:style-name="WWNum3">
        <text:list-item>
          <text:list>
            <text:list-item>
              <text:list>
                <text:list-item>
                  <text:h text:style-name="P244" text:outline-level="3">Disponibilidade de<text:span text:style-name="T1"> </text:span>sanitários</text:h>
                </text:list-item>
              </text:list>
            </text:list-item>
          </text:list>
        </text:list-item>
      </text:list>
      <text:p text:style-name="P98"/>
      <text:p text:style-name="P182">Esse indicador avalia a satisfação do passageiro com a quantidade de sanitários disponíveis no aeroporto.</text:p>
      <text:p text:style-name="P97"/>
      <text:p text:style-name="P206">Não respondem: passageiros que não utilizaram sanitários.</text:p>
      <text:p text:style-name="P115"/>
      <text:list xml:id="list85111479391945" text:continue-numbering="true" text:style-name="WWNum3">
        <text:list-item>
          <text:list>
            <text:list-item>
              <text:list>
                <text:list-item>
                  <text:h text:style-name="P245" text:outline-level="3">Limpeza dos sanitários</text:h>
                </text:list-item>
              </text:list>
            </text:list-item>
          </text:list>
        </text:list-item>
      </text:list>
      <text:p text:style-name="P98"/>
      <text:p text:style-name="P182">Com esse indicador busca-se avaliar a satisfação do passageiro com a limpeza dos sanitários disponíveis no aeroporto.</text:p>
      <text:p text:style-name="P97"/>
      <text:p text:style-name="P206">Não respondem: passageiros que não utilizaram sanitários.</text:p>
      <text:p text:style-name="P152"/>
      <text:list xml:id="list85109659887586" text:continue-numbering="true" text:style-name="WWNum3">
        <text:list-item>
          <text:list>
            <text:list-item>
              <text:list>
                <text:list-item>
                  <text:h text:style-name="P254" text:outline-level="3">Disponibilidade de assentos na sala de<text:span text:style-name="T69"> </text:span>embarque</text:h>
                </text:list-item>
              </text:list>
            </text:list-item>
          </text:list>
        </text:list-item>
      </text:list>
      <text:p text:style-name="P80"/>
      <text:p text:style-name="P182">Nesse indicador o passageiro avalia sua percepção sobre a quantidade de assentos existentes nas áreas de espera para embarque.</text:p>
      <text:p text:style-name="P97"/>
      <text:list xml:id="list85109709716697" text:continue-numbering="true" text:style-name="WWNum3">
        <text:list-item>
          <text:list>
            <text:list-item>
              <text:list>
                <text:list-item>
                  <text:h text:style-name="P255" text:outline-level="3">Sensação de segurança nas áreas públicas do<text:span text:style-name="T69"> </text:span>aeroporto</text:h>
                </text:list-item>
              </text:list>
            </text:list-item>
          </text:list>
        </text:list-item>
      </text:list>
      <text:p text:style-name="P98"/>
      <text:p text:style-name="P182">Esse<text:span text:style-name="T71"> </text:span>indicador<text:span text:style-name="T71"> </text:span>avalia<text:span text:style-name="T82"> </text:span>a<text:span text:style-name="T71"> </text:span>percepção<text:span text:style-name="T64"> </text:span>passageiro<text:span text:style-name="T69"> </text:span>sobre<text:span text:style-name="T84"> </text:span>a<text:span text:style-name="T73"> </text:span>segurança<text:span text:style-name="T71"> </text:span>na<text:span text:style-name="T73"> </text:span>área<text:span text:style-name="T64"> </text:span>pública<text:span text:style-name="T71"> </text:span>do<text:span text:style-name="T73"> </text:span>saguão de embarque, onde há livre circulação de<text:span text:style-name="T92"> </text:span>pessoas.</text:p>
      <text:p text:style-name="P97"/>
      <text:p text:style-name="P206">Não respondem: passageiros em conexão que não saíram da área restrita.</text:p>
      <text:p text:style-name="P99"/>
      <text:list xml:id="list85110755806327" text:continue-numbering="true" text:style-name="WWNum3">
        <text:list-item>
          <text:list>
            <text:list-item>
              <text:list>
                <text:list-item>
                  <text:h text:style-name="P256" text:outline-level="3">Limpeza geral do<text:span text:style-name="T97"> </text:span>aeroporto</text:h>
                </text:list-item>
              </text:list>
            </text:list-item>
          </text:list>
        </text:list-item>
      </text:list>
      <text:p text:style-name="P98"/>
      <text:p text:style-name="P182">Esse indicador avalia a satisfação do passageiro com a limpeza do aeroporto de forma geral.</text:p>
      <text:list xml:id="list85111371861572" text:continue-numbering="true" text:style-name="WWNum3">
        <text:list-item>
          <text:list>
            <text:list-item>
              <text:list>
                <text:list-item>
                  <text:h text:style-name="P247" text:outline-level="3">Conforto térmico do aeroporto</text:h>
                </text:list-item>
              </text:list>
            </text:list-item>
          </text:list>
        </text:list-item>
      </text:list>
      <text:p text:style-name="P80"/>
      <text:p text:style-name="P52">Nesse indicador o passageiro avalia sua satisfação com a temperatura dentro do terminal.</text:p>
      <text:p text:style-name="P76"/>
      <text:list xml:id="list85111081215150" text:continue-numbering="true" text:style-name="WWNum3">
        <text:list-item>
          <text:list>
            <text:list-item>
              <text:list>
                <text:list-item>
                  <text:h text:style-name="P245" text:outline-level="3">Conforto acústico do<text:span text:style-name="T2"> </text:span>aeroporto</text:h>
                </text:list-item>
              </text:list>
            </text:list-item>
          </text:list>
        </text:list-item>
      </text:list>
      <text:p text:style-name="P104"/>
      <text:p text:style-name="P183">Nesse indicador o passageiro avalia sua satisfação com a acústica do terminal, incluindo o volume e quantidade dos anúncios das cias. aéreas por meio dos alto falantes distribuídos pela sala de embarque.</text:p>
      <text:p text:style-name="P103"/>
      <text:list xml:id="list85111674005272" text:continue-numbering="true" text:style-name="WWNum3">
        <text:list-item>
          <text:list>
            <text:list-item>
              <text:list>
                <text:list-item>
                  <text:h text:style-name="P245" text:outline-level="3">Qualidade da informação nos painéis das esteiras de restituição de<text:span text:style-name="T87"> </text:span>bagagem</text:h>
                </text:list-item>
              </text:list>
            </text:list-item>
          </text:list>
        </text:list-item>
      </text:list>
      <text:p text:style-name="P98"/>
      <text:p text:style-name="P58">Nesse indicador o passageiro avalia a exatidão das informações dos painéis localizados nas<text:span text:style-name="T92"> </text:span>áreas<text:span text:style-name="T76"> </text:span>de<text:span text:style-name="T67"> </text:span>desembarque<text:span text:style-name="T67"> </text:span>e<text:span text:style-name="T74"> </text:span>a<text:span text:style-name="T67"> </text:span>facilidade<text:span text:style-name="T67"> </text:span>de<text:span text:style-name="T67"> </text:span>identificar<text:span text:style-name="T1"> </text:span>a<text:span text:style-name="T76"> </text:span>esteira<text:span text:style-name="T67"> </text:span>de<text:span text:style-name="T67"> </text:span>restituição<text:span text:style-name="T1"> </text:span>de<text:span text:style-name="T67"> </text:span>seu<text:span text:style-name="T74"> </text:span>voo a partir deles.Pergunta realizada no<text:span text:style-name="T92"> </text:span>desembarque.</text:p>
      <text:p text:style-name="P114"/>
      <text:p text:style-name="P207">Não respondem: passageiros que não despacharam bagagens.</text:p>
      <text:p text:style-name="P14"/>
      <text:p text:style-name="P14"/>
      <text:list xml:id="list85111488613881" text:continue-numbering="true" text:style-name="WWNum3">
        <text:list-item>
          <text:list>
            <text:list-item>
              <text:h text:style-name="P250" text:outline-level="3">INDICADORES DE FACILIDADES AO<text:span text:style-name="T2"> </text:span>PASSAGEIRO</text:h>
            </text:list-item>
          </text:list>
        </text:list-item>
      </text:list>
      <text:p text:style-name="P98"/>
      <text:p text:style-name="P37">Os indicadores de facilidades ao passageiro avaliam serviços prestados por terceiros no ambiente aeroportuário, também chamados concessionários, sob gestão da área responsável pelo<text:span text:style-name="T76"> </text:span>setor<text:span text:style-name="T88"> </text:span>comercial<text:span text:style-name="T88"> </text:span>da<text:span text:style-name="T64"> </text:span>administração<text:span text:style-name="T76"> </text:span>do<text:span text:style-name="T76"> </text:span>aeroporto.<text:span text:style-name="T69"> </text:span>Esses<text:span text:style-name="T76"> </text:span>indicadores<text:span text:style-name="T88"> </text:span>avaliam<text:span text:style-name="T69"> </text:span>a<text:span text:style-name="T64"> </text:span>disponibilidade e o custo-benefício de lojas e estabelecimentos de alimentação do aeroporto, além do estacionamento e disponibilidade de facilidades financeiras como bancos e caixas<text:span text:style-name="T98"> </text:span>eletrônicos.</text:p>
      <text:p text:style-name="P103"/>
      <text:list xml:id="list85110356938901" text:continue-numbering="true" text:style-name="WWNum3">
        <text:list-item>
          <text:list>
            <text:list-item>
              <text:list>
                <text:list-item>
                  <text:h text:style-name="P244" text:outline-level="3">Qualidade das instalações de estacionamento de<text:span text:style-name="T67"> </text:span>veículos</text:h>
                </text:list-item>
              </text:list>
            </text:list-item>
          </text:list>
        </text:list-item>
      </text:list>
      <text:p text:style-name="P77"/>
      <text:p text:style-name="P18">Esse indicador avalia a satisfação do passageiro com a qualidade da infraestrutura física do estacionamento de veículos.</text:p>
      <text:p text:style-name="P103"/>
      <text:p text:style-name="P21"><text:span text:style-name="T5">Não</text:span><text:span text:style-name="T44"> </text:span><text:span text:style-name="T5">respondem:</text:span><text:span text:style-name="T47"> </text:span><text:span text:style-name="T5">passageiros</text:span><text:span text:style-name="T47"> </text:span><text:span text:style-name="T5">que</text:span><text:span text:style-name="T52"> </text:span><text:span text:style-name="T5">utilizaram</text:span><text:span text:style-name="T44"> </text:span><text:span text:style-name="T5">outro</text:span><text:span text:style-name="T47"> </text:span><text:span text:style-name="T5">tipo</text:span><text:span text:style-name="T50"> </text:span><text:span text:style-name="T5">de</text:span><text:span text:style-name="T47"> </text:span><text:span text:style-name="T5">transporte</text:span><text:span text:style-name="T50"> </text:span><text:span text:style-name="T5">para</text:span><text:span text:style-name="T44"> </text:span><text:span text:style-name="T5">o</text:span><text:span text:style-name="T50"> </text:span><text:span text:style-name="T5">aeroporto</text:span><text:span text:style-name="T50"> </text:span><text:span text:style-name="T5">que não veículo particular, ou que não utilizaram o</text:span><text:span text:style-name="T30"> </text:span><text:span text:style-name="T5">estacionamento.</text:span></text:p>
      <text:p text:style-name="P90"/>
      <text:list xml:id="list85111737379697" text:continue-numbering="true" text:style-name="WWNum3">
        <text:list-item>
          <text:list>
            <text:list-item>
              <text:list>
                <text:list-item>
                  <text:h text:style-name="P244" text:outline-level="3">Disponibilidade de vagas no estacionamento de<text:span text:style-name="T76"> </text:span>veículos</text:h>
                </text:list-item>
              </text:list>
            </text:list-item>
          </text:list>
        </text:list-item>
      </text:list>
      <text:p text:style-name="P104"/>
      <text:p text:style-name="P17">Nesse indicador o passageiro avalia sua satisfação com a quantidade de vagas oferecidas no estacionamento.</text:p>
      <text:p text:style-name="P103"/>
      <text:p text:style-name="P23"><text:span text:style-name="T5">Não</text:span><text:span text:style-name="T44"> </text:span><text:span text:style-name="T5">respondem:</text:span><text:span text:style-name="T47"> </text:span><text:span text:style-name="T5">passageiros</text:span><text:span text:style-name="T47"> </text:span><text:span text:style-name="T5">que</text:span><text:span text:style-name="T52"> </text:span><text:span text:style-name="T5">utilizaram</text:span><text:span text:style-name="T44"> </text:span><text:span text:style-name="T5">outro</text:span><text:span text:style-name="T47"> </text:span><text:span text:style-name="T5">tipo</text:span><text:span text:style-name="T50"> </text:span><text:span text:style-name="T5">de</text:span><text:span text:style-name="T47"> </text:span><text:span text:style-name="T5">transporte</text:span><text:span text:style-name="T50"> </text:span><text:span text:style-name="T5">para</text:span><text:span text:style-name="T44"> </text:span><text:span text:style-name="T5">o</text:span><text:span text:style-name="T50"> </text:span><text:span text:style-name="T5">aeroporto</text:span><text:span text:style-name="T50"> </text:span><text:span text:style-name="T5">que não veículo particular, ou que não utilizaram o</text:span><text:span text:style-name="T30"> </text:span><text:span text:style-name="T5">estacionamento.</text:span></text:p>
      <text:p text:style-name="P78"/>
      <text:list xml:id="list85110789169929" text:continue-numbering="true" text:style-name="WWNum3">
        <text:list-item>
          <text:list>
            <text:list-item>
              <text:list>
                <text:list-item>
                  <text:h text:style-name="P244" text:outline-level="3">Custo-benefício do<text:span text:style-name="T75"> </text:span>estacionamento</text:h>
                </text:list-item>
              </text:list>
            </text:list-item>
          </text:list>
        </text:list-item>
      </text:list>
      <text:p text:style-name="P104"/>
      <text:p text:style-name="P183">Nesse indicador é avaliada a satisfação do passageiro com o valor cobrado pelo estacionamento.</text:p>
      <text:p text:style-name="P103"/>
      <text:p text:style-name="P23"><text:span text:style-name="T5">Não</text:span><text:span text:style-name="T44"> </text:span><text:span text:style-name="T5">respondem:</text:span><text:span text:style-name="T47"> </text:span><text:span text:style-name="T5">passageiros</text:span><text:span text:style-name="T47"> </text:span><text:span text:style-name="T5">que</text:span><text:span text:style-name="T52"> </text:span><text:span text:style-name="T5">utilizaram</text:span><text:span text:style-name="T44"> </text:span><text:span text:style-name="T5">outro</text:span><text:span text:style-name="T47"> </text:span><text:span text:style-name="T5">tipo</text:span><text:span text:style-name="T50"> </text:span><text:span text:style-name="T5">de</text:span><text:span text:style-name="T47"> </text:span><text:span text:style-name="T5">transporte</text:span><text:span text:style-name="T50"> </text:span><text:span text:style-name="T5">para</text:span><text:span text:style-name="T44"> </text:span><text:span text:style-name="T5">o</text:span><text:span text:style-name="T50"> </text:span><text:span text:style-name="T5">aeroporto</text:span><text:span text:style-name="T50"> </text:span><text:span text:style-name="T5">que não veículo particular, ou que não utilizaram o</text:span><text:span text:style-name="T30"> </text:span><text:span text:style-name="T5">estacionamento.</text:span></text:p>
      <text:list xml:id="list85111550061371" text:continue-numbering="true" text:style-name="WWNum3">
        <text:list-item>
          <text:list>
            <text:list-item>
              <text:list>
                <text:list-item>
                  <text:h text:style-name="P251" text:outline-level="3">Quantidade e qualidade de lanchonetes e<text:span text:style-name="T69"> </text:span>restaurantes</text:h>
                </text:list-item>
              </text:list>
            </text:list-item>
          </text:list>
        </text:list-item>
      </text:list>
      <text:p text:style-name="P98"/>
      <text:p text:style-name="P59">Nesse indicador o passageiro avalia a disponibilidade, a variedade e a qualidade das lanchonetes e restaurantes disponíveis no aeroporto.</text:p>
      <text:p text:style-name="P89"/>
      <text:p text:style-name="P208">Não respondem: passageiros que não visitaram lanchonetes ou restaurantes no aeroporto.</text:p>
      <text:p text:style-name="P99"/>
      <text:list xml:id="list85110835539054" text:continue-numbering="true" text:style-name="WWNum3">
        <text:list-item>
          <text:list>
            <text:list-item>
              <text:list>
                <text:list-item>
                  <text:h text:style-name="P244" text:outline-level="3">Custo-benefício dos produtos de lanchonetes e<text:span text:style-name="T88"> </text:span>restaurantes</text:h>
                </text:list-item>
              </text:list>
            </text:list-item>
          </text:list>
        </text:list-item>
      </text:list>
      <text:p text:style-name="P98"/>
      <text:p text:style-name="P27">Nesse indicador é avaliada a satisfação do passageiro com o valor cobrado pelas lanchonetes e restaurantes em função da qualidade e do serviço que é disponibilizado por esses estabelecimentos.</text:p>
      <text:p text:style-name="P103"/>
      <text:p text:style-name="P209">Não respondem: passageiros que não visitaram lanchonetes ou restaurantes no aeroporto.</text:p>
      <text:p text:style-name="P99"/>
      <text:list xml:id="list85109656076846" text:continue-numbering="true" text:style-name="WWNum3">
        <text:list-item>
          <text:list>
            <text:list-item>
              <text:list>
                <text:list-item>
                  <text:h text:style-name="P244" text:outline-level="3">Disponibilidade e localização de bancos/caixas eletrônicos/casas de<text:span text:style-name="T82"> </text:span>câmbio</text:h>
                </text:list-item>
              </text:list>
            </text:list-item>
          </text:list>
        </text:list-item>
      </text:list>
      <text:p text:style-name="P98"/>
      <text:p text:style-name="P20">Nesse indicador o passageiro avalia sua satisfação com a quantidade e localização dos caixas eletrônicos, casas de câmbio ou bancos no aeroporto.</text:p>
      <text:p text:style-name="P103"/>
      <text:p text:style-name="P207">Não respondem: passageiros que não utilizaram o serviço.</text:p>
      <text:p text:style-name="P99"/>
      <text:list xml:id="list85110125972579" text:continue-numbering="true" text:style-name="WWNum3">
        <text:list-item>
          <text:list>
            <text:list-item>
              <text:list>
                <text:list-item>
                  <text:h text:style-name="P244" text:outline-level="3">Quantidade e qualidade de estabelecimentos<text:span text:style-name="T64"> </text:span>comerciais</text:h>
                </text:list-item>
              </text:list>
            </text:list-item>
          </text:list>
        </text:list-item>
      </text:list>
      <text:p text:style-name="P113"/>
      <text:p text:style-name="P22">Nesse<text:span text:style-name="T74"> </text:span>indicador<text:span text:style-name="T2"> </text:span>o<text:span text:style-name="T67"> </text:span>passageiro<text:span text:style-name="T2"> </text:span>avalia<text:span text:style-name="T1"> </text:span>a<text:span text:style-name="T74"> </text:span>disponibilidade,<text:span text:style-name="T1"> </text:span>a<text:span text:style-name="T74"> </text:span>variedade<text:span text:style-name="T1"> </text:span>e<text:span text:style-name="T1"> </text:span>a<text:span text:style-name="T74"> </text:span>qualidade<text:span text:style-name="T92"> </text:span>das<text:span text:style-name="T2"> </text:span>lojas e demais estabelecimentos comerciais disponíveis no<text:span text:style-name="T2"> </text:span>aeroporto</text:p>
      <text:p text:style-name="P97"/>
      <text:p text:style-name="P210">Não respondem: passageiros que não visitaram estabelecimentos comerciais no aeroporto.</text:p>
      <text:p text:style-name="P105"/>
      <text:list xml:id="list85111207081879" text:continue-numbering="true" text:style-name="WWNum3">
        <text:list-item>
          <text:list>
            <text:list-item>
              <text:list>
                <text:list-item>
                  <text:h text:style-name="P249" text:outline-level="3">Custo-benefício dos produtos<text:span text:style-name="T92"> </text:span>comerciais</text:h>
                </text:list-item>
              </text:list>
            </text:list-item>
          </text:list>
        </text:list-item>
      </text:list>
      <text:p text:style-name="P104"/>
      <text:p text:style-name="P58">Nesse indicador é avaliada a satisfação do passageiro com o valor cobrado pelas lojas e demais estabelecimentos comerciais em função da qualidade e do serviço por eles disponibilizado.</text:p>
      <text:p text:style-name="P97"/>
      <text:p text:style-name="P211">Não respondem: passageiros que não visitaram estabelecimentos comerciais no aeroporto.</text:p>
      <text:p text:style-name="P14"/>
      <text:p text:style-name="P14"/>
      <text:list xml:id="list85110899175186" text:continue-numbering="true" text:style-name="WWNum3">
        <text:list-item>
          <text:list>
            <text:list-item>
              <text:h text:style-name="P252" text:outline-level="3"><text:bookmark-start text:name="_TOC_250002"/>INDICADORES DE COMPANHIAS<text:span text:style-name="T97"> </text:span><text:bookmark-end text:name="_TOC_250002"/>AÉREAS</text:h>
            </text:list-item>
          </text:list>
        </text:list-item>
      </text:list>
      <text:p text:style-name="P80"/>
      <text:p text:style-name="P185">Os indicadores de Companhias Aéreas são aqueles relacionados diretamente às operações<text:span text:style-name="T88"> </text:span>ou<text:span text:style-name="T88"> </text:span>processos<text:span text:style-name="T71"> </text:span>de<text:span text:style-name="T76"> </text:span>responsabilidade<text:span text:style-name="T76"> </text:span>exclusiva<text:span text:style-name="T69"> </text:span>das<text:span text:style-name="T64"> </text:span>empresas<text:span text:style-name="T64"> </text:span>aéreas.<text:span text:style-name="T69"> </text:span>Nesses<text:span text:style-name="T88"> </text:span>indicadores, a interferência da administração aeroportuária é pouca ou nenhuma, cabendo a ela apenas oferecer a estrutura necessária ao funcionamento adequado de tais<text:span text:style-name="T84"> </text:span>processos.</text:p>
      <text:p text:style-name="P376">Esses indicadores são relacionados principalmente ao processo de <text:span text:style-name="T94">check-in </text:span>e de restituição de bagagens.</text:p>
      <text:p text:style-name="P123"/>
      <text:list xml:id="list85110947296951" text:continue-numbering="true" text:style-name="WWNum3">
        <text:list-item>
          <text:list>
            <text:list-item>
              <text:list>
                <text:list-item>
                  <text:h text:style-name="P244" text:outline-level="3">Tempo de fila no check-in<text:span text:style-name="T84"> </text:span>(autoatendimento)</text:h>
                </text:list-item>
              </text:list>
            </text:list-item>
          </text:list>
        </text:list-item>
      </text:list>
      <text:p text:style-name="P108"/>
      <text:p text:style-name="P53">Esse indicador avalia a satisfação do passageiro com o tempo de espera em fila para a realização do check-in nos totens de<text:span text:style-name="T88"> </text:span>autoatendimento.</text:p>
      <text:p text:style-name="P76"/>
      <text:p text:style-name="P212">Não respondem: passageiros em conexão e passageiros que utilizaram outra forma de check-in.</text:p>
      <text:p text:style-name="P4"/>
      <text:list xml:id="list85111462066189" text:continue-numbering="true" text:style-name="WWNum3">
        <text:list-item>
          <text:list>
            <text:list-item>
              <text:list>
                <text:list-item>
                  <text:h text:style-name="P244" text:outline-level="3">Tempo de fila no check-in<text:span text:style-name="T2"> </text:span>(balcão)</text:h>
                </text:list-item>
              </text:list>
            </text:list-item>
          </text:list>
        </text:list-item>
      </text:list>
      <text:p text:style-name="P120"/>
      <text:p text:style-name="P25">Esse indicador avalia a satisfação do passageiro com o tempo de espera em fila para a realização do check-in nos guichês de atendimento operados por funcionários da cia. Aérea.</text:p>
      <text:p text:style-name="P123"/>
      <text:p text:style-name="P213">Não respondem: passageiros em conexão e passageiros que utilizaram outra forma de check-in.</text:p>
      <text:p text:style-name="P99"/>
      <text:list xml:id="list85110551595510" text:continue-numbering="true" text:style-name="WWNum3">
        <text:list-item>
          <text:list>
            <text:list-item>
              <text:list>
                <text:list-item>
                  <text:h text:style-name="P249" text:outline-level="3">Cordialidade e atendimento dos funcionários do<text:span text:style-name="T67"> </text:span>check-in</text:h>
                </text:list-item>
              </text:list>
            </text:list-item>
          </text:list>
        </text:list-item>
      </text:list>
      <text:p text:style-name="P108"/>
      <text:p text:style-name="P184">Nesse indicador o passageiro avalia o atendimento prestado pelos funcionários da cia. aérea responsáveis pelo check-in nos guichês de atendimento.</text:p>
      <text:p text:style-name="P97"/>
      <text:p text:style-name="P50"><text:span text:style-name="T5">Não</text:span><text:span text:style-name="T47"> </text:span><text:span text:style-name="T5">respondem:</text:span><text:span text:style-name="T25"> </text:span><text:span text:style-name="T5">passageiros</text:span><text:span text:style-name="T25"> </text:span><text:span text:style-name="T5">em</text:span><text:span text:style-name="T52"> </text:span><text:span text:style-name="T5">conexão</text:span><text:span text:style-name="T47"> </text:span><text:span text:style-name="T5">e</text:span><text:span text:style-name="T47"> </text:span><text:span text:style-name="T5">passageiros</text:span><text:span text:style-name="T52"> </text:span><text:span text:style-name="T5">que</text:span><text:span text:style-name="T7"> </text:span><text:span text:style-name="T5">não</text:span><text:span text:style-name="T47"> </text:span><text:span text:style-name="T5">realizaram</text:span><text:span text:style-name="T52"> </text:span><text:span text:style-name="T5">o</text:span><text:span text:style-name="T52"> </text:span><text:span text:style-name="T5">check-in</text:span><text:span text:style-name="T47"> </text:span><text:span text:style-name="T5">nos balcões de</text:span><text:span text:style-name="T57"> </text:span><text:span text:style-name="T5">atendimento.</text:span></text:p>
      <text:p text:style-name="P90"/>
      <text:list xml:id="list85111280501068" text:continue-numbering="true" text:style-name="WWNum3">
        <text:list-item>
          <text:list>
            <text:list-item>
              <text:list>
                <text:list-item>
                  <text:h text:style-name="P244" text:outline-level="3">Qualidade da informação prestada pela cia<text:span text:style-name="T88"> </text:span>aérea</text:h>
                </text:list-item>
              </text:list>
            </text:list-item>
          </text:list>
        </text:list-item>
      </text:list>
      <text:p text:style-name="P98"/>
      <text:p text:style-name="P58">Nesse indicador é avaliada a satisfação do passageiro com a informação disponibilizada pela cia. aérea no aeroporto e em outros canais de comunicação.</text:p>
      <text:p text:style-name="P97"/>
      <text:list xml:id="list85110266861087" text:continue-numbering="true" text:style-name="WWNum3">
        <text:list-item>
          <text:list>
            <text:list-item>
              <text:list>
                <text:list-item>
                  <text:h text:style-name="P244" text:outline-level="3">Velocidade de restituição de<text:span text:style-name="T67"> </text:span>bagagem</text:h>
                </text:list-item>
              </text:list>
            </text:list-item>
          </text:list>
        </text:list-item>
      </text:list>
      <text:p text:style-name="P98"/>
      <text:p text:style-name="P18">Esse indicador avalia a satisfação do passageiro com o tempo de espera para entrega da bagagem despachada. Pergunta realizada no desembarque.</text:p>
      <text:p text:style-name="P97"/>
      <text:p text:style-name="P207">Não respondem: passageiros que não despacharam bagagens.</text:p>
      <text:p text:style-name="P105"/>
      <text:list xml:id="list85110296114060" text:continue-numbering="true" text:style-name="WWNum3">
        <text:list-item>
          <text:list>
            <text:list-item>
              <text:list>
                <text:list-item>
                  <text:h text:style-name="P249" text:outline-level="3">Integridade da<text:span text:style-name="T92"> </text:span>bagagem</text:h>
                </text:list-item>
              </text:list>
            </text:list-item>
          </text:list>
        </text:list-item>
      </text:list>
      <text:p text:style-name="P104"/>
      <text:p text:style-name="P26">Nesse indicador o passageiro avalia sua satisfação com o estado de sua bagagem após a restituição.</text:p>
      <text:p text:style-name="P97"/>
      <text:p text:style-name="P207">Não respondem: passageiros que não despacharam bagagens.</text:p>
      <text:list xml:id="list85110728268050" text:continue-numbering="true" text:style-name="WWNum3">
        <text:list-item>
          <text:list>
            <text:list-item>
              <text:h text:style-name="P248" text:outline-level="3"><text:bookmark-start text:name="_TOC_250001"/>INDICADORES DE ÓRGÃOS<text:span text:style-name="T1"> </text:span><text:bookmark-end text:name="_TOC_250001"/>PÚBLICOS</text:h>
            </text:list-item>
          </text:list>
        </text:list-item>
      </text:list>
      <text:p text:style-name="P80"/>
      <text:p text:style-name="P186">Os indicadores relativos aos processos sob a responsabilidade dos órgãos públicos avaliam a satisfação dos passageiros com o controle migratório e aduaneiro.</text:p>
      <text:p text:style-name="P97"/>
      <text:p text:style-name="P45">Esses indicadores são ligados diretamente à prestação de serviço público aos viajantes, realizados<text:span text:style-name="T71"> </text:span>pela<text:span text:style-name="T64"> </text:span>Polícia<text:span text:style-name="T69"> </text:span>Federal,<text:span text:style-name="T73"> </text:span>Receita<text:span text:style-name="T73"> </text:span>Federal,<text:span text:style-name="T73"> </text:span>Vigiagro<text:span text:style-name="T88"> </text:span>e<text:span text:style-name="T73"> </text:span>Anvisa.<text:span text:style-name="T73"> </text:span>Somente<text:span text:style-name="T73"> </text:span>o<text:span text:style-name="T73"> </text:span>controle<text:span text:style-name="T73"> </text:span>migratório de saída do país, sob a responsabilidade da Polícia Federal, é realizado com os passageiros que embarcam nos aeroportos internacionais. Os demais processos são realizados com os passageiros que chegam ao país, durante o processo de<text:span text:style-name="T86"> </text:span>desembarque.</text:p>
      <text:p text:style-name="P76"/>
      <text:list xml:id="list85110330432118" text:continue-numbering="true" text:style-name="WWNum3">
        <text:list-item>
          <text:list>
            <text:list-item>
              <text:list>
                <text:list-item>
                  <text:h text:style-name="P244" text:outline-level="3">Tempo de fila na<text:span text:style-name="T92"> </text:span>emigração</text:h>
                </text:list-item>
              </text:list>
            </text:list-item>
          </text:list>
        </text:list-item>
      </text:list>
      <text:p text:style-name="P98"/>
      <text:p text:style-name="P18">Esse indicador avalia a satisfação do passageiro com o tempo de espera em fila para a realização do controle migratório de saída do país, sob a responsabilidade da Polícia Federal.</text:p>
      <text:p text:style-name="P97"/>
      <text:p text:style-name="P207">Não respondem: passageiros de voos domésticos.</text:p>
      <text:p text:style-name="P99"/>
      <text:list xml:id="list85110316452741" text:continue-numbering="true" text:style-name="WWNum3">
        <text:list-item>
          <text:list>
            <text:list-item>
              <text:list>
                <text:list-item>
                  <text:h text:style-name="P244" text:outline-level="3">Cordialidade dos funcionários da<text:span text:style-name="T76"> </text:span>emigração</text:h>
                </text:list-item>
              </text:list>
            </text:list-item>
          </text:list>
        </text:list-item>
      </text:list>
      <text:p text:style-name="P98"/>
      <text:p text:style-name="P58">Nesse indicador o passageiro avalia o atendimento prestado pelos funcionários responsáveis pelo atendimento nos balcões de controle migratório de saída do país.</text:p>
      <text:p text:style-name="P97"/>
      <text:p text:style-name="P207">Não respondem: passageiros de voos domésticos.</text:p>
      <text:p text:style-name="P99"/>
      <text:list xml:id="list85110142005495" text:continue-numbering="true" text:style-name="WWNum3">
        <text:list-item>
          <text:list>
            <text:list-item>
              <text:list>
                <text:list-item>
                  <text:h text:style-name="P244" text:outline-level="3">Tempo de fila na<text:span text:style-name="T92"> </text:span>imigração</text:h>
                </text:list-item>
              </text:list>
            </text:list-item>
          </text:list>
        </text:list-item>
      </text:list>
      <text:p text:style-name="P104"/>
      <text:p text:style-name="P17">Esse indicador avalia a satisfação do passageiro com o tempo de espera em fila para a realização do controle migratório de entrada no país, sob a responsabilidade da Polícia Federal. Pergunta realizada no desembarque.</text:p>
      <text:p text:style-name="P103"/>
      <text:p text:style-name="P205">Não respondem: passageiros de voos domésticos.</text:p>
      <text:p text:style-name="P115"/>
      <text:list xml:id="list85110226449364" text:continue-numbering="true" text:style-name="WWNum3">
        <text:list-item>
          <text:list>
            <text:list-item>
              <text:list>
                <text:list-item>
                  <text:h text:style-name="P244" text:outline-level="3">Cordialidade dos funcionários da<text:span text:style-name="T76"> </text:span>imigração</text:h>
                </text:list-item>
              </text:list>
            </text:list-item>
          </text:list>
        </text:list-item>
      </text:list>
      <text:p text:style-name="P98"/>
      <text:p text:style-name="P28">Nesse indicador o passageiro avalia o atendimento prestado pelos funcionários responsáveis pelo atendimento nos balcões de controle migratório de entrada no país. Pergunta realizada no desembarque.</text:p>
      <text:p text:style-name="P103"/>
      <text:p text:style-name="P207">Não respondem: passageiros de voos domésticos.</text:p>
      <text:p text:style-name="P99"/>
      <text:list xml:id="list85111569218526" text:continue-numbering="true" text:style-name="WWNum3">
        <text:list-item>
          <text:list>
            <text:list-item>
              <text:list>
                <text:list-item>
                  <text:h text:style-name="P244" text:outline-level="3">Tempo de fila da<text:span text:style-name="T92"> </text:span>aduana</text:h>
                </text:list-item>
              </text:list>
            </text:list-item>
          </text:list>
        </text:list-item>
      </text:list>
      <text:p text:style-name="P77"/>
      <text:p text:style-name="P18">Esse indicador avalia a satisfação do passageiro com o tempo de espera em fila para a realização do controle aduaneiro de entrada no país, sob a responsabilidade da Receita Federal, Anvisa e Vigiagro. Pergunta realizada no desembarque.</text:p>
      <text:p text:style-name="P103"/>
      <text:p text:style-name="P207">Não respondem: passageiros de voos domésticos.</text:p>
      <text:list xml:id="list85110922674523" text:continue-numbering="true" text:style-name="WWNum3">
        <text:list-item>
          <text:list>
            <text:list-item>
              <text:list>
                <text:list-item>
                  <text:h text:style-name="P253" text:outline-level="3">Cordialidade do funcionário da<text:span text:style-name="T76"> </text:span>aduana</text:h>
                </text:list-item>
              </text:list>
            </text:list-item>
          </text:list>
        </text:list-item>
      </text:list>
      <text:p text:style-name="P98"/>
      <text:p text:style-name="P27">Nesse indicador o passageiro avalia o atendimento prestado pelos funcionários responsáveis pelo atendimento no controle aduaneiro. Pergunta realizada no desembarque.</text:p>
      <text:p text:style-name="P114"/>
      <text:p text:style-name="P206">Não respondem: passageiros de voos domésticos.</text:p>
      <text:p text:style-name="P14"/>
      <text:p text:style-name="P14"/>
      <text:list xml:id="list85111077556635" text:continue-numbering="true" text:style-name="WWNum3">
        <text:list-item>
          <text:list>
            <text:list-item>
              <text:h text:style-name="P252" text:outline-level="3">INDICADOR DE TRANSPORTE<text:span text:style-name="T1"> </text:span>PÚBLICO</text:h>
            </text:list-item>
          </text:list>
        </text:list-item>
      </text:list>
      <text:p text:style-name="P108"/>
      <text:p text:style-name="P188">O indicador de transporte público avalia a satisfação do passageiro com os meios de transporte oferecidos para o deslocamento dos passageiros até o aeroporto.</text:p>
      <text:p text:style-name="P89"/>
      <text:p text:style-name="P187">Trata-se de um indicador sob a responsabilidade dos órgãos municipais/estaduais com a competência para regular a estrutura de transporte público local.</text:p>
      <text:p text:style-name="P97"/>
      <text:list xml:id="list85111750594217" text:continue-numbering="true" text:style-name="WWNum3">
        <text:list-item>
          <text:list>
            <text:list-item>
              <text:list>
                <text:list-item>
                  <text:h text:style-name="P249" text:outline-level="3">Disponibilidade de transporte público para o<text:span text:style-name="T88"> </text:span>aeroporto</text:h>
                </text:list-item>
              </text:list>
            </text:list-item>
          </text:list>
        </text:list-item>
      </text:list>
      <text:p text:style-name="P104"/>
      <text:p text:style-name="P49">Nesse indicador o passageiro avalia a oferta de transporte público para o aeroporto.</text:p>
      <text:p text:style-name="P103"/>
      <text:p text:style-name="P214">Não respondem: passageiros em conexão ou passageiros que utilizaram veículo particular como forma de deslocamento para o aeroporto.</text:p>
      <text:list xml:id="list85110136820531" text:continue-list="list85111079446611" text:style-name="WWNum4">
        <text:list-item>
          <text:h text:style-name="P225" text:outline-level="1"><text:bookmark-start text:name="_TOC_250000"/>INDICADORES DE DESEMPENHO<text:span text:style-name="T2"> </text:span><text:bookmark-end text:name="_TOC_250000"/>OPERACIONAL</text:h>
        </text:list-item>
      </text:list>
      <text:p text:style-name="P157">A pesquisa de desempenho operacional consiste na avaliação de um total de 54 indicadores relacionados aos processos e serviços aos quais os passageiros são submetidos de modo a verificar sua eficiência durante a hora pico de cada extrato abrangido pela pesquisa (embarque/desembarque, doméstico/internacional).</text:p>
      <text:p text:style-name="P103"/>
      <text:p text:style-name="P189">Os processos/serviços considerados para aferição do desempenho operacional dos aeroportos são:</text:p>
      <text:p text:style-name="P114"/>
      <text:list xml:id="list430734047" text:style-name="WWNum2">
        <text:list-item>
          <text:p text:style-name="P270"><text:span text:style-name="T4">Organização do</text:span><text:span text:style-name="T23"> </text:span><text:span text:style-name="T4">Meio-fio;</text:span></text:p>
        </text:list-item>
        <text:list-item>
          <text:p text:style-name="P272">Disponibilidade de Carrinhos de bagagem;</text:p>
        </text:list-item>
        <text:list-item>
          <text:p text:style-name="P270"><text:span text:style-name="T4">Check-in (balcão e</text:span><text:span text:style-name="T56"> </text:span><text:span text:style-name="T4">autoatendimento);</text:span></text:p>
        </text:list-item>
        <text:list-item>
          <text:p text:style-name="P277"><text:span text:style-name="T4">Inspeção de</text:span><text:span text:style-name="T29"> </text:span><text:span text:style-name="T4">segurança;</text:span></text:p>
        </text:list-item>
        <text:list-item>
          <text:p text:style-name="P270"><text:span text:style-name="T4">Controle migratório de saída do país -</text:span><text:span text:style-name="T29"> </text:span><text:span text:style-name="T4">Emigração;</text:span></text:p>
        </text:list-item>
        <text:list-item>
          <text:p text:style-name="P272">Embarque;</text:p>
        </text:list-item>
        <text:list-item>
          <text:p text:style-name="P274"><text:span text:style-name="T4">Controle migratório de entrada no país -</text:span><text:span text:style-name="T31"> </text:span><text:span text:style-name="T4">Imigração;</text:span></text:p>
        </text:list-item>
        <text:list-item>
          <text:p text:style-name="P270"><text:span text:style-name="T4">Restituição de</text:span><text:span text:style-name="T29"> </text:span><text:span text:style-name="T4">bagagens;</text:span></text:p>
        </text:list-item>
        <text:list-item>
          <text:p text:style-name="P274"><text:span text:style-name="T4">Controle Aduaneiro;</text:span><text:span text:style-name="T29"> </text:span><text:span text:style-name="T4">e</text:span></text:p>
        </text:list-item>
        <text:list-item>
          <text:p text:style-name="P270"><text:span text:style-name="T4">Serviço de transporte de</text:span><text:span text:style-name="T38"> </text:span><text:span text:style-name="T4">passageiros.</text:span></text:p>
        </text:list-item>
      </text:list>
      <text:p text:style-name="P155">A seguir apresentamos os indicadores que compõem cada processo/serviço avaliado, bem como o local onde é realizada a coleta dos dados.</text:p>
      <text:p text:style-name="P89"/>
      <text:list xml:id="list2914204415" text:style-name="WWNum1">
        <text:list-item>
          <text:list>
            <text:list-item>
              <text:p text:style-name="P336"><text:span text:style-name="T3">ORGANIZAÇÃO DO MEIO FIO DE EMBARQUE </text:span><text:span text:style-name="T5">(Meio-fio de</text:span><text:span text:style-name="T57"> </text:span><text:span text:style-name="T5">embarque)</text:span></text:p>
            </text:list-item>
          </text:list>
        </text:list-item>
      </text:list>
      <text:p text:style-name="P105"/>
      <text:list xml:id="list85109640573512" text:continue-numbering="true" text:style-name="WWNum1">
        <text:list-item>
          <text:list>
            <text:list-item>
              <text:list>
                <text:list-item>
                  <text:p text:style-name="P339"><text:span text:style-name="T3">Disponibilidade</text:span><text:span text:style-name="T12"> </text:span><text:span text:style-name="T3">de</text:span><text:span text:style-name="T18"> </text:span><text:span text:style-name="T3">espaço</text:span><text:span text:style-name="T39"> </text:span><text:span text:style-name="T3">físico</text:span><text:span text:style-name="T32"> </text:span><text:span text:style-name="T3">para</text:span><text:span text:style-name="T18"> </text:span><text:span text:style-name="T3">desembarque</text:span><text:span text:style-name="T18"> </text:span><text:span text:style-name="T3">de</text:span><text:span text:style-name="T21"> </text:span><text:span text:style-name="T3">passageiros</text:span><text:span text:style-name="T39"> </text:span><text:span text:style-name="T3">no</text:span><text:span text:style-name="T32"> </text:span><text:span text:style-name="T3">meio-fio</text:span><text:span text:style-name="T12"> </text:span><text:span text:style-name="T3">- </text:span><text:span text:style-name="T4">O</text:span><text:span text:style-name="T46"> </text:span><text:span text:style-name="T4">pesquisador</text:span><text:span text:style-name="T53"> </text:span><text:span text:style-name="T4">deverá</text:span><text:span text:style-name="T46"> </text:span><text:span text:style-name="T4">anotar</text:span><text:span text:style-name="T46"> </text:span><text:span text:style-name="T4">se</text:span><text:span text:style-name="T46"> </text:span><text:span text:style-name="T4">há</text:span><text:span text:style-name="T46"> </text:span><text:span text:style-name="T4">espaço</text:span><text:span text:style-name="T46"> </text:span><text:span text:style-name="T4">disponível</text:span><text:span text:style-name="T26"> </text:span><text:span text:style-name="T4">junto</text:span><text:span text:style-name="T46"> </text:span><text:span text:style-name="T4">ao</text:span><text:span text:style-name="T46"> </text:span><text:span text:style-name="T4">meio-fio</text:span><text:span text:style-name="T46"> </text:span><text:span text:style-name="T4">para</text:span><text:span text:style-name="T26"> </text:span><text:span text:style-name="T4">que</text:span><text:span text:style-name="T26"> </text:span><text:span text:style-name="T4">seja</text:span><text:span text:style-name="T46"> </text:span><text:span text:style-name="T4">feito o desembarque de passageiro do</text:span><text:span text:style-name="T56"> </text:span><text:span text:style-name="T4">veículo;</text:span></text:p>
                </text:list-item>
              </text:list>
            </text:list-item>
          </text:list>
        </text:list-item>
      </text:list>
      <text:p text:style-name="P103"/>
      <text:list xml:id="list85110317484210" text:continue-numbering="true" text:style-name="WWNum1">
        <text:list-item>
          <text:list>
            <text:list-item>
              <text:list>
                <text:list-item>
                  <text:p text:style-name="P342"><text:span text:style-name="T3">Formação</text:span><text:span text:style-name="T21"> </text:span><text:span text:style-name="T3">de</text:span><text:span text:style-name="T21"> </text:span><text:span text:style-name="T3">fila</text:span><text:span text:style-name="T27"> </text:span><text:span text:style-name="T3">dupla</text:span><text:span text:style-name="T12"> </text:span><text:span text:style-name="T3">de</text:span><text:span text:style-name="T21"> </text:span><text:span text:style-name="T3">veículos</text:span><text:span text:style-name="T32"> </text:span><text:span text:style-name="T3">-</text:span><text:span text:style-name="T21"> </text:span><text:span text:style-name="T4">O</text:span><text:span text:style-name="T11"> </text:span><text:span text:style-name="T4">pesquisador</text:span><text:span text:style-name="T11"> </text:span><text:span text:style-name="T4">deverá</text:span><text:span text:style-name="T11"> </text:span><text:span text:style-name="T4">anotar</text:span><text:span text:style-name="T11"> </text:span><text:span text:style-name="T4">se</text:span><text:span text:style-name="T11"> </text:span><text:span text:style-name="T4">há</text:span><text:span text:style-name="T14"> </text:span><text:span text:style-name="T4">formação de fila dupla de</text:span><text:span text:style-name="T23"> </text:span><text:span text:style-name="T4">veículos.</text:span></text:p>
                </text:list-item>
              </text:list>
            </text:list-item>
          </text:list>
        </text:list-item>
      </text:list>
      <text:p text:style-name="P103"/>
      <text:list xml:id="list85111182755148" text:continue-numbering="true" text:style-name="WWNum1">
        <text:list-item>
          <text:list>
            <text:list-item>
              <text:p text:style-name="P336"><text:span text:style-name="T3">DISPONIBILIDADE DE CARRINHOS DE BAGAGEM </text:span><text:span text:style-name="T5">(Meio-fio de</text:span><text:span text:style-name="T10"> </text:span><text:span text:style-name="T5">embarque)</text:span></text:p>
            </text:list-item>
          </text:list>
        </text:list-item>
      </text:list>
      <text:p text:style-name="P99"/>
      <text:list xml:id="list85110605225831" text:continue-numbering="true" text:style-name="WWNum1">
        <text:list-item>
          <text:list>
            <text:list-item>
              <text:list>
                <text:list-item>
                  <text:p text:style-name="P340"><text:span text:style-name="T3">Disponibilidade de carrinhos de bagagem - </text:span><text:span text:style-name="T4">O pesquisador deverá anotar se há disponibilidade de mais de 50 (cinquenta) carrinhos para acomodação de bagagem disponíveis para os passageiros no meio-fio, conforme o local de realização da pesquisa (número do</text:span><text:span text:style-name="T31"> </text:span><text:span text:style-name="T4">terminal).</text:span></text:p>
                </text:list-item>
              </text:list>
            </text:list-item>
          </text:list>
        </text:list-item>
      </text:list>
      <text:p text:style-name="P103"/>
      <text:list xml:id="list85110621709871" text:continue-numbering="true" text:style-name="WWNum1">
        <text:list-item>
          <text:list>
            <text:list-item>
              <text:p text:style-name="P337"><text:span text:style-name="T3">CHECK-IN BALCÃO </text:span><text:span text:style-name="T5">(Saguão de</text:span><text:span text:style-name="T57"> </text:span><text:span text:style-name="T5">embarque)</text:span></text:p>
            </text:list-item>
          </text:list>
        </text:list-item>
      </text:list>
      <text:p text:style-name="P105"/>
      <text:list xml:id="list85111716681177" text:continue-numbering="true" text:style-name="WWNum1">
        <text:list-item>
          <text:list>
            <text:list-item>
              <text:list>
                <text:list-item>
                  <text:p text:style-name="P345"><text:span text:style-name="T3">Tipo de fila pesquisada - </text:span><text:span text:style-name="T4">O pesquisador deverá identificar se a fila medida é de check-in e despacho de bagagem, somente despacho de bagagem ou de</text:span><text:span text:style-name="T45"> </text:span><text:span text:style-name="T4">prioridades;</text:span></text:p>
                </text:list-item>
              </text:list>
            </text:list-item>
          </text:list>
        </text:list-item>
      </text:list>
      <text:p text:style-name="P114"/>
      <text:list xml:id="list85111678490015" text:continue-numbering="true" text:style-name="WWNum1">
        <text:list-item>
          <text:list>
            <text:list-item>
              <text:list>
                <text:list-item>
                  <text:p text:style-name="P344"><text:span text:style-name="T3">Tempo de espera em fila (início) - </text:span><text:span text:style-name="T4">O pesquisador deverá registrar o horário em que o indivíduo selecionado para medição entra na</text:span><text:span text:style-name="T8"> </text:span><text:span text:style-name="T4">fila;</text:span></text:p>
                </text:list-item>
              </text:list>
            </text:list-item>
          </text:list>
        </text:list-item>
      </text:list>
      <text:p text:style-name="P97"/>
      <text:list xml:id="list85110267169453" text:continue-numbering="true" text:style-name="WWNum1">
        <text:list-item>
          <text:list>
            <text:list-item>
              <text:list>
                <text:list-item>
                  <text:p text:style-name="P344"><text:span text:style-name="T3">Quantidade de pessoas na fila - </text:span><text:span text:style-name="T4">O pesquisador deverá anotar quantas pessoas estão na frente do indivíduo selecionado para</text:span><text:span text:style-name="T46"> </text:span><text:span text:style-name="T4">medição;</text:span></text:p>
                </text:list-item>
                <text:list-item>
                  <text:p text:style-name="P348"><text:span text:style-name="T3">Número de guichês em funcionamento (início) - </text:span><text:span text:style-name="T4">O pesquisador deverá anotar o número de guichês que estão atendendo a fila do passageiro pesquisado no início da medição.</text:span></text:p>
                </text:list-item>
              </text:list>
            </text:list-item>
          </text:list>
        </text:list-item>
      </text:list>
      <text:p text:style-name="P114"/>
      <text:list xml:id="list85110364230042" text:continue-numbering="true" text:style-name="WWNum1">
        <text:list-item>
          <text:list>
            <text:list-item>
              <text:list>
                <text:list-item>
                  <text:p text:style-name="P340"><text:span text:style-name="T3">Fila</text:span><text:span text:style-name="T9"> </text:span><text:span text:style-name="T3">dentro</text:span><text:span text:style-name="T9"> </text:span><text:span text:style-name="T3">da</text:span><text:span text:style-name="T9"> </text:span><text:span text:style-name="T3">área</text:span><text:span text:style-name="T9"> </text:span><text:span text:style-name="T3">reservada</text:span><text:span text:style-name="T15"> </text:span><text:span text:style-name="T3">para</text:span><text:span text:style-name="T9"> </text:span><text:span text:style-name="T3">sua</text:span><text:span text:style-name="T9"> </text:span><text:span text:style-name="T3">formação</text:span><text:span text:style-name="T12"> </text:span><text:span text:style-name="T3">-</text:span><text:span text:style-name="T21"> </text:span><text:span text:style-name="T4">O</text:span><text:span text:style-name="T20"> </text:span><text:span text:style-name="T4">pesquisador</text:span><text:span text:style-name="T26"> </text:span><text:span text:style-name="T4">deverá</text:span><text:span text:style-name="T26"> </text:span><text:span text:style-name="T4">registrar se a fila está dentro da área reservada para sua formação ou se invadiu a área definida para a circulação de passageiros (fora dos divisores de</text:span><text:span text:style-name="T38"> </text:span><text:span text:style-name="T4">fluxo);</text:span></text:p>
                </text:list-item>
              </text:list>
            </text:list-item>
          </text:list>
        </text:list-item>
      </text:list>
      <text:p text:style-name="P97"/>
      <text:list xml:id="list85110936828160" text:continue-numbering="true" text:style-name="WWNum1">
        <text:list-item>
          <text:list>
            <text:list-item>
              <text:list>
                <text:list-item>
                  <text:p text:style-name="P349"><text:span text:style-name="T3">Tempo de espera em fila (fim) - </text:span><text:span text:style-name="T4">O pesquisador deverá registrar o horário em que o indivíduo selecionado para medição sai da fila e dirige-se ao guichê, ao ser chamado para o</text:span><text:span text:style-name="T35"> </text:span><text:span text:style-name="T4">atendimento;</text:span></text:p>
                </text:list-item>
              </text:list>
            </text:list-item>
          </text:list>
        </text:list-item>
      </text:list>
      <text:p text:style-name="P103"/>
      <text:list xml:id="list85111484572334" text:continue-numbering="true" text:style-name="WWNum1">
        <text:list-item>
          <text:list>
            <text:list-item>
              <text:list>
                <text:list-item>
                  <text:p text:style-name="P340"><text:span text:style-name="T3">Número de guichês em funcionamento (fim) - </text:span><text:span text:style-name="T4">O pesquisador deverá anotar o número de guichês que estão atendendo a fila do passageiro pesquisado ao final da medição.</text:span></text:p>
                </text:list-item>
              </text:list>
            </text:list-item>
          </text:list>
        </text:list-item>
      </text:list>
      <text:p text:style-name="P123"/>
      <text:list xml:id="list85110725350131" text:continue-numbering="true" text:style-name="WWNum1">
        <text:list-item>
          <text:list>
            <text:list-item>
              <text:p text:style-name="P336"><text:span text:style-name="T3">CHECK-IN AUTO-ATENDIMENTO </text:span><text:span text:style-name="T5">(Saguão de embarque)</text:span></text:p>
            </text:list-item>
          </text:list>
        </text:list-item>
      </text:list>
      <text:p text:style-name="P121"/>
      <text:list xml:id="list85111528083384" text:continue-numbering="true" text:style-name="WWNum1">
        <text:list-item>
          <text:list>
            <text:list-item>
              <text:list>
                <text:list-item>
                  <text:p text:style-name="P344"><text:span text:style-name="T3">Tempo de espera em fila (início) - </text:span><text:span text:style-name="T4">O pesquisador deverá registrar o horário em que o indivíduo selecionado para medição entra na</text:span><text:span text:style-name="T8"> </text:span><text:span text:style-name="T4">fila;</text:span></text:p>
                </text:list-item>
              </text:list>
            </text:list-item>
          </text:list>
        </text:list-item>
      </text:list>
      <text:p text:style-name="P97"/>
      <text:list xml:id="list85110610569168" text:continue-numbering="true" text:style-name="WWNum1">
        <text:list-item>
          <text:list>
            <text:list-item>
              <text:list>
                <text:list-item>
                  <text:p text:style-name="P344"><text:span text:style-name="T3">Quantidade de pessoas na fila - </text:span><text:span text:style-name="T4">O pesquisador deverá anotar quantas pessoas estão na frente do indivíduo selecionado para</text:span><text:span text:style-name="T46"> </text:span><text:span text:style-name="T4">medição;</text:span></text:p>
                </text:list-item>
              </text:list>
            </text:list-item>
          </text:list>
        </text:list-item>
      </text:list>
      <text:p text:style-name="P103"/>
      <text:list xml:id="list85110455842971" text:continue-numbering="true" text:style-name="WWNum1">
        <text:list-item>
          <text:list>
            <text:list-item>
              <text:list>
                <text:list-item>
                  <text:p text:style-name="P342"><text:span text:style-name="T3">Tempo de espera em fila (fim) - </text:span><text:span text:style-name="T4">O pesquisador deverá registrar o horário em que o indivíduo selecionado para medição sai da fila e dirige-se ao</text:span><text:span text:style-name="T31"> </text:span><text:span text:style-name="T4">terminal.</text:span></text:p>
                </text:list-item>
              </text:list>
            </text:list-item>
          </text:list>
        </text:list-item>
      </text:list>
      <text:p text:style-name="P103"/>
      <text:list xml:id="list85111323984586" text:continue-numbering="true" text:style-name="WWNum1">
        <text:list-item>
          <text:list>
            <text:list-item>
              <text:p text:style-name="P336"><text:span text:style-name="T3">INSPEÇÃO DE SEGURANÇA </text:span><text:span text:style-name="T5">(Acesso às salas de embarque doméstica e</text:span><text:span text:style-name="T16"> </text:span><text:span text:style-name="T5">internacional)</text:span></text:p>
            </text:list-item>
          </text:list>
        </text:list-item>
      </text:list>
      <text:p text:style-name="P99"/>
      <text:list xml:id="list85111740950110" text:continue-numbering="true" text:style-name="WWNum1">
        <text:list-item>
          <text:list>
            <text:list-item>
              <text:list>
                <text:list-item>
                  <text:p text:style-name="P344"><text:span text:style-name="T3">Tempo de espera em fila (início) - </text:span><text:span text:style-name="T4">O pesquisador deverá registrar o horário em que o indivíduo selecionado para medição entra na</text:span><text:span text:style-name="T8"> </text:span><text:span text:style-name="T4">fila;</text:span></text:p>
                </text:list-item>
              </text:list>
            </text:list-item>
          </text:list>
        </text:list-item>
      </text:list>
      <text:p text:style-name="P86"/>
      <text:list xml:id="list85110831883261" text:continue-numbering="true" text:style-name="WWNum1">
        <text:list-item>
          <text:list>
            <text:list-item>
              <text:list>
                <text:list-item>
                  <text:p text:style-name="P344"><text:span text:style-name="T3">Quantidade de pessoas na fila - </text:span><text:span text:style-name="T4">O pesquisador deverá anotar quantas pessoas estão na frente do indivíduo selecionado para</text:span><text:span text:style-name="T46"> </text:span><text:span text:style-name="T4">medição;</text:span></text:p>
                </text:list-item>
              </text:list>
            </text:list-item>
          </text:list>
        </text:list-item>
      </text:list>
      <text:p text:style-name="P103"/>
      <text:list xml:id="list85111389562657" text:continue-numbering="true" text:style-name="WWNum1">
        <text:list-item>
          <text:list>
            <text:list-item>
              <text:list>
                <text:list-item>
                  <text:p text:style-name="P349"><text:span text:style-name="T3">Número</text:span><text:span text:style-name="T27"> </text:span><text:span text:style-name="T3">de</text:span><text:span text:style-name="T48"> </text:span><text:span text:style-name="T3">canais</text:span><text:span text:style-name="T48"> </text:span><text:span text:style-name="T3">de</text:span><text:span text:style-name="T54"> </text:span><text:span text:style-name="T3">inspeção</text:span><text:span text:style-name="T54"> </text:span><text:span text:style-name="T3">em</text:span><text:span text:style-name="T48"> </text:span><text:span text:style-name="T3">funcionamento</text:span><text:span text:style-name="T9"> </text:span><text:span text:style-name="T3">(início)</text:span><text:span text:style-name="T12"> </text:span><text:span text:style-name="T3">-</text:span><text:span text:style-name="T27"> </text:span><text:span text:style-name="T4">O</text:span><text:span text:style-name="T53"> </text:span><text:span text:style-name="T4">pesquisador</text:span><text:span text:style-name="T46"> </text:span><text:span text:style-name="T4">deverá anotar o número de canais de inspeção em</text:span><text:span text:style-name="T8"> </text:span><text:span text:style-name="T4">funcionamento;</text:span></text:p>
                </text:list-item>
              </text:list>
            </text:list-item>
          </text:list>
        </text:list-item>
      </text:list>
      <text:p text:style-name="P97"/>
      <text:list xml:id="list85109666362380" text:continue-numbering="true" text:style-name="WWNum1">
        <text:list-item>
          <text:list>
            <text:list-item>
              <text:list>
                <text:list-item>
                  <text:p text:style-name="P344"><text:span text:style-name="T3">Tempo de espera em fila (fim) - </text:span><text:span text:style-name="T4">O pesquisador deverá registrar o horário em que o indivíduo selecionado para medição deposita seus pertences na bandeja para inspeção ou passa pelo pórtico de</text:span><text:span text:style-name="T38"> </text:span><text:span text:style-name="T4">raio-x;</text:span></text:p>
                </text:list-item>
              </text:list>
            </text:list-item>
          </text:list>
        </text:list-item>
      </text:list>
      <text:p text:style-name="P97"/>
      <text:list xml:id="list85111766778487" text:continue-numbering="true" text:style-name="WWNum1">
        <text:list-item>
          <text:list>
            <text:list-item>
              <text:list>
                <text:list-item>
                  <text:p text:style-name="P340"><text:span text:style-name="T3">Número de canais de inspeção em funcionamento (fim) - </text:span><text:span text:style-name="T4">O pesquisador deverá anotar</text:span><text:span text:style-name="T11"> </text:span><text:span text:style-name="T4">o</text:span><text:span text:style-name="T20"> </text:span><text:span text:style-name="T4">número</text:span><text:span text:style-name="T20"> </text:span><text:span text:style-name="T4">de</text:span><text:span text:style-name="T11"> </text:span><text:span text:style-name="T4">canais</text:span><text:span text:style-name="T17"> </text:span><text:span text:style-name="T4">de</text:span><text:span text:style-name="T11"> </text:span><text:span text:style-name="T4">inspeção</text:span><text:span text:style-name="T20"> </text:span><text:span text:style-name="T4">em</text:span><text:span text:style-name="T20"> </text:span><text:span text:style-name="T4">funcionamento</text:span><text:span text:style-name="T20"> </text:span><text:span text:style-name="T4">que</text:span><text:span text:style-name="T11"> </text:span><text:span text:style-name="T4">estão</text:span><text:span text:style-name="T17"> </text:span><text:span text:style-name="T4">atendendo</text:span><text:span text:style-name="T11"> </text:span><text:span text:style-name="T4">a</text:span><text:span text:style-name="T14"> </text:span><text:span text:style-name="T4">fila</text:span><text:span text:style-name="T23"> </text:span><text:span text:style-name="T4">do passageiro pesquisado no fim da</text:span><text:span text:style-name="T17"> </text:span><text:span text:style-name="T4">medição;</text:span></text:p>
                </text:list-item>
              </text:list>
            </text:list-item>
          </text:list>
        </text:list-item>
      </text:list>
      <text:p text:style-name="P97"/>
      <text:list xml:id="list85111353047053" text:continue-numbering="true" text:style-name="WWNum1">
        <text:list-item>
          <text:list>
            <text:list-item>
              <text:list>
                <text:list-item>
                  <text:p text:style-name="P344"><text:span text:style-name="T3">Fila para acesso à sala de embarque - </text:span><text:span text:style-name="T4">O pesquisador deverá anotar se há formação de fila para leitura do cartão de embarque para acesso à área de inspeção de segurança.</text:span></text:p>
                </text:list-item>
              </text:list>
            </text:list-item>
            <text:list-item>
              <text:p text:style-name="P338"><text:span text:style-name="T3">EMIGRAÇÃO </text:span><text:span text:style-name="T5">(Acesso à sala de embarque</text:span><text:span text:style-name="T33"> </text:span><text:span text:style-name="T5">internacional)</text:span></text:p>
            </text:list-item>
          </text:list>
        </text:list-item>
      </text:list>
      <text:p text:style-name="P121"/>
      <text:list xml:id="list85109750017243" text:continue-numbering="true" text:style-name="WWNum1">
        <text:list-item>
          <text:list>
            <text:list-item>
              <text:list>
                <text:list-item>
                  <text:p text:style-name="P350"><text:span text:style-name="T3">Tipo de fila pesquisada - </text:span><text:span text:style-name="T4">O pesquisador deverá identificar se a fila medida é de brasileiros, estrangeiros, mista ou de</text:span><text:span text:style-name="T11"> </text:span><text:span text:style-name="T4">prioridades;</text:span></text:p>
                </text:list-item>
              </text:list>
            </text:list-item>
          </text:list>
        </text:list-item>
      </text:list>
      <text:p text:style-name="P103"/>
      <text:list xml:id="list85111336639317" text:continue-numbering="true" text:style-name="WWNum1">
        <text:list-item>
          <text:list>
            <text:list-item>
              <text:list>
                <text:list-item>
                  <text:p text:style-name="P352"><text:span text:style-name="T3">Tempo de espera em fila (início) - </text:span><text:span text:style-name="T4">O pesquisador deverá registrar o horário em que o indivíduo selecionado para medição entra na</text:span><text:span text:style-name="T26"> </text:span><text:span text:style-name="T4">fila;</text:span></text:p>
                </text:list-item>
              </text:list>
            </text:list-item>
          </text:list>
        </text:list-item>
      </text:list>
      <text:p text:style-name="P97"/>
      <text:list xml:id="list85111712749033" text:continue-numbering="true" text:style-name="WWNum1">
        <text:list-item>
          <text:list>
            <text:list-item>
              <text:list>
                <text:list-item>
                  <text:p text:style-name="P355"><text:span text:style-name="T3">Quantidade de pessoas na fila - </text:span><text:span text:style-name="T4">O pesquisador deverá anotar quantas pessoas estão na frente do indivíduo selecionado para</text:span><text:span text:style-name="T49"> </text:span><text:span text:style-name="T4">medição;</text:span></text:p>
                </text:list-item>
              </text:list>
            </text:list-item>
          </text:list>
        </text:list-item>
      </text:list>
      <text:p text:style-name="P114"/>
      <text:list xml:id="list85111384129390" text:continue-numbering="true" text:style-name="WWNum1">
        <text:list-item>
          <text:list>
            <text:list-item>
              <text:list>
                <text:list-item>
                  <text:p text:style-name="P358"><text:span text:style-name="T3">Número de guichês em funcionamento (início) - </text:span><text:span text:style-name="T4">O pesquisador deverá anotar o número de guichês que estão atendendo a fila do passageiro pesquisado no início da medição;</text:span></text:p>
                </text:list-item>
              </text:list>
            </text:list-item>
          </text:list>
        </text:list-item>
      </text:list>
      <text:p text:style-name="P97"/>
      <text:list xml:id="list85111669662542" text:continue-numbering="true" text:style-name="WWNum1">
        <text:list-item>
          <text:list>
            <text:list-item>
              <text:list>
                <text:list-item>
                  <text:p text:style-name="P359"><text:span text:style-name="T3">Fila dentro da área reservada para sua formação - </text:span><text:span text:style-name="T4">O pesquisador deverá registrar se a fila está dentro da área reservada para sua formação ou se invadiu a área definida para a circulação de passageiros (fora dos divisores de</text:span><text:span text:style-name="T53"> </text:span><text:span text:style-name="T4">fluxo);</text:span></text:p>
                </text:list-item>
              </text:list>
            </text:list-item>
          </text:list>
        </text:list-item>
      </text:list>
      <text:p text:style-name="P97"/>
      <text:list xml:id="list85111270524577" text:continue-numbering="true" text:style-name="WWNum1">
        <text:list-item>
          <text:list>
            <text:list-item>
              <text:list>
                <text:list-item>
                  <text:p text:style-name="P360"><text:span text:style-name="T3">Tempo de espera em fila (fim) - </text:span><text:span text:style-name="T4">O pesquisador deverá registrar o horário em que o indivíduo selecionado para medição sai da fila e dirige-se ao guichê, ao ser chamado para o</text:span><text:span text:style-name="T35"> </text:span><text:span text:style-name="T4">atendimento;</text:span></text:p>
                </text:list-item>
              </text:list>
            </text:list-item>
          </text:list>
        </text:list-item>
      </text:list>
      <text:p text:style-name="P103"/>
      <text:list xml:id="list85111776317408" text:continue-numbering="true" text:style-name="WWNum1">
        <text:list-item>
          <text:list>
            <text:list-item>
              <text:list>
                <text:list-item>
                  <text:p text:style-name="P362"><text:span text:style-name="T3">Número de guichês em funcionamento (fim) - </text:span><text:span text:style-name="T4">O pesquisador deverá anotar o número de guichês que estão atendendo a fila do passageiro pesquisado no final da medição.</text:span></text:p>
                </text:list-item>
              </text:list>
            </text:list-item>
          </text:list>
        </text:list-item>
      </text:list>
      <text:p text:style-name="P103"/>
      <text:list xml:id="list85110956916789" text:continue-numbering="true" text:style-name="WWNum1">
        <text:list-item>
          <text:list>
            <text:list-item>
              <text:p text:style-name="P336"><text:span text:style-name="T3">PROCESSO DE EMBARQUE </text:span><text:span text:style-name="T5">(Salas de embarque doméstica e</text:span><text:span text:style-name="T41"> </text:span><text:span text:style-name="T5">internacional)</text:span></text:p>
            </text:list-item>
          </text:list>
        </text:list-item>
      </text:list>
      <text:p text:style-name="P99"/>
      <text:list xml:id="list85110522658463" text:continue-numbering="true" text:style-name="WWNum1">
        <text:list-item>
          <text:list>
            <text:list-item>
              <text:list>
                <text:list-item>
                  <text:p text:style-name="P363"><text:span text:style-name="T3">Tipo</text:span><text:span text:style-name="T15"> </text:span><text:span text:style-name="T3">de</text:span><text:span text:style-name="T9"> </text:span><text:span text:style-name="T3">embarque</text:span><text:span text:style-name="T12"> </text:span><text:span text:style-name="T3">-</text:span><text:span text:style-name="T9"> </text:span><text:span text:style-name="T4">O</text:span><text:span text:style-name="T14"> </text:span><text:span text:style-name="T4">pesquisador</text:span><text:span text:style-name="T20"> </text:span><text:span text:style-name="T4">deverá</text:span><text:span text:style-name="T14"> </text:span><text:span text:style-name="T4">anotar</text:span><text:span text:style-name="T20"> </text:span><text:span text:style-name="T4">se</text:span><text:span text:style-name="T14"> </text:span><text:span text:style-name="T4">o</text:span><text:span text:style-name="T20"> </text:span><text:span text:style-name="T4">embarque</text:span><text:span text:style-name="T14"> </text:span><text:span text:style-name="T4">é</text:span><text:span text:style-name="T20"> </text:span><text:span text:style-name="T4">remoto</text:span><text:span text:style-name="T20"> </text:span><text:span text:style-name="T4">ou</text:span><text:span text:style-name="T11"> </text:span><text:span text:style-name="T4">em ponte de</text:span><text:span text:style-name="T23"> </text:span><text:span text:style-name="T4">embarque;</text:span></text:p>
                </text:list-item>
              </text:list>
            </text:list-item>
          </text:list>
        </text:list-item>
      </text:list>
      <text:p text:style-name="P89"/>
      <text:list xml:id="list85110258887014" text:continue-numbering="true" text:style-name="WWNum1">
        <text:list-item>
          <text:list>
            <text:list-item>
              <text:list>
                <text:list-item>
                  <text:p text:style-name="P343"><text:span text:style-name="T3">Número do portão de embarque - </text:span><text:span text:style-name="T4">O pesquisador deverá registrar o número do portão onde está sendo realizado o</text:span><text:span text:style-name="T38"> </text:span><text:span text:style-name="T4">embarque;</text:span></text:p>
                </text:list-item>
              </text:list>
            </text:list-item>
          </text:list>
        </text:list-item>
      </text:list>
      <text:p text:style-name="P103"/>
      <text:list xml:id="list85111770344634" text:continue-numbering="true" text:style-name="WWNum1">
        <text:list-item>
          <text:list>
            <text:list-item>
              <text:list>
                <text:list-item>
                  <text:p text:style-name="P341"><text:span text:style-name="T3">Tempo</text:span><text:span text:style-name="T9"> </text:span><text:span text:style-name="T3">de</text:span><text:span text:style-name="T9"> </text:span><text:span text:style-name="T3">espera</text:span><text:span text:style-name="T54"> </text:span><text:span text:style-name="T3">em</text:span><text:span text:style-name="T15"> </text:span><text:span text:style-name="T3">fila</text:span><text:span text:style-name="T9"> </text:span><text:span text:style-name="T3">para</text:span><text:span text:style-name="T9"> </text:span><text:span text:style-name="T3">embarque</text:span><text:span text:style-name="T27"> </text:span><text:span text:style-name="T3">(início)</text:span><text:span text:style-name="T18"> </text:span><text:span text:style-name="T3">-</text:span><text:span text:style-name="T9"> </text:span><text:span text:style-name="T4">O</text:span><text:span text:style-name="T53"> </text:span><text:span text:style-name="T4">pesquisador</text:span><text:span text:style-name="T8"> </text:span><text:span text:style-name="T4">deverá</text:span><text:span text:style-name="T26"> </text:span><text:span text:style-name="T4">registrar o horário em que o primeiro passageiro entrega seu cartão de embarque ao funcionário da cia.</text:span><text:span text:style-name="T29"> </text:span><text:span text:style-name="T4">Aérea;</text:span></text:p>
                </text:list-item>
              </text:list>
            </text:list-item>
          </text:list>
        </text:list-item>
      </text:list>
      <text:p text:style-name="P97"/>
      <text:list xml:id="list85111113684238" text:continue-numbering="true" text:style-name="WWNum1">
        <text:list-item>
          <text:list>
            <text:list-item>
              <text:list>
                <text:list-item>
                  <text:p text:style-name="P364"><text:span text:style-name="T3">Tempo</text:span><text:span text:style-name="T24"> </text:span><text:span text:style-name="T3">de</text:span><text:span text:style-name="T39"> </text:span><text:span text:style-name="T3">espera</text:span><text:span text:style-name="T39"> </text:span><text:span text:style-name="T3">em</text:span><text:span text:style-name="T39"> </text:span><text:span text:style-name="T3">fila</text:span><text:span text:style-name="T39"> </text:span><text:span text:style-name="T3">para</text:span><text:span text:style-name="T39"> </text:span><text:span text:style-name="T3">embarque</text:span><text:span text:style-name="T32"> </text:span><text:span text:style-name="T3">(fim)</text:span><text:span text:style-name="T58"> </text:span><text:span text:style-name="T3">-</text:span><text:span text:style-name="T36"> </text:span><text:span text:style-name="T4">O</text:span><text:span text:style-name="T23"> </text:span><text:span text:style-name="T4">pesquisador</text:span><text:span text:style-name="T31"> </text:span><text:span text:style-name="T4">deverá</text:span><text:span text:style-name="T38"> </text:span><text:span text:style-name="T4">registrar</text:span><text:span text:style-name="T38"> </text:span><text:span text:style-name="T4">o horário</text:span><text:span text:style-name="T51"> </text:span><text:span text:style-name="T4">em</text:span><text:span text:style-name="T43"> </text:span><text:span text:style-name="T4">que</text:span><text:span text:style-name="T43"> </text:span><text:span text:style-name="T4">o</text:span><text:span text:style-name="T51"> </text:span><text:span text:style-name="T4">último</text:span><text:span text:style-name="T51"> </text:span><text:span text:style-name="T4">passageiro</text:span><text:span text:style-name="T43"> </text:span><text:span text:style-name="T4">da</text:span><text:span text:style-name="T42"> </text:span><text:span text:style-name="T4">fila</text:span><text:span text:style-name="T51"> </text:span><text:span text:style-name="T4">entrega</text:span><text:span text:style-name="T46"> </text:span><text:span text:style-name="T4">seu</text:span><text:span text:style-name="T49"> </text:span><text:span text:style-name="T4">cartão</text:span><text:span text:style-name="T43"> </text:span><text:span text:style-name="T4">de</text:span><text:span text:style-name="T43"> </text:span><text:span text:style-name="T4">embarque</text:span><text:span text:style-name="T46"> </text:span><text:span text:style-name="T4">ao</text:span><text:span text:style-name="T45"> </text:span><text:span text:style-name="T4">funcionário da cia. aérea, desconsiderando os passageiros que se dirigirem para o embarque após a extinção da fila</text:span><text:span text:style-name="T23"> </text:span><text:span text:style-name="T4">inicial.</text:span></text:p>
                </text:list-item>
              </text:list>
            </text:list-item>
          </text:list>
        </text:list-item>
      </text:list>
      <text:p text:style-name="P97"/>
      <text:list xml:id="list85110828744391" text:continue-numbering="true" text:style-name="WWNum1">
        <text:list-item>
          <text:list>
            <text:list-item>
              <text:p text:style-name="P336"><text:span text:style-name="T3">IMIGRAÇÃO </text:span><text:span text:style-name="T5">(Acesso à área de restituição de bagagens</text:span><text:span text:style-name="T10"> </text:span><text:span text:style-name="T5">internacional)</text:span></text:p>
            </text:list-item>
          </text:list>
        </text:list-item>
      </text:list>
      <text:p text:style-name="P99"/>
      <text:list xml:id="list85110457889153" text:continue-numbering="true" text:style-name="WWNum1">
        <text:list-item>
          <text:list>
            <text:list-item>
              <text:list>
                <text:list-item>
                  <text:p text:style-name="P351"><text:span text:style-name="T3">Tipo de fila pesquisada - </text:span><text:span text:style-name="T4">O pesquisador deverá identificar se a fila medida é de brasileiros, estrangeiros, mista ou de</text:span><text:span text:style-name="T11"> </text:span><text:span text:style-name="T4">prioridades;</text:span></text:p>
                </text:list-item>
                <text:list-item>
                  <text:p text:style-name="P353"><text:span text:style-name="T3">Tempo de espera em fila (início) - </text:span><text:span text:style-name="T4">O pesquisador deverá registrar o horário em que o indivíduo selecionado para medição entra na</text:span><text:span text:style-name="T26"> </text:span><text:span text:style-name="T4">fila;</text:span></text:p>
                </text:list-item>
              </text:list>
            </text:list-item>
          </text:list>
        </text:list-item>
      </text:list>
      <text:p text:style-name="P97"/>
      <text:list xml:id="list85111041637638" text:continue-numbering="true" text:style-name="WWNum1">
        <text:list-item>
          <text:list>
            <text:list-item>
              <text:list>
                <text:list-item>
                  <text:p text:style-name="P356"><text:span text:style-name="T3">Quantidade de pessoas na fila - </text:span><text:span text:style-name="T4">O pesquisador deverá anotar quantas pessoas estão na frente do indivíduo selecionado para</text:span><text:span text:style-name="T49"> </text:span><text:span text:style-name="T4">medição;</text:span></text:p>
                </text:list-item>
              </text:list>
            </text:list-item>
          </text:list>
        </text:list-item>
      </text:list>
      <text:p text:style-name="P89"/>
      <text:list xml:id="list85111489946723" text:continue-numbering="true" text:style-name="WWNum1">
        <text:list-item>
          <text:list>
            <text:list-item>
              <text:list>
                <text:list-item>
                  <text:p text:style-name="P366"><text:span text:style-name="T3">Número de guichês em funcionamento (início) - </text:span><text:span text:style-name="T4">O pesquisador deverá anotar o número de guichês que estão atendendo a fila do passageiro pesquisado no início da medição;</text:span></text:p>
                </text:list-item>
              </text:list>
            </text:list-item>
          </text:list>
        </text:list-item>
      </text:list>
      <text:p text:style-name="P97"/>
      <text:list xml:id="list85110427829610" text:continue-numbering="true" text:style-name="WWNum1">
        <text:list-item>
          <text:list>
            <text:list-item>
              <text:list>
                <text:list-item>
                  <text:p text:style-name="P367"><text:span text:style-name="T3">Fila dentro da área reservada para sua formação - </text:span><text:span text:style-name="T4">O pesquisador deverá registrar se a fila está dentro da área reservada para sua formação ou se invadiu a</text:span><text:span text:style-name="T61"> </text:span><text:span text:style-name="T4">área definida para a circulação de passageiros (fora dos divisores de</text:span><text:span text:style-name="T53"> </text:span><text:span text:style-name="T4">fluxo);</text:span></text:p>
                </text:list-item>
              </text:list>
            </text:list-item>
          </text:list>
        </text:list-item>
      </text:list>
      <text:p text:style-name="P103"/>
      <text:list xml:id="list85111824797727" text:continue-numbering="true" text:style-name="WWNum1">
        <text:list-item>
          <text:list>
            <text:list-item>
              <text:list>
                <text:list-item>
                  <text:p text:style-name="P361"><text:span text:style-name="T3">Tempo de espera em fila (fim) - </text:span><text:span text:style-name="T4">O pesquisador deverá registrar o horário em que o indivíduo selecionado para medição sai da fila e dirige-se ao guichê, ao ser chamado para o</text:span><text:span text:style-name="T35"> </text:span><text:span text:style-name="T4">atendimento;</text:span></text:p>
                </text:list-item>
              </text:list>
            </text:list-item>
          </text:list>
        </text:list-item>
      </text:list>
      <text:p text:style-name="P103"/>
      <text:list xml:id="list85111167531737" text:continue-numbering="true" text:style-name="WWNum1">
        <text:list-item>
          <text:list>
            <text:list-item>
              <text:list>
                <text:list-item>
                  <text:p text:style-name="P362"><text:span text:style-name="T3">Número de guichês em funcionamento (fim) - </text:span><text:span text:style-name="T4">O pesquisador deverá anotar o número de guichês que estão atendendo a fila do passageiro pesquisado no final da medição.</text:span></text:p>
                </text:list-item>
              </text:list>
            </text:list-item>
          </text:list>
        </text:list-item>
      </text:list>
      <text:p text:style-name="P103"/>
      <text:list xml:id="list85110354434389" text:continue-numbering="true" text:style-name="WWNum1">
        <text:list-item>
          <text:list>
            <text:list-item>
              <text:p text:style-name="P336"><text:span text:style-name="T3">RESTITUIÇÃO DE BAGAGENS </text:span><text:span text:style-name="T5">(Áreas de restituição doméstica e internacional)</text:span></text:p>
            </text:list-item>
          </text:list>
        </text:list-item>
      </text:list>
      <text:p text:style-name="P115"/>
      <text:list xml:id="list85110850628112" text:continue-numbering="true" text:style-name="WWNum1">
        <text:list-item>
          <text:list>
            <text:list-item>
              <text:list>
                <text:list-item>
                  <text:p text:style-name="P346"><text:span text:style-name="T3">Horário do calço da aeronave - </text:span><text:span text:style-name="T4">Registra-se o horário da parada da aeronave na posição de estacionamento no pátio, informado pelos monitores da área de</text:span><text:span text:style-name="T62"> </text:span><text:span text:style-name="T4">restituição;</text:span></text:p>
                </text:list-item>
              </text:list>
            </text:list-item>
          </text:list>
        </text:list-item>
      </text:list>
      <text:p text:style-name="P103"/>
      <text:list xml:id="list85109697843271" text:continue-numbering="true" text:style-name="WWNum1">
        <text:list-item>
          <text:list>
            <text:list-item>
              <text:list>
                <text:list-item>
                  <text:p text:style-name="P340"><text:span text:style-name="T3">Horário</text:span><text:span text:style-name="T27"> </text:span><text:span text:style-name="T3">de</text:span><text:span text:style-name="T9"> </text:span><text:span text:style-name="T3">chegada</text:span><text:span text:style-name="T9"> </text:span><text:span text:style-name="T3">do</text:span><text:span text:style-name="T21"> </text:span><text:span text:style-name="T3">primeiro</text:span><text:span text:style-name="T27"> </text:span><text:span text:style-name="T3">passageiro</text:span><text:span text:style-name="T9"> </text:span><text:span text:style-name="T3">do</text:span><text:span text:style-name="T21"> </text:span><text:span text:style-name="T3">voo</text:span><text:span text:style-name="T39"> </text:span><text:span text:style-name="T3">-</text:span><text:span text:style-name="T9"> </text:span><text:span text:style-name="T4">Registra-se</text:span><text:span text:style-name="T20"> </text:span><text:span text:style-name="T4">o</text:span><text:span text:style-name="T26"> </text:span><text:span text:style-name="T4">horário</text:span><text:span text:style-name="T53"> </text:span><text:span text:style-name="T4">em</text:span><text:span text:style-name="T20"> </text:span><text:span text:style-name="T4">que o</text:span><text:span text:style-name="T43"> </text:span><text:span text:style-name="T4">primeiro</text:span><text:span text:style-name="T43"> </text:span><text:span text:style-name="T4">passageiro</text:span><text:span text:style-name="T49"> </text:span><text:span text:style-name="T4">do</text:span><text:span text:style-name="T45"> </text:span><text:span text:style-name="T4">voo</text:span><text:span text:style-name="T43"> </text:span><text:span text:style-name="T4">chega</text:span><text:span text:style-name="T49"> </text:span><text:span text:style-name="T4">à</text:span><text:span text:style-name="T51"> </text:span><text:span text:style-name="T4">esteira</text:span><text:span text:style-name="T43"> </text:span><text:span text:style-name="T4">de</text:span><text:span text:style-name="T42"> </text:span><text:span text:style-name="T4">restituição</text:span><text:span text:style-name="T49"> </text:span><text:span text:style-name="T4">de</text:span><text:span text:style-name="T42"> </text:span><text:span text:style-name="T4">bagagens,</text:span><text:span text:style-name="T45"> </text:span><text:span text:style-name="T4">desconsiderando aqueles que não despacharam bagagens e se dirigem diretamente à</text:span><text:span text:style-name="T8"> </text:span><text:span text:style-name="T4">saída;</text:span></text:p>
                </text:list-item>
              </text:list>
            </text:list-item>
          </text:list>
        </text:list-item>
      </text:list>
      <text:p text:style-name="P97"/>
      <text:list xml:id="list85110719323505" text:continue-numbering="true" text:style-name="WWNum1">
        <text:list-item>
          <text:list>
            <text:list-item>
              <text:list>
                <text:list-item>
                  <text:p text:style-name="P344"><text:span text:style-name="T3">Horário de chegada da primeira bagagem - </text:span><text:span text:style-name="T4">Registra-se o horário em que a primeira bagagem com a etiqueta do voo pesquisado é colocada na</text:span><text:span text:style-name="T49"> </text:span><text:span text:style-name="T4">esteira;</text:span></text:p>
                </text:list-item>
              </text:list>
            </text:list-item>
          </text:list>
        </text:list-item>
      </text:list>
      <text:p text:style-name="P97"/>
      <text:list xml:id="list85111568982904" text:continue-numbering="true" text:style-name="WWNum1">
        <text:list-item>
          <text:list>
            <text:list-item>
              <text:list>
                <text:list-item>
                  <text:p text:style-name="P347"><text:span text:style-name="T3">Horário de chegada da última bagagem - </text:span><text:span text:style-name="T4">Registra-se o horário em que a última bagagem com a etiqueta do voo pesquisado é colocada na</text:span><text:span text:style-name="T8"> </text:span><text:span text:style-name="T4">esteira;</text:span></text:p>
                </text:list-item>
              </text:list>
            </text:list-item>
          </text:list>
        </text:list-item>
      </text:list>
      <text:p text:style-name="P103"/>
      <text:list xml:id="list85110894806809" text:continue-numbering="true" text:style-name="WWNum1">
        <text:list-item>
          <text:list>
            <text:list-item>
              <text:list>
                <text:list-item>
                  <text:p text:style-name="P365"><text:span text:style-name="T3">Número de esteiras em funcionamento - </text:span><text:span text:style-name="T4">Registra-se o número de esteiras em funcionamento no momento da</text:span><text:span text:style-name="T23"> </text:span><text:span text:style-name="T4">medição;</text:span></text:p>
                </text:list-item>
              </text:list>
            </text:list-item>
          </text:list>
        </text:list-item>
      </text:list>
      <text:p text:style-name="P103"/>
      <text:list xml:id="list85110273188129" text:continue-numbering="true" text:style-name="WWNum1">
        <text:list-item>
          <text:list>
            <text:list-item>
              <text:list>
                <text:list-item>
                  <text:p text:style-name="P340"><text:span text:style-name="T3">Método de desembarque - </text:span><text:span text:style-name="T4">O pesquisador deverá anotar se o desembarque foi remoto ou em ponte;</text:span></text:p>
                </text:list-item>
              </text:list>
            </text:list-item>
          </text:list>
        </text:list-item>
      </text:list>
      <text:p text:style-name="P97"/>
      <text:list xml:id="list85110081623595" text:continue-numbering="true" text:style-name="WWNum1">
        <text:list-item>
          <text:list>
            <text:list-item>
              <text:list>
                <text:list-item>
                  <text:p text:style-name="P340"><text:span text:style-name="T3">Disponibilidade de carrinhos de bagagem - </text:span><text:span text:style-name="T4">O pesquisador deverá anotar a quantidade de carrinhos para acomodação de bagagem disponíveis para os passageiros na área de restituição.</text:span></text:p>
                </text:list-item>
              </text:list>
            </text:list-item>
          </text:list>
        </text:list-item>
      </text:list>
      <text:p text:style-name="P114"/>
      <text:list xml:id="list85110182565944" text:continue-numbering="true" text:style-name="WWNum1">
        <text:list-item>
          <text:list>
            <text:list-item>
              <text:p text:style-name="P337"><text:span text:style-name="T3">CONTROLE ADUANEIRO </text:span><text:span text:style-name="T5">(Desembarque internacional)</text:span></text:p>
            </text:list-item>
          </text:list>
        </text:list-item>
      </text:list>
      <text:p text:style-name="P105"/>
      <text:list xml:id="list85110158460433" text:continue-numbering="true" text:style-name="WWNum1">
        <text:list-item>
          <text:list>
            <text:list-item>
              <text:list>
                <text:list-item>
                  <text:p text:style-name="P345"><text:span text:style-name="T3">Tipo de fila pesquisada - </text:span><text:span text:style-name="T4">O pesquisador deverá identificar se a fila medida é de “bens a declarar” ou “nada a</text:span><text:span text:style-name="T8"> </text:span><text:span text:style-name="T4">declarar”;</text:span></text:p>
                </text:list-item>
                <text:list-item>
                  <text:p text:style-name="P354"><text:span text:style-name="T3">Tempo de espera em fila (início) - </text:span><text:span text:style-name="T4">O pesquisador deverá registrar o horário em que o indivíduo selecionado para medição entra na</text:span><text:span text:style-name="T26"> </text:span><text:span text:style-name="T4">fila;</text:span></text:p>
                </text:list-item>
              </text:list>
            </text:list-item>
          </text:list>
        </text:list-item>
      </text:list>
      <text:p text:style-name="P97"/>
      <text:list xml:id="list85109699255956" text:continue-numbering="true" text:style-name="WWNum1">
        <text:list-item>
          <text:list>
            <text:list-item>
              <text:list>
                <text:list-item>
                  <text:p text:style-name="P357"><text:span text:style-name="T3">Quantidade de pessoas na fila - </text:span><text:span text:style-name="T4">O pesquisador deverá anotar quantas pessoas estão na frente do indivíduo selecionado para</text:span><text:span text:style-name="T49"> </text:span><text:span text:style-name="T4">medição;</text:span></text:p>
                </text:list-item>
              </text:list>
            </text:list-item>
          </text:list>
        </text:list-item>
      </text:list>
      <text:p text:style-name="P89"/>
      <text:list xml:id="list85110713557366" text:continue-numbering="true" text:style-name="WWNum1">
        <text:list-item>
          <text:list>
            <text:list-item>
              <text:list>
                <text:list-item>
                  <text:p text:style-name="P368"><text:span text:style-name="T3">Fila dentro da área reservada para sua formação - </text:span><text:span text:style-name="T4">O pesquisador deverá registrar se a fila está dentro da área reservada para sua formação ou se invadiu a</text:span><text:span text:style-name="T61"> </text:span><text:span text:style-name="T4">área definida para a circulação de passageiros (fora dos divisores de</text:span><text:span text:style-name="T14"> </text:span><text:span text:style-name="T4">fluxo);</text:span></text:p>
                </text:list-item>
              </text:list>
            </text:list-item>
          </text:list>
        </text:list-item>
      </text:list>
      <text:p text:style-name="P97"/>
      <text:list xml:id="list85111244903271" text:continue-numbering="true" text:style-name="WWNum1">
        <text:list-item>
          <text:list>
            <text:list-item>
              <text:list>
                <text:list-item>
                  <text:p text:style-name="P344"><text:span text:style-name="T3">Tempo de espera em fila (fim) - </text:span><text:span text:style-name="T4">O pesquisador deverá registrar o horário em que o indivíduo selecionado para medição é direcionado à saída ou selecionado para procedimento de inspeção aduaneira;</text:span></text:p>
                </text:list-item>
              </text:list>
            </text:list-item>
          </text:list>
        </text:list-item>
      </text:list>
      <text:p text:style-name="P103"/>
      <text:list xml:id="list85111506931397" text:continue-numbering="true" text:style-name="WWNum1">
        <text:list-item>
          <text:list>
            <text:list-item>
              <text:p text:style-name="P337"><text:span text:style-name="T3">SERVIÇO DE TRANSPORTE DE PASSAGEIROS </text:span><text:span text:style-name="T5">(Meio fio de</text:span><text:span text:style-name="T28"> </text:span><text:span text:style-name="T5">desembarque)</text:span></text:p>
            </text:list-item>
          </text:list>
        </text:list-item>
      </text:list>
      <text:p text:style-name="P105"/>
      <text:list xml:id="list85111735420521" text:continue-numbering="true" text:style-name="WWNum1">
        <text:list-item>
          <text:list>
            <text:list-item>
              <text:list>
                <text:list-item>
                  <text:p text:style-name="P344"><text:span text:style-name="T3">Tempo de espera em fila (início) - </text:span><text:span text:style-name="T4">O pesquisador deverá registrar o horário em que o indivíduo selecionado para medição entra na</text:span><text:span text:style-name="T26"> </text:span><text:span text:style-name="T4">fila;</text:span></text:p>
                </text:list-item>
              </text:list>
            </text:list-item>
          </text:list>
        </text:list-item>
      </text:list>
      <text:p text:style-name="P76"/>
      <text:list xml:id="list85110552185809" text:continue-numbering="true" text:style-name="WWNum1">
        <text:list-item>
          <text:list>
            <text:list-item>
              <text:list>
                <text:list-item>
                  <text:p text:style-name="P340"><text:span text:style-name="T3">Quantidade de pessoas na fila - </text:span><text:span text:style-name="T4">O pesquisador deverá anotar quantas pessoas estão na frente do indivíduo selecionado para</text:span><text:span text:style-name="T49"> </text:span><text:span text:style-name="T4">medição;</text:span></text:p>
                </text:list-item>
              </text:list>
            </text:list-item>
          </text:list>
        </text:list-item>
      </text:list>
      <text:p text:style-name="P103"/>
      <text:list xml:id="list85110278012981" text:continue-numbering="true" text:style-name="WWNum1">
        <text:list-item>
          <text:list>
            <text:list-item>
              <text:list>
                <text:list-item>
                  <text:p text:style-name="P344"><text:span text:style-name="T3">Tempo de espera em fila (fim) - </text:span><text:span text:style-name="T4">O pesquisador deverá registrar o horário em que o indivíduo selecionado para medição se desloca da fila em direção ao</text:span><text:span text:style-name="T8"> </text:span><text:span text:style-name="T4">taxi.</text:span></text:p>
                </text:list-item>
              </text:list>
            </text:list-item>
          </text:list>
        </text:list-item>
      </text:list>
      <text:p text:style-name="P114"/>
      <text:list xml:id="list85110746413206" text:continue-numbering="true" text:style-name="WWNum1">
        <text:list-item>
          <text:list>
            <text:list-item>
              <text:p text:style-name="P337"><text:span text:style-name="T3">ORGANIZAÇÃO DO MEIO FIO DE DESEMBARQUE </text:span><text:span text:style-name="T5">(Meio fio de</text:span><text:span text:style-name="T22"> </text:span><text:span text:style-name="T5">desembarque)</text:span></text:p>
            </text:list-item>
          </text:list>
        </text:list-item>
      </text:list>
      <text:p text:style-name="P105"/>
      <text:list xml:id="list85110670674652" text:continue-numbering="true" text:style-name="WWNum1">
        <text:list-item>
          <text:list>
            <text:list-item>
              <text:list>
                <text:list-item>
                  <text:p text:style-name="P369"><text:span text:style-name="T3">Disponibilidade de espaço físico para embarque de passageiros no meio-fio - </text:span><text:span text:style-name="T4">O pesquisador deverá anotar se há espaço disponível junto ao meio-fio para que seja feito o embarque de passageiro no veículo;</text:span></text:p>
                </text:list-item>
              </text:list>
            </text:list-item>
          </text:list>
        </text:list-item>
      </text:list>
      <text:p text:style-name="P97"/>
      <text:list xml:id="list85111812266317" text:continue-numbering="true" text:style-name="WWNum1">
        <text:list-item>
          <text:list>
            <text:list-item>
              <text:list>
                <text:list-item>
                  <text:p text:style-name="P344"><text:span text:style-name="T3">Formação</text:span><text:span text:style-name="T21"> </text:span><text:span text:style-name="T3">de</text:span><text:span text:style-name="T21"> </text:span><text:span text:style-name="T3">fila</text:span><text:span text:style-name="T27"> </text:span><text:span text:style-name="T3">dupla</text:span><text:span text:style-name="T12"> </text:span><text:span text:style-name="T3">de</text:span><text:span text:style-name="T21"> </text:span><text:span text:style-name="T3">veículos</text:span><text:span text:style-name="T32"> </text:span><text:span text:style-name="T3">-</text:span><text:span text:style-name="T21"> </text:span><text:span text:style-name="T4">O</text:span><text:span text:style-name="T11"> </text:span><text:span text:style-name="T4">pesquisador</text:span><text:span text:style-name="T11"> </text:span><text:span text:style-name="T4">deverá</text:span><text:span text:style-name="T11"> </text:span><text:span text:style-name="T4">anotar</text:span><text:span text:style-name="T11"> </text:span><text:span text:style-name="T4">se</text:span><text:span text:style-name="T11"> </text:span><text:span text:style-name="T4">há</text:span><text:span text:style-name="T14"> </text:span><text:span text:style-name="T4">formação de fila dupla de</text:span><text:span text:style-name="T23"> </text:span><text:span text:style-name="T4">veículos.</text:span></text:p>
                </text:list-item>
              </text:list>
            </text:list-item>
          </text:list>
        </text:list-item>
      </text:list>
      <text:p text:style-name="P37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7"/>
      <text:p text:style-name="P215">Elaboração:</text:p>
      <text:p text:style-name="P190">Coordenação-geral de Segurança da Aviação Civil e Desempenho Aeroportuário Departamento de Planejamento e Gestão Aeroportuária</text:p>
      <text:p text:style-name="Text_20_body"/>
      <text:p text:style-name="P91"/>
      <text:h text:style-name="P34" text:outline-level="3">SECRETARIA NACIONAL DE AVIAÇÃO CIVIL</text:h>
      <text:p text:style-name="P192">COMISSÃO NACIONAL DE AUTORIDADES AEROPORTUÁRIAS</text:p>
      <text:p text:style-name="P191"><draw:frame draw:style-name="fr3" draw:name="Figura1" text:anchor-type="char" svg:x="6.426cm" svg:y="0.406cm" svg:width="8.146cm" svg:height="2.355cm" draw:z-index="31"><draw:image xlink:href="Pictures/10000201000001E10000008BD8AF43848D48AD20.png" xlink:type="simple" xlink:show="embed" xlink:actuate="onLoad" draw:mime-type="image/png"/></draw:frame>Comitê Técnico de Desempenho Operaciona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text-properties style:font-name="Calibri" fo:font-family="Calibri" style:font-family-generic="roman" style:font-pitch="variable" fo:language="pt" fo:country="BR"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left="1.632cm" fo:margin-right="0cm" fo:margin-top="0.018cm" fo:margin-bottom="0cm" style:contextual-spacing="false" fo:text-align="center" style:justify-single-word="false"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left="1.549cm" fo:margin-right="0cm" fo:margin-top="0.056cm" fo:margin-bottom="0cm" style:contextual-spacing="false" fo:text-indent="-0.637cm" style:auto-text-indent="false"/>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list-style-name="" style:class="text">
      <style:paragraph-properties fo:margin-left="1.528cm" fo:margin-right="0cm" fo:text-indent="-1.251cm" style:auto-text-indent="false"/>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default-outline-level="" style:class="index">
      <style:paragraph-properties fo:margin-left="0.914cm" fo:margin-right="0cm" fo:margin-top="0.279cm" fo:margin-bottom="0cm" style:contextual-spacing="false" fo:text-indent="0cm" style:auto-text-indent="false"/>
      <style:text-properties fo:font-size="14pt" fo:font-weight="bold" style:font-size-asian="14pt" style:font-weight-asian="bold" style:font-size-complex="14pt" style:font-weight-complex="bold"/>
    </style:style>
    <style:style style:name="Contents_20_2" style:display-name="Contents 2" style:family="paragraph" style:parent-style-name="Standard" style:default-outline-level="" style:class="index">
      <style:paragraph-properties fo:margin-left="2.819cm" fo:margin-right="0cm" fo:margin-top="0.277cm" fo:margin-bottom="0cm" style:contextual-spacing="false" fo:text-indent="-1.272cm" style:auto-text-indent="false"/>
      <style:text-properties fo:font-weight="bold" style:font-weight-asian="bold" style:font-weight-complex="bold"/>
    </style:style>
    <style:style style:name="Title" style:family="paragraph" style:parent-style-name="Standard" style:default-outline-level="" style:class="chapter">
      <style:paragraph-properties fo:margin-left="1.769cm" fo:margin-right="2.221cm" fo:text-align="center" style:justify-single-word="false" fo:text-indent="-0.012cm" style:auto-text-indent="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528cm" fo:margin-right="0cm" fo:text-indent="0cm" style:auto-text-indent="false"/>
    </style:style>
    <style:style style:name="Table_20_Paragraph" style:display-name="Table Paragraph" style:family="paragraph" style:parent-style-name="Standard" style:default-outline-level="">
      <style:paragraph-properties fo:margin-left="0.238cm" fo:margin-right="0cm" fo:line-height="0.43cm" fo:text-align="center" style:justify-single-word="false" fo:text-indent="0cm" style:auto-text-indent="false"/>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language="pt" fo:country="BR" style:language-asian="en" style:country-asian="US" style:language-complex="ar" style:country-complex="SA"/>
    </style:style>
    <style:style style:name="ListLabel_20_2" style:display-name="ListLabel 2" style:family="text">
      <style:text-properties style:font-name="Calibri" fo:font-family="Calibri" style:font-family-generic="roman" style:font-pitch="variable" fo:font-size="12pt" fo:language="pt" fo:country="BR"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text-scale="100%"/>
    </style:style>
    <style:style style:name="ListLabel_20_3" style:display-name="ListLabel 3" style:family="text">
      <style:text-properties fo:letter-spacing="-0.002cm" fo:language="pt" fo:country="BR" fo:font-weight="bold" style:language-asian="en" style:country-asian="US" style:font-weight-asian="bold" style:language-complex="ar" style:country-complex="SA" style:font-weight-complex="bold" style:text-scale="100%"/>
    </style:style>
    <style:style style:name="ListLabel_20_4" style:display-name="ListLabel 4" style:family="text">
      <style:text-properties fo:language="pt" fo:country="BR" style:language-asian="en" style:country-asian="US" style:language-complex="ar" style:country-complex="SA"/>
    </style:style>
    <style:style style:name="ListLabel_20_5" style:display-name="ListLabel 5" style:family="text">
      <style:text-properties fo:language="pt" fo:country="BR" style:language-asian="en" style:country-asian="US" style:language-complex="ar" style:country-complex="SA"/>
    </style:style>
    <style:style style:name="ListLabel_20_6" style:display-name="ListLabel 6" style:family="text">
      <style:text-properties fo:language="pt" fo:country="BR" style:language-asian="en" style:country-asian="US" style:language-complex="ar" style:country-complex="SA"/>
    </style:style>
    <style:style style:name="ListLabel_20_7" style:display-name="ListLabel 7" style:family="text">
      <style:text-properties fo:language="pt" fo:country="BR" style:language-asian="en" style:country-asian="US" style:language-complex="ar" style:country-complex="SA"/>
    </style:style>
    <style:style style:name="ListLabel_20_8" style:display-name="ListLabel 8" style:family="text">
      <style:text-properties fo:language="pt" fo:country="BR" style:language-asian="en" style:country-asian="US" style:language-complex="ar" style:country-complex="SA"/>
    </style:style>
    <style:style style:name="ListLabel_20_9" style:display-name="ListLabel 9" style:family="text">
      <style:text-properties fo:language="pt" fo:country="BR" style:language-asian="en" style:country-asian="US" style:language-complex="ar" style:country-complex="SA"/>
    </style:style>
    <style:style style:name="ListLabel_20_10" style:display-name="ListLabel 10" style:family="text">
      <style:text-properties fo:font-size="12pt" fo:language="pt" fo:country="BR"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language="pt" fo:country="BR" style:language-asian="en" style:country-asian="US" style:language-complex="ar" style:country-complex="SA"/>
    </style:style>
    <style:style style:name="ListLabel_20_12" style:display-name="ListLabel 12" style:family="text">
      <style:text-properties fo:language="pt" fo:country="BR" style:language-asian="en" style:country-asian="US" style:language-complex="ar" style:country-complex="SA"/>
    </style:style>
    <style:style style:name="ListLabel_20_13" style:display-name="ListLabel 13" style:family="text">
      <style:text-properties fo:language="pt" fo:country="BR" style:language-asian="en" style:country-asian="US" style:language-complex="ar" style:country-complex="SA"/>
    </style:style>
    <style:style style:name="ListLabel_20_14" style:display-name="ListLabel 14" style:family="text">
      <style:text-properties fo:language="pt" fo:country="BR" style:language-asian="en" style:country-asian="US" style:language-complex="ar" style:country-complex="SA"/>
    </style:style>
    <style:style style:name="ListLabel_20_15" style:display-name="ListLabel 15" style:family="text">
      <style:text-properties fo:language="pt" fo:country="BR" style:language-asian="en" style:country-asian="US" style:language-complex="ar" style:country-complex="SA"/>
    </style:style>
    <style:style style:name="ListLabel_20_16" style:display-name="ListLabel 16" style:family="text">
      <style:text-properties fo:language="pt" fo:country="BR" style:language-asian="en" style:country-asian="US" style:language-complex="ar" style:country-complex="SA"/>
    </style:style>
    <style:style style:name="ListLabel_20_17" style:display-name="ListLabel 17" style:family="text">
      <style:text-properties fo:language="pt" fo:country="BR" style:language-asian="en" style:country-asian="US" style:language-complex="ar" style:country-complex="SA"/>
    </style:style>
    <style:style style:name="ListLabel_20_18" style:display-name="ListLabel 18" style:family="text">
      <style:text-properties fo:language="pt" fo:country="BR" style:language-asian="en" style:country-asian="US" style:language-complex="ar" style:country-complex="SA"/>
    </style:style>
    <style:style style:name="ListLabel_20_19" style:display-name="ListLabel 19" style:family="text">
      <style:text-properties fo:language="pt" fo:country="BR" style:language-asian="en" style:country-asian="US" style:language-complex="ar" style:country-complex="SA"/>
    </style:style>
    <style:style style:name="ListLabel_20_20" style:display-name="ListLabel 20" style:family="text">
      <style:text-properties style:font-name="Calibri" fo:font-family="Calibri" style:font-family-generic="roman" style:font-pitch="variable" fo:font-size="12pt" fo:language="pt" fo:country="BR"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text-scale="100%"/>
    </style:style>
    <style:style style:name="ListLabel_20_21" style:display-name="ListLabel 21" style:family="text">
      <style:text-properties style:font-name="Calibri" fo:font-family="Calibri" style:font-family-generic="roman" style:font-pitch="variable" fo:font-size="12pt" fo:letter-spacing="-0.002cm" fo:language="pt" fo:country="BR"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text-scale="100%"/>
    </style:style>
    <style:style style:name="ListLabel_20_22" style:display-name="ListLabel 22" style:family="text">
      <style:text-properties fo:language="pt" fo:country="BR" style:language-asian="en" style:country-asian="US" style:language-complex="ar" style:country-complex="SA"/>
    </style:style>
    <style:style style:name="ListLabel_20_23" style:display-name="ListLabel 23" style:family="text">
      <style:text-properties fo:language="pt" fo:country="BR" style:language-asian="en" style:country-asian="US" style:language-complex="ar" style:country-complex="SA"/>
    </style:style>
    <style:style style:name="ListLabel_20_24" style:display-name="ListLabel 24" style:family="text">
      <style:text-properties fo:language="pt" fo:country="BR" style:language-asian="en" style:country-asian="US" style:language-complex="ar" style:country-complex="SA"/>
    </style:style>
    <style:style style:name="ListLabel_20_25" style:display-name="ListLabel 25" style:family="text">
      <style:text-properties fo:language="pt" fo:country="BR" style:language-asian="en" style:country-asian="US" style:language-complex="ar" style:country-complex="SA"/>
    </style:style>
    <style:style style:name="ListLabel_20_26" style:display-name="ListLabel 26" style:family="text">
      <style:text-properties fo:language="pt" fo:country="BR" style:language-asian="en" style:country-asian="US" style:language-complex="ar" style:country-complex="SA"/>
    </style:style>
    <style:style style:name="ListLabel_20_27" style:display-name="ListLabel 27" style:family="text">
      <style:text-properties fo:language="pt" fo:country="BR" style:language-asian="en" style:country-asian="US" style:language-complex="ar" style:country-complex="SA"/>
    </style:style>
    <style:style style:name="ListLabel_20_28" style:display-name="ListLabel 28" style:family="text">
      <style:text-properties fo:language="pt" fo:country="BR" style:language-asian="en" style:country-asian="US" style:language-complex="ar" style:country-complex="SA" style:text-scale="100%"/>
    </style:style>
    <style:style style:name="ListLabel_20_29" style:display-name="ListLabel 29" style:family="text">
      <style:text-properties fo:language="pt" fo:country="BR" style:language-asian="en" style:country-asian="US" style:language-complex="ar" style:country-complex="SA"/>
    </style:style>
    <style:style style:name="ListLabel_20_30" style:display-name="ListLabel 30" style:family="text">
      <style:text-properties fo:language="pt" fo:country="BR" style:language-asian="en" style:country-asian="US" style:language-complex="ar" style:country-complex="SA"/>
    </style:style>
    <style:style style:name="ListLabel_20_31" style:display-name="ListLabel 31" style:family="text">
      <style:text-properties fo:language="pt" fo:country="BR" style:language-asian="en" style:country-asian="US" style:language-complex="ar" style:country-complex="SA"/>
    </style:style>
    <style:style style:name="ListLabel_20_32" style:display-name="ListLabel 32" style:family="text">
      <style:text-properties fo:language="pt" fo:country="BR" style:language-asian="en" style:country-asian="US" style:language-complex="ar" style:country-complex="SA"/>
    </style:style>
    <style:style style:name="ListLabel_20_33" style:display-name="ListLabel 33" style:family="text">
      <style:text-properties fo:language="pt" fo:country="BR" style:language-asian="en" style:country-asian="US" style:language-complex="ar" style:country-complex="SA"/>
    </style:style>
    <style:style style:name="ListLabel_20_34" style:display-name="ListLabel 34" style:family="text">
      <style:text-properties fo:language="pt" fo:country="BR" style:language-asian="en" style:country-asian="US" style:language-complex="ar" style:country-complex="SA"/>
    </style:style>
    <style:style style:name="ListLabel_20_35" style:display-name="ListLabel 35" style:family="text">
      <style:text-properties fo:language="pt" fo:country="BR" style:language-asian="en" style:country-asian="US" style:language-complex="ar" style:country-complex="SA"/>
    </style:style>
    <style:style style:name="ListLabel_20_36" style:display-name="ListLabel 36" style:family="text">
      <style:text-properties fo:language="pt" fo:country="BR" style:language-asian="en" style:country-asian="US" style:language-complex="ar" style:country-complex="SA"/>
    </style:style>
    <style:style style:name="ListLabel_20_37" style:display-name="ListLabel 37" style:family="text">
      <style:text-properties fo:language="pt" fo:country="BR" style:language-asian="en" style:country-asian="US" style:language-complex="ar" style:country-complex="SA" style:text-scale="100%"/>
    </style:style>
    <style:style style:name="ListLabel_20_38" style:display-name="ListLabel 38" style:family="text">
      <style:text-properties fo:language="pt" fo:country="BR" style:language-asian="en" style:country-asian="US" style:language-complex="ar" style:country-complex="SA"/>
    </style:style>
    <style:style style:name="ListLabel_20_39" style:display-name="ListLabel 39" style:family="text">
      <style:text-properties fo:language="pt" fo:country="BR" style:language-asian="en" style:country-asian="US" style:language-complex="ar" style:country-complex="SA"/>
    </style:style>
    <style:style style:name="ListLabel_20_40" style:display-name="ListLabel 40" style:family="text">
      <style:text-properties fo:language="pt" fo:country="BR" style:language-asian="en" style:country-asian="US" style:language-complex="ar" style:country-complex="SA"/>
    </style:style>
    <style:style style:name="ListLabel_20_41" style:display-name="ListLabel 41" style:family="text">
      <style:text-properties fo:language="pt" fo:country="BR" style:language-asian="en" style:country-asian="US" style:language-complex="ar" style:country-complex="SA"/>
    </style:style>
    <style:style style:name="ListLabel_20_42" style:display-name="ListLabel 42" style:family="text">
      <style:text-properties fo:language="pt" fo:country="BR" style:language-asian="en" style:country-asian="US" style:language-complex="ar" style:country-complex="SA"/>
    </style:style>
    <style:style style:name="ListLabel_20_43" style:display-name="ListLabel 43" style:family="text">
      <style:text-properties fo:language="pt" fo:country="BR" style:language-asian="en" style:country-asian="US" style:language-complex="ar" style:country-complex="SA"/>
    </style:style>
    <style:style style:name="ListLabel_20_44" style:display-name="ListLabel 44" style:family="text">
      <style:text-properties fo:language="pt" fo:country="BR" style:language-asian="en" style:country-asian="US" style:language-complex="ar" style:country-complex="SA"/>
    </style:style>
    <style:style style:name="ListLabel_20_45" style:display-name="ListLabel 45" style:family="text">
      <style:text-properties fo:language="pt" fo:country="BR" style:language-asian="en" style:country-asian="US" style:language-complex="ar" style:country-complex="SA"/>
    </style:style>
    <style:style style:name="ListLabel_20_46" style:display-name="ListLabel 46" style:family="text">
      <style:text-properties fo:language="pt" fo:country="BR" style:language-asian="en" style:country-asian="US" style:language-complex="ar" style:country-complex="SA" style:text-scale="100%"/>
    </style:style>
    <style:style style:name="ListLabel_20_47" style:display-name="ListLabel 47" style:family="text">
      <style:text-properties fo:language="pt" fo:country="BR" style:language-asian="en" style:country-asian="US" style:language-complex="ar" style:country-complex="SA"/>
    </style:style>
    <style:style style:name="ListLabel_20_48" style:display-name="ListLabel 48" style:family="text">
      <style:text-properties fo:language="pt" fo:country="BR" style:language-asian="en" style:country-asian="US" style:language-complex="ar" style:country-complex="SA"/>
    </style:style>
    <style:style style:name="ListLabel_20_49" style:display-name="ListLabel 49" style:family="text">
      <style:text-properties fo:language="pt" fo:country="BR" style:language-asian="en" style:country-asian="US" style:language-complex="ar" style:country-complex="SA"/>
    </style:style>
    <style:style style:name="ListLabel_20_50" style:display-name="ListLabel 50" style:family="text">
      <style:text-properties fo:language="pt" fo:country="BR" style:language-asian="en" style:country-asian="US" style:language-complex="ar" style:country-complex="SA"/>
    </style:style>
    <style:style style:name="ListLabel_20_51" style:display-name="ListLabel 51" style:family="text">
      <style:text-properties fo:language="pt" fo:country="BR" style:language-asian="en" style:country-asian="US" style:language-complex="ar" style:country-complex="SA"/>
    </style:style>
    <style:style style:name="ListLabel_20_52" style:display-name="ListLabel 52" style:family="text">
      <style:text-properties fo:language="pt" fo:country="BR" style:language-asian="en" style:country-asian="US" style:language-complex="ar" style:country-complex="SA"/>
    </style:style>
    <style:style style:name="ListLabel_20_53" style:display-name="ListLabel 53" style:family="text">
      <style:text-properties fo:language="pt" fo:country="BR" style:language-asian="en" style:country-asian="US" style:language-complex="ar" style:country-complex="SA"/>
    </style:style>
    <style:style style:name="ListLabel_20_54" style:display-name="ListLabel 54" style:family="text">
      <style:text-properties fo:language="pt" fo:country="BR" style:language-asian="en" style:country-asian="US" style:language-complex="ar" style:country-complex="SA"/>
    </style:style>
    <style:style style:name="ListLabel_20_55" style:display-name="ListLabel 55" style:family="text">
      <style:text-properties style:font-name="Calibri" fo:font-family="Calibri" style:font-family-generic="roman" style:font-pitch="variable" fo:font-size="12pt" fo:language="pt" fo:country="BR"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text-scale="100%"/>
    </style:style>
    <style:style style:name="ListLabel_20_56" style:display-name="ListLabel 56" style:family="text">
      <style:text-properties fo:language="pt" fo:country="BR" style:language-asian="en" style:country-asian="US" style:language-complex="ar" style:country-complex="SA"/>
    </style:style>
    <style:style style:name="ListLabel_20_57" style:display-name="ListLabel 57" style:family="text">
      <style:text-properties fo:language="pt" fo:country="BR" style:language-asian="en" style:country-asian="US" style:language-complex="ar" style:country-complex="SA"/>
    </style:style>
    <style:style style:name="ListLabel_20_58" style:display-name="ListLabel 58" style:family="text">
      <style:text-properties fo:language="pt" fo:country="BR" style:language-asian="en" style:country-asian="US" style:language-complex="ar" style:country-complex="SA"/>
    </style:style>
    <style:style style:name="ListLabel_20_59" style:display-name="ListLabel 59" style:family="text">
      <style:text-properties fo:language="pt" fo:country="BR" style:language-asian="en" style:country-asian="US" style:language-complex="ar" style:country-complex="SA"/>
    </style:style>
    <style:style style:name="ListLabel_20_60" style:display-name="ListLabel 60" style:family="text">
      <style:text-properties fo:language="pt" fo:country="BR" style:language-asian="en" style:country-asian="US" style:language-complex="ar" style:country-complex="SA"/>
    </style:style>
    <style:style style:name="ListLabel_20_61" style:display-name="ListLabel 61" style:family="text">
      <style:text-properties fo:language="pt" fo:country="BR" style:language-asian="en" style:country-asian="US" style:language-complex="ar" style:country-complex="SA"/>
    </style:style>
    <style:style style:name="ListLabel_20_62" style:display-name="ListLabel 62" style:family="text">
      <style:text-properties fo:language="pt" fo:country="BR" style:language-asian="en" style:country-asian="US" style:language-complex="ar" style:country-complex="SA"/>
    </style:style>
    <style:style style:name="ListLabel_20_63" style:display-name="ListLabel 63" style:family="text">
      <style:text-properties fo:language="pt" fo:country="BR" style:language-asian="en" style:country-asian="US" style:language-complex="ar" style:country-complex="SA"/>
    </style:style>
    <style:style style:name="ListLabel_20_64" style:display-name="ListLabel 64" style:family="text">
      <style:text-properties fo:language="pt" fo:country="BR" style:language-asian="en" style:country-asian="US" style:language-complex="ar" style:country-complex="SA" style:text-scale="100%"/>
    </style:style>
    <style:style style:name="ListLabel_20_65" style:display-name="ListLabel 65" style:family="text">
      <style:text-properties fo:language="pt" fo:country="BR" style:language-asian="en" style:country-asian="US" style:language-complex="ar" style:country-complex="SA"/>
    </style:style>
    <style:style style:name="ListLabel_20_66" style:display-name="ListLabel 66" style:family="text">
      <style:text-properties fo:language="pt" fo:country="BR" style:language-asian="en" style:country-asian="US" style:language-complex="ar" style:country-complex="SA"/>
    </style:style>
    <style:style style:name="ListLabel_20_67" style:display-name="ListLabel 67" style:family="text">
      <style:text-properties fo:language="pt" fo:country="BR" style:language-asian="en" style:country-asian="US" style:language-complex="ar" style:country-complex="SA"/>
    </style:style>
    <style:style style:name="ListLabel_20_68" style:display-name="ListLabel 68" style:family="text">
      <style:text-properties fo:language="pt" fo:country="BR" style:language-asian="en" style:country-asian="US" style:language-complex="ar" style:country-complex="SA"/>
    </style:style>
    <style:style style:name="ListLabel_20_69" style:display-name="ListLabel 69" style:family="text">
      <style:text-properties fo:language="pt" fo:country="BR" style:language-asian="en" style:country-asian="US" style:language-complex="ar" style:country-complex="SA"/>
    </style:style>
    <style:style style:name="ListLabel_20_70" style:display-name="ListLabel 70" style:family="text">
      <style:text-properties fo:language="pt" fo:country="BR" style:language-asian="en" style:country-asian="US" style:language-complex="ar" style:country-complex="SA"/>
    </style:style>
    <style:style style:name="ListLabel_20_71" style:display-name="ListLabel 71" style:family="text">
      <style:text-properties fo:language="pt" fo:country="BR" style:language-asian="en" style:country-asian="US" style:language-complex="ar" style:country-complex="SA"/>
    </style:style>
    <style:style style:name="ListLabel_20_72" style:display-name="ListLabel 72" style:family="text">
      <style:text-properties fo:language="pt" fo:country="BR" style:language-asian="en" style:country-asian="US" style:language-complex="ar" style:country-complex="SA"/>
    </style:style>
    <style:style style:name="ListLabel_20_73" style:display-name="ListLabel 73" style:family="text">
      <style:text-properties fo:language="pt" fo:country="BR" style:language-asian="en" style:country-asian="US" style:language-complex="ar" style:country-complex="SA" style:text-scale="100%"/>
    </style:style>
    <style:style style:name="ListLabel_20_74" style:display-name="ListLabel 74" style:family="text">
      <style:text-properties fo:language="pt" fo:country="BR" style:language-asian="en" style:country-asian="US" style:language-complex="ar" style:country-complex="SA"/>
    </style:style>
    <style:style style:name="ListLabel_20_75" style:display-name="ListLabel 75" style:family="text">
      <style:text-properties fo:language="pt" fo:country="BR" style:language-asian="en" style:country-asian="US" style:language-complex="ar" style:country-complex="SA"/>
    </style:style>
    <style:style style:name="ListLabel_20_76" style:display-name="ListLabel 76" style:family="text">
      <style:text-properties fo:language="pt" fo:country="BR" style:language-asian="en" style:country-asian="US" style:language-complex="ar" style:country-complex="SA"/>
    </style:style>
    <style:style style:name="ListLabel_20_77" style:display-name="ListLabel 77" style:family="text">
      <style:text-properties fo:language="pt" fo:country="BR" style:language-asian="en" style:country-asian="US" style:language-complex="ar" style:country-complex="SA"/>
    </style:style>
    <style:style style:name="ListLabel_20_78" style:display-name="ListLabel 78" style:family="text">
      <style:text-properties fo:language="pt" fo:country="BR" style:language-asian="en" style:country-asian="US" style:language-complex="ar" style:country-complex="SA"/>
    </style:style>
    <style:style style:name="ListLabel_20_79" style:display-name="ListLabel 79" style:family="text">
      <style:text-properties fo:language="pt" fo:country="BR" style:language-asian="en" style:country-asian="US" style:language-complex="ar" style:country-complex="SA"/>
    </style:style>
    <style:style style:name="ListLabel_20_80" style:display-name="ListLabel 80" style:family="text">
      <style:text-properties fo:language="pt" fo:country="BR" style:language-asian="en" style:country-asian="US" style:language-complex="ar" style:country-complex="SA"/>
    </style:style>
    <style:style style:name="ListLabel_20_81" style:display-name="ListLabel 81" style:family="text">
      <style:text-properties fo:language="pt" fo:country="BR" style:language-asian="en" style:country-asian="US" style:language-complex="ar" style:country-complex="SA"/>
    </style:style>
    <style:style style:name="ListLabel_20_82" style:display-name="ListLabel 82" style:family="text">
      <style:text-properties fo:language="pt" fo:country="BR" style:language-asian="en" style:country-asian="US" style:language-complex="ar" style:country-complex="SA" style:text-scale="100%"/>
    </style:style>
    <style:style style:name="ListLabel_20_83" style:display-name="ListLabel 83" style:family="text">
      <style:text-properties fo:language="pt" fo:country="BR" style:language-asian="en" style:country-asian="US" style:language-complex="ar" style:country-complex="SA"/>
    </style:style>
    <style:style style:name="ListLabel_20_84" style:display-name="ListLabel 84" style:family="text">
      <style:text-properties fo:language="pt" fo:country="BR" style:language-asian="en" style:country-asian="US" style:language-complex="ar" style:country-complex="SA"/>
    </style:style>
    <style:style style:name="ListLabel_20_85" style:display-name="ListLabel 85" style:family="text">
      <style:text-properties fo:language="pt" fo:country="BR" style:language-asian="en" style:country-asian="US" style:language-complex="ar" style:country-complex="SA"/>
    </style:style>
    <style:style style:name="ListLabel_20_86" style:display-name="ListLabel 86" style:family="text">
      <style:text-properties fo:language="pt" fo:country="BR" style:language-asian="en" style:country-asian="US" style:language-complex="ar" style:country-complex="SA"/>
    </style:style>
    <style:style style:name="ListLabel_20_87" style:display-name="ListLabel 87" style:family="text">
      <style:text-properties fo:language="pt" fo:country="BR" style:language-asian="en" style:country-asian="US" style:language-complex="ar" style:country-complex="SA"/>
    </style:style>
    <style:style style:name="ListLabel_20_88" style:display-name="ListLabel 88" style:family="text">
      <style:text-properties fo:language="pt" fo:country="BR" style:language-asian="en" style:country-asian="US" style:language-complex="ar" style:country-complex="SA"/>
    </style:style>
    <style:style style:name="ListLabel_20_89" style:display-name="ListLabel 89" style:family="text">
      <style:text-properties fo:language="pt" fo:country="BR" style:language-asian="en" style:country-asian="US" style:language-complex="ar" style:country-complex="SA"/>
    </style:style>
    <style:style style:name="ListLabel_20_90" style:display-name="ListLabel 90" style:family="text">
      <style:text-properties fo:language="pt" fo:country="BR" style:language-asian="en" style:country-asian="US" style:language-complex="ar" style:country-complex="SA"/>
    </style:style>
    <style:style style:name="ListLabel_20_91" style:display-name="ListLabel 91" style:family="text">
      <style:text-properties style:font-name="Calibri" fo:font-family="Calibri" style:font-family-generic="roman" style:font-pitch="variable" fo:font-size="12pt" fo:language="pt" fo:country="BR"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text-scale="100%"/>
    </style:style>
    <style:style style:name="ListLabel_20_92" style:display-name="ListLabel 92" style:family="text">
      <style:text-properties fo:language="pt" fo:country="BR" style:language-asian="en" style:country-asian="US" style:language-complex="ar" style:country-complex="SA"/>
    </style:style>
    <style:style style:name="ListLabel_20_93" style:display-name="ListLabel 93" style:family="text">
      <style:text-properties fo:language="pt" fo:country="BR" style:language-asian="en" style:country-asian="US" style:language-complex="ar" style:country-complex="SA"/>
    </style:style>
    <style:style style:name="ListLabel_20_94" style:display-name="ListLabel 94" style:family="text">
      <style:text-properties fo:language="pt" fo:country="BR" style:language-asian="en" style:country-asian="US" style:language-complex="ar" style:country-complex="SA"/>
    </style:style>
    <style:style style:name="ListLabel_20_95" style:display-name="ListLabel 95" style:family="text">
      <style:text-properties fo:language="pt" fo:country="BR" style:language-asian="en" style:country-asian="US" style:language-complex="ar" style:country-complex="SA"/>
    </style:style>
    <style:style style:name="ListLabel_20_96" style:display-name="ListLabel 96" style:family="text">
      <style:text-properties fo:language="pt" fo:country="BR" style:language-asian="en" style:country-asian="US" style:language-complex="ar" style:country-complex="SA"/>
    </style:style>
    <style:style style:name="ListLabel_20_97" style:display-name="ListLabel 97" style:family="text">
      <style:text-properties fo:language="pt" fo:country="BR" style:language-asian="en" style:country-asian="US" style:language-complex="ar" style:country-complex="SA"/>
    </style:style>
    <style:style style:name="ListLabel_20_98" style:display-name="ListLabel 98" style:family="text">
      <style:text-properties fo:language="pt" fo:country="BR" style:language-asian="en" style:country-asian="US" style:language-complex="ar" style:country-complex="SA"/>
    </style:style>
    <style:style style:name="ListLabel_20_99" style:display-name="ListLabel 99" style:family="text">
      <style:text-properties fo:language="pt" fo:country="BR" style:language-asian="en" style:country-asian="US" style:language-complex="ar" style:country-complex="SA"/>
    </style:style>
    <style:style style:name="ListLabel_20_100" style:display-name="ListLabel 100" style:family="text">
      <style:text-properties fo:language="pt" fo:country="BR" style:language-asian="en" style:country-asian="US" style:language-complex="ar" style:country-complex="SA"/>
    </style:style>
    <style:style style:name="ListLabel_20_101" style:display-name="ListLabel 101" style:family="text">
      <style:text-properties style:font-name="Calibri" fo:font-family="Calibri" style:font-family-generic="roman" style:font-pitch="variable" fo:font-size="14pt" fo:letter-spacing="-0.002cm" fo:language="pt" fo:country="BR"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00%"/>
    </style:style>
    <style:style style:name="ListLabel_20_102" style:display-name="ListLabel 102" style:family="text">
      <style:text-properties style:font-name="Calibri" fo:font-family="Calibri" style:font-family-generic="roman" style:font-pitch="variable" fo:font-size="12pt" fo:letter-spacing="-0.002cm" fo:language="pt" fo:country="BR"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text-scale="100%"/>
    </style:style>
    <style:style style:name="ListLabel_20_103" style:display-name="ListLabel 103" style:family="text">
      <style:text-properties fo:language="pt" fo:country="BR" style:language-asian="en" style:country-asian="US" style:language-complex="ar" style:country-complex="SA"/>
    </style:style>
    <style:style style:name="ListLabel_20_104" style:display-name="ListLabel 104" style:family="text">
      <style:text-properties fo:language="pt" fo:country="BR" style:language-asian="en" style:country-asian="US" style:language-complex="ar" style:country-complex="SA"/>
    </style:style>
    <style:style style:name="ListLabel_20_105" style:display-name="ListLabel 105" style:family="text">
      <style:text-properties fo:language="pt" fo:country="BR" style:language-asian="en" style:country-asian="US" style:language-complex="ar" style:country-complex="SA"/>
    </style:style>
    <style:style style:name="ListLabel_20_106" style:display-name="ListLabel 106" style:family="text">
      <style:text-properties fo:language="pt" fo:country="BR" style:language-asian="en" style:country-asian="US" style:language-complex="ar" style:country-complex="SA"/>
    </style:style>
    <style:style style:name="ListLabel_20_107" style:display-name="ListLabel 107" style:family="text">
      <style:text-properties fo:language="pt" fo:country="BR" style:language-asian="en" style:country-asian="US" style:language-complex="ar" style:country-complex="SA"/>
    </style:style>
    <style:style style:name="ListLabel_20_108" style:display-name="ListLabel 108" style:family="text">
      <style:text-properties fo:language="pt" fo:country="BR" style:language-asian="en" style:country-asian="US" style:language-complex="ar" style:country-complex="SA"/>
    </style:style>
    <style:style style:name="ListLabel_20_109" style:display-name="ListLabel 109" style:family="text">
      <style:text-properties fo:font-size="12pt" fo:language="pt" fo:country="BR"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10" style:display-name="ListLabel 110" style:family="text">
      <style:text-properties fo:language="pt" fo:country="BR" style:language-asian="en" style:country-asian="US" style:language-complex="ar" style:country-complex="SA"/>
    </style:style>
    <style:style style:name="ListLabel_20_111" style:display-name="ListLabel 111" style:family="text">
      <style:text-properties fo:language="pt" fo:country="BR" style:language-asian="en" style:country-asian="US" style:language-complex="ar" style:country-complex="SA"/>
    </style:style>
    <style:style style:name="ListLabel_20_112" style:display-name="ListLabel 112" style:family="text">
      <style:text-properties fo:language="pt" fo:country="BR" style:language-asian="en" style:country-asian="US" style:language-complex="ar" style:country-complex="SA"/>
    </style:style>
    <style:style style:name="ListLabel_20_113" style:display-name="ListLabel 113" style:family="text">
      <style:text-properties fo:language="pt" fo:country="BR" style:language-asian="en" style:country-asian="US" style:language-complex="ar" style:country-complex="SA"/>
    </style:style>
    <style:style style:name="ListLabel_20_114" style:display-name="ListLabel 114" style:family="text">
      <style:text-properties fo:language="pt" fo:country="BR" style:language-asian="en" style:country-asian="US" style:language-complex="ar" style:country-complex="SA"/>
    </style:style>
    <style:style style:name="ListLabel_20_115" style:display-name="ListLabel 115" style:family="text">
      <style:text-properties fo:language="pt" fo:country="BR" style:language-asian="en" style:country-asian="US" style:language-complex="ar" style:country-complex="SA"/>
    </style:style>
    <style:style style:name="ListLabel_20_116" style:display-name="ListLabel 116" style:family="text">
      <style:text-properties fo:language="pt" fo:country="BR" style:language-asian="en" style:country-asian="US" style:language-complex="ar" style:country-complex="SA"/>
    </style:style>
    <style:style style:name="ListLabel_20_117" style:display-name="ListLabel 117" style:family="text">
      <style:text-properties fo:language="pt" fo:country="BR"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fo:font-size="14pt" fo:letter-spacing="-0.002cm" fo:language="pt" fo:country="BR"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00%"/>
    </style:style>
    <style:style style:name="ListLabel_20_119" style:display-name="ListLabel 119" style:family="text">
      <style:text-properties style:font-name="Calibri" fo:font-family="Calibri" style:font-family-generic="roman" style:font-pitch="variable" fo:font-size="12pt" fo:language="pt" fo:country="BR"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text-scale="100%"/>
    </style:style>
    <style:style style:name="ListLabel_20_120" style:display-name="ListLabel 120" style:family="text">
      <style:text-properties fo:language="pt" fo:country="BR" style:language-asian="en" style:country-asian="US" style:language-complex="ar" style:country-complex="SA"/>
    </style:style>
    <style:style style:name="ListLabel_20_121" style:display-name="ListLabel 121" style:family="text">
      <style:text-properties fo:language="pt" fo:country="BR" style:language-asian="en" style:country-asian="US" style:language-complex="ar" style:country-complex="SA"/>
    </style:style>
    <style:style style:name="ListLabel_20_122" style:display-name="ListLabel 122" style:family="text">
      <style:text-properties fo:language="pt" fo:country="BR" style:language-asian="en" style:country-asian="US" style:language-complex="ar" style:country-complex="SA"/>
    </style:style>
    <style:style style:name="ListLabel_20_123" style:display-name="ListLabel 123" style:family="text">
      <style:text-properties fo:language="pt" fo:country="BR" style:language-asian="en" style:country-asian="US" style:language-complex="ar" style:country-complex="SA"/>
    </style:style>
    <style:style style:name="ListLabel_20_124" style:display-name="ListLabel 124" style:family="text">
      <style:text-properties fo:language="pt" fo:country="BR" style:language-asian="en" style:country-asian="US" style:language-complex="ar" style:country-complex="SA"/>
    </style:style>
    <style:style style:name="ListLabel_20_125" style:display-name="ListLabel 125" style:family="text">
      <style:text-properties fo:language="pt" fo:country="BR" style:language-asian="en" style:country-asian="US" style:language-complex="ar" style:country-complex="SA"/>
    </style:style>
    <style:style style:name="ListLabel_20_126" style:display-name="ListLabel 126" style:family="text">
      <style:text-properties fo:language="pt" fo:country="BR" style:language-asian="en" style:country-asian="US" style:language-complex="ar" style:country-complex="SA"/>
    </style:style>
    <style:style style:name="ListLabel_20_127" style:display-name="ListLabel 127" style:family="text">
      <style:text-properties style:font-name="Calibri" fo:font-family="Calibri" style:font-family-generic="roman" style:font-pitch="variable" fo:font-size="14pt" fo:letter-spacing="-0.002cm" fo:language="pt" fo:country="BR"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00%"/>
    </style:style>
    <style:style style:name="ListLabel_20_128" style:display-name="ListLabel 128" style:family="text">
      <style:text-properties style:font-name="Calibri" fo:font-family="Calibri" style:font-family-generic="roman" style:font-pitch="variable" fo:font-size="11pt" fo:letter-spacing="-0.004cm" fo:language="pt" fo:country="BR" fo:font-weight="bold" style:font-name-asian="Calibri1" style:font-family-asian="Calibri" style:font-family-generic-asian="system" style:font-pitch-asian="variable" style:font-size-asian="11pt" style:language-asian="en" style:country-asian="US" style:font-weight-asian="bold" style:font-name-complex="Calibri1" style:font-family-complex="Calibri" style:font-family-generic-complex="system" style:font-pitch-complex="variable" style:font-size-complex="11pt" style:language-complex="ar" style:country-complex="SA" style:font-weight-complex="bold" style:text-scale="100%"/>
    </style:style>
    <style:style style:name="ListLabel_20_129" style:display-name="ListLabel 129" style:family="text">
      <style:text-properties fo:language="pt" fo:country="BR" style:language-asian="en" style:country-asian="US" style:language-complex="ar" style:country-complex="SA"/>
    </style:style>
    <style:style style:name="ListLabel_20_130" style:display-name="ListLabel 130" style:family="text">
      <style:text-properties fo:language="pt" fo:country="BR" style:language-asian="en" style:country-asian="US" style:language-complex="ar" style:country-complex="SA"/>
    </style:style>
    <style:style style:name="ListLabel_20_131" style:display-name="ListLabel 131" style:family="text">
      <style:text-properties fo:language="pt" fo:country="BR" style:language-asian="en" style:country-asian="US" style:language-complex="ar" style:country-complex="SA"/>
    </style:style>
    <style:style style:name="ListLabel_20_132" style:display-name="ListLabel 132" style:family="text">
      <style:text-properties fo:language="pt" fo:country="BR" style:language-asian="en" style:country-asian="US" style:language-complex="ar" style:country-complex="SA"/>
    </style:style>
    <style:style style:name="ListLabel_20_133" style:display-name="ListLabel 133" style:family="text">
      <style:text-properties fo:language="pt" fo:country="BR" style:language-asian="en" style:country-asian="US" style:language-complex="ar" style:country-complex="SA"/>
    </style:style>
    <style:style style:name="ListLabel_20_134" style:display-name="ListLabel 134" style:family="text">
      <style:text-properties fo:language="pt" fo:country="BR" style:language-asian="en" style:country-asian="US" style:language-complex="ar" style:country-complex="SA"/>
    </style:style>
    <style:style style:name="ListLabel_20_135" style:display-name="ListLabel 135" style:family="text">
      <style:text-properties fo:language="pt" fo:country="BR" style:language-asian="en" style:country-asian="US" style:language-complex="ar" style:country-complex="SA"/>
    </style:style>
    <style:style style:name="ListLabel_20_136" style:display-name="ListLabel 136" style:family="text">
      <style:text-properties fo:language="pt" fo:country="BR" style:language-asian="en" style:country-asian="US" style:language-complex="ar" style:country-complex="SA"/>
    </style:style>
    <style:style style:name="ListLabel_20_137" style:display-name="ListLabel 137" style:family="text">
      <style:text-properties style:font-name="Calibri" fo:font-family="Calibri" style:font-family-generic="roman" style:font-pitch="variable" fo:font-size="11pt" fo:letter-spacing="-0.004cm" fo:language="pt" fo:country="BR" fo:font-weight="bold" style:font-name-asian="Calibri1" style:font-family-asian="Calibri" style:font-family-generic-asian="system" style:font-pitch-asian="variable" style:font-size-asian="11pt" style:language-asian="en" style:country-asian="US" style:font-weight-asian="bold" style:font-name-complex="Calibri1" style:font-family-complex="Calibri" style:font-family-generic-complex="system" style:font-pitch-complex="variable" style:font-size-complex="11pt" style:language-complex="ar" style:country-complex="SA" style:font-weight-complex="bold" style:text-scale="100%"/>
    </style:style>
    <style:style style:name="ListLabel_20_138" style:display-name="ListLabel 138" style:family="text">
      <style:text-properties fo:language="pt" fo:country="BR" style:language-asian="en" style:country-asian="US" style:language-complex="ar" style:country-complex="SA"/>
    </style:style>
    <style:style style:name="ListLabel_20_139" style:display-name="ListLabel 139" style:family="text">
      <style:text-properties fo:language="pt" fo:country="BR" style:language-asian="en" style:country-asian="US" style:language-complex="ar" style:country-complex="SA"/>
    </style:style>
    <style:style style:name="ListLabel_20_140" style:display-name="ListLabel 140" style:family="text">
      <style:text-properties fo:language="pt" fo:country="BR" style:language-asian="en" style:country-asian="US" style:language-complex="ar" style:country-complex="SA"/>
    </style:style>
    <style:style style:name="ListLabel_20_141" style:display-name="ListLabel 141" style:family="text">
      <style:text-properties fo:language="pt" fo:country="BR" style:language-asian="en" style:country-asian="US" style:language-complex="ar" style:country-complex="SA"/>
    </style:style>
    <style:style style:name="ListLabel_20_142" style:display-name="ListLabel 142" style:family="text">
      <style:text-properties fo:language="pt" fo:country="BR" style:language-asian="en" style:country-asian="US" style:language-complex="ar" style:country-complex="SA"/>
    </style:style>
    <style:style style:name="ListLabel_20_143" style:display-name="ListLabel 143" style:family="text">
      <style:text-properties fo:language="pt" fo:country="BR" style:language-asian="en" style:country-asian="US" style:language-complex="ar" style:country-complex="SA"/>
    </style:style>
    <style:style style:name="ListLabel_20_144" style:display-name="ListLabel 144" style:family="text">
      <style:text-properties fo:language="pt" fo:country="BR"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8">
        <style:list-level-properties text:list-level-position-and-space-mode="label-alignment">
          <style:list-level-label-alignment text:label-followed-by="listtab" fo:text-indent="-1.249cm" fo:margin-left="1.528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249cm" fo:margin-left="1.528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49cm" fo:margin-left="1.528cm"/>
        </style:list-level-properties>
      </text:list-level-style-number>
      <text:list-level-style-bullet text:level="4" text:style-name="ListLabel_20_4" text:bullet-char="•">
        <style:list-level-properties text:list-level-position-and-space-mode="label-alignment">
          <style:list-level-label-alignment text:label-followed-by="listtab" fo:text-indent="-1.249cm" fo:margin-left="6.313cm"/>
        </style:list-level-properties>
      </text:list-level-style-bullet>
      <text:list-level-style-bullet text:level="5" text:style-name="ListLabel_20_5" text:bullet-char="•">
        <style:list-level-properties text:list-level-position-and-space-mode="label-alignment">
          <style:list-level-label-alignment text:label-followed-by="listtab" fo:text-indent="-1.249cm" fo:margin-left="7.913cm"/>
        </style:list-level-properties>
      </text:list-level-style-bullet>
      <text:list-level-style-bullet text:level="6" text:style-name="ListLabel_20_6" text:bullet-char="•">
        <style:list-level-properties text:list-level-position-and-space-mode="label-alignment">
          <style:list-level-label-alignment text:label-followed-by="listtab" fo:text-indent="-1.249cm" fo:margin-left="9.513cm"/>
        </style:list-level-properties>
      </text:list-level-style-bullet>
      <text:list-level-style-bullet text:level="7" text:style-name="ListLabel_20_7" text:bullet-char="•">
        <style:list-level-properties text:list-level-position-and-space-mode="label-alignment">
          <style:list-level-label-alignment text:label-followed-by="listtab" fo:text-indent="-1.249cm" fo:margin-left="11.111cm"/>
        </style:list-level-properties>
      </text:list-level-style-bullet>
      <text:list-level-style-bullet text:level="8" text:style-name="ListLabel_20_8" text:bullet-char="•">
        <style:list-level-properties text:list-level-position-and-space-mode="label-alignment">
          <style:list-level-label-alignment text:label-followed-by="listtab" fo:text-indent="-1.249cm" fo:margin-left="12.711cm"/>
        </style:list-level-properties>
      </text:list-level-style-bullet>
      <text:list-level-style-bullet text:level="9" text:style-name="ListLabel_20_9" text:bullet-char="•">
        <style:list-level-properties text:list-level-position-and-space-mode="label-alignment">
          <style:list-level-label-alignment text:label-followed-by="listtab" fo:text-indent="-1.249cm" fo:margin-left="14.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549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fo:text-indent="-0.635cm" fo:margin-left="3.147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4.743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6.33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7.934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9.53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11.125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2.721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4.3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text:start-value="7">
        <style:list-level-properties text:list-level-position-and-space-mode="label-alignment">
          <style:list-level-label-alignment text:label-followed-by="listtab" fo:text-indent="-0.64cm" fo:margin-left="0.919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64cm" fo:margin-left="0.919cm"/>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1.249cm" fo:margin-left="1.528cm"/>
        </style:list-level-properties>
      </text:list-level-style-number>
      <text:list-level-style-bullet text:level="4" text:style-name="ListLabel_20_22" text:bullet-char="•">
        <style:list-level-properties text:list-level-position-and-space-mode="label-alignment">
          <style:list-level-label-alignment text:label-followed-by="listtab" fo:text-indent="-1.249cm" fo:margin-left="5.069cm"/>
        </style:list-level-properties>
      </text:list-level-style-bullet>
      <text:list-level-style-bullet text:level="5" text:style-name="ListLabel_20_23" text:bullet-char="•">
        <style:list-level-properties text:list-level-position-and-space-mode="label-alignment">
          <style:list-level-label-alignment text:label-followed-by="listtab" fo:text-indent="-1.249cm" fo:margin-left="6.847cm"/>
        </style:list-level-properties>
      </text:list-level-style-bullet>
      <text:list-level-style-bullet text:level="6" text:style-name="ListLabel_20_24" text:bullet-char="•">
        <style:list-level-properties text:list-level-position-and-space-mode="label-alignment">
          <style:list-level-label-alignment text:label-followed-by="listtab" fo:text-indent="-1.249cm" fo:margin-left="8.624cm"/>
        </style:list-level-properties>
      </text:list-level-style-bullet>
      <text:list-level-style-bullet text:level="7" text:style-name="ListLabel_20_25" text:bullet-char="•">
        <style:list-level-properties text:list-level-position-and-space-mode="label-alignment">
          <style:list-level-label-alignment text:label-followed-by="listtab" fo:text-indent="-1.249cm" fo:margin-left="10.4cm"/>
        </style:list-level-properties>
      </text:list-level-style-bullet>
      <text:list-level-style-bullet text:level="8" text:style-name="ListLabel_20_26" text:bullet-char="•">
        <style:list-level-properties text:list-level-position-and-space-mode="label-alignment">
          <style:list-level-label-alignment text:label-followed-by="listtab" fo:text-indent="-1.249cm" fo:margin-left="12.178cm"/>
        </style:list-level-properties>
      </text:list-level-style-bullet>
      <text:list-level-style-bullet text:level="9" text:style-name="ListLabel_20_27" text:bullet-char="•">
        <style:list-level-properties text:list-level-position-and-space-mode="label-alignment">
          <style:list-level-label-alignment text:label-followed-by="listtab" fo:text-indent="-1.249cm" fo:margin-left="13.95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635cm" fo:margin-left="1.549cm"/>
        </style:list-level-properties>
      </text:list-level-style-number>
      <text:list-level-style-bullet text:level="2" text:style-name="ListLabel_20_29" text:bullet-char="•">
        <style:list-level-properties text:list-level-position-and-space-mode="label-alignment">
          <style:list-level-label-alignment text:label-followed-by="listtab" fo:text-indent="-0.635cm" fo:margin-left="3.147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4.743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6.33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7.934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9.53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11.125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2.721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4.3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635cm" fo:margin-left="1.549cm"/>
        </style:list-level-properties>
      </text:list-level-style-number>
      <text:list-level-style-bullet text:level="2" text:style-name="ListLabel_20_38" text:bullet-char="•">
        <style:list-level-properties text:list-level-position-and-space-mode="label-alignment">
          <style:list-level-label-alignment text:label-followed-by="listtab" fo:text-indent="-0.635cm" fo:margin-left="3.147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4.743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6.338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7.934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9.53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11.125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2.721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4.3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635cm" fo:margin-left="1.549cm"/>
        </style:list-level-properties>
      </text:list-level-style-number>
      <text:list-level-style-bullet text:level="2" text:style-name="ListLabel_20_47" text:bullet-char="•">
        <style:list-level-properties text:list-level-position-and-space-mode="label-alignment">
          <style:list-level-label-alignment text:label-followed-by="listtab" fo:text-indent="-0.635cm" fo:margin-left="3.147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4.743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6.33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7.934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9.53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11.125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2.721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4.3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635cm" fo:margin-left="1.549cm"/>
        </style:list-level-properties>
      </text:list-level-style-number>
      <text:list-level-style-bullet text:level="2" text:style-name="ListLabel_20_56" text:bullet-char="•">
        <style:list-level-properties text:list-level-position-and-space-mode="label-alignment">
          <style:list-level-label-alignment text:label-followed-by="listtab" fo:text-indent="-0.635cm" fo:margin-left="3.147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4.743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6.33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7.934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9.53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11.125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2.721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4.3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text-indent="-0.635cm" fo:margin-left="1.549cm"/>
        </style:list-level-properties>
      </text:list-level-style-number>
      <text:list-level-style-bullet text:level="2" text:style-name="ListLabel_20_65" text:bullet-char="•">
        <style:list-level-properties text:list-level-position-and-space-mode="label-alignment">
          <style:list-level-label-alignment text:label-followed-by="listtab" fo:text-indent="-0.635cm" fo:margin-left="3.147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4.743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6.338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7.934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9.53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11.125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2.721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4.3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635cm" fo:margin-left="1.549cm"/>
        </style:list-level-properties>
      </text:list-level-style-number>
      <text:list-level-style-bullet text:level="2" text:style-name="ListLabel_20_74" text:bullet-char="•">
        <style:list-level-properties text:list-level-position-and-space-mode="label-alignment">
          <style:list-level-label-alignment text:label-followed-by="listtab" fo:text-indent="-0.635cm" fo:margin-left="3.147cm"/>
        </style:list-level-properties>
      </text:list-level-style-bullet>
      <text:list-level-style-bullet text:level="3" text:style-name="ListLabel_20_75" text:bullet-char="•">
        <style:list-level-properties text:list-level-position-and-space-mode="label-alignment">
          <style:list-level-label-alignment text:label-followed-by="listtab" fo:text-indent="-0.635cm" fo:margin-left="4.743cm"/>
        </style:list-level-properties>
      </text:list-level-style-bullet>
      <text:list-level-style-bullet text:level="4" text:style-name="ListLabel_20_76" text:bullet-char="•">
        <style:list-level-properties text:list-level-position-and-space-mode="label-alignment">
          <style:list-level-label-alignment text:label-followed-by="listtab" fo:text-indent="-0.635cm" fo:margin-left="6.338cm"/>
        </style:list-level-properties>
      </text:list-level-style-bullet>
      <text:list-level-style-bullet text:level="5" text:style-name="ListLabel_20_77" text:bullet-char="•">
        <style:list-level-properties text:list-level-position-and-space-mode="label-alignment">
          <style:list-level-label-alignment text:label-followed-by="listtab" fo:text-indent="-0.635cm" fo:margin-left="7.934cm"/>
        </style:list-level-properties>
      </text:list-level-style-bullet>
      <text:list-level-style-bullet text:level="6" text:style-name="ListLabel_20_78" text:bullet-char="•">
        <style:list-level-properties text:list-level-position-and-space-mode="label-alignment">
          <style:list-level-label-alignment text:label-followed-by="listtab" fo:text-indent="-0.635cm" fo:margin-left="9.53cm"/>
        </style:list-level-properties>
      </text:list-level-style-bullet>
      <text:list-level-style-bullet text:level="7" text:style-name="ListLabel_20_79" text:bullet-char="•">
        <style:list-level-properties text:list-level-position-and-space-mode="label-alignment">
          <style:list-level-label-alignment text:label-followed-by="listtab" fo:text-indent="-0.635cm" fo:margin-left="11.125cm"/>
        </style:list-level-properties>
      </text:list-level-style-bullet>
      <text:list-level-style-bullet text:level="8" text:style-name="ListLabel_20_80" text:bullet-char="•">
        <style:list-level-properties text:list-level-position-and-space-mode="label-alignment">
          <style:list-level-label-alignment text:label-followed-by="listtab" fo:text-indent="-0.635cm" fo:margin-left="12.721cm"/>
        </style:list-level-properties>
      </text:list-level-style-bullet>
      <text:list-level-style-bullet text:level="9" text:style-name="ListLabel_20_81" text:bullet-char="•">
        <style:list-level-properties text:list-level-position-and-space-mode="label-alignment">
          <style:list-level-label-alignment text:label-followed-by="listtab" fo:text-indent="-0.635cm" fo:margin-left="14.3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635cm" fo:margin-left="1.549cm"/>
        </style:list-level-properties>
      </text:list-level-style-number>
      <text:list-level-style-bullet text:level="2" text:style-name="ListLabel_20_83" text:bullet-char="•">
        <style:list-level-properties text:list-level-position-and-space-mode="label-alignment">
          <style:list-level-label-alignment text:label-followed-by="listtab" fo:text-indent="-0.635cm" fo:margin-left="3.147cm"/>
        </style:list-level-properties>
      </text:list-level-style-bullet>
      <text:list-level-style-bullet text:level="3" text:style-name="ListLabel_20_84" text:bullet-char="•">
        <style:list-level-properties text:list-level-position-and-space-mode="label-alignment">
          <style:list-level-label-alignment text:label-followed-by="listtab" fo:text-indent="-0.635cm" fo:margin-left="4.743cm"/>
        </style:list-level-properties>
      </text:list-level-style-bullet>
      <text:list-level-style-bullet text:level="4" text:style-name="ListLabel_20_85" text:bullet-char="•">
        <style:list-level-properties text:list-level-position-and-space-mode="label-alignment">
          <style:list-level-label-alignment text:label-followed-by="listtab" fo:text-indent="-0.635cm" fo:margin-left="6.338cm"/>
        </style:list-level-properties>
      </text:list-level-style-bullet>
      <text:list-level-style-bullet text:level="5" text:style-name="ListLabel_20_86" text:bullet-char="•">
        <style:list-level-properties text:list-level-position-and-space-mode="label-alignment">
          <style:list-level-label-alignment text:label-followed-by="listtab" fo:text-indent="-0.635cm" fo:margin-left="7.934cm"/>
        </style:list-level-properties>
      </text:list-level-style-bullet>
      <text:list-level-style-bullet text:level="6" text:style-name="ListLabel_20_87" text:bullet-char="•">
        <style:list-level-properties text:list-level-position-and-space-mode="label-alignment">
          <style:list-level-label-alignment text:label-followed-by="listtab" fo:text-indent="-0.635cm" fo:margin-left="9.53cm"/>
        </style:list-level-properties>
      </text:list-level-style-bullet>
      <text:list-level-style-bullet text:level="7" text:style-name="ListLabel_20_88" text:bullet-char="•">
        <style:list-level-properties text:list-level-position-and-space-mode="label-alignment">
          <style:list-level-label-alignment text:label-followed-by="listtab" fo:text-indent="-0.635cm" fo:margin-left="11.125cm"/>
        </style:list-level-properties>
      </text:list-level-style-bullet>
      <text:list-level-style-bullet text:level="8" text:style-name="ListLabel_20_89" text:bullet-char="•">
        <style:list-level-properties text:list-level-position-and-space-mode="label-alignment">
          <style:list-level-label-alignment text:label-followed-by="listtab" fo:text-indent="-0.635cm" fo:margin-left="12.721cm"/>
        </style:list-level-properties>
      </text:list-level-style-bullet>
      <text:list-level-style-bullet text:level="9" text:style-name="ListLabel_20_90" text:bullet-char="•">
        <style:list-level-properties text:list-level-position-and-space-mode="label-alignment">
          <style:list-level-label-alignment text:label-followed-by="listtab" fo:text-indent="-0.635cm" fo:margin-left="14.3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format="1">
        <style:list-level-properties text:list-level-position-and-space-mode="label-alignment">
          <style:list-level-label-alignment text:label-followed-by="listtab" fo:text-indent="-0.635cm" fo:margin-left="1.549cm"/>
        </style:list-level-properties>
      </text:list-level-style-number>
      <text:list-level-style-bullet text:level="2" text:style-name="ListLabel_20_92" text:bullet-char="•">
        <style:list-level-properties text:list-level-position-and-space-mode="label-alignment">
          <style:list-level-label-alignment text:label-followed-by="listtab" fo:text-indent="-0.635cm" fo:margin-left="3.147cm"/>
        </style:list-level-properties>
      </text:list-level-style-bullet>
      <text:list-level-style-bullet text:level="3" text:style-name="ListLabel_20_93" text:bullet-char="•">
        <style:list-level-properties text:list-level-position-and-space-mode="label-alignment">
          <style:list-level-label-alignment text:label-followed-by="listtab" fo:text-indent="-0.635cm" fo:margin-left="4.743cm"/>
        </style:list-level-properties>
      </text:list-level-style-bullet>
      <text:list-level-style-bullet text:level="4" text:style-name="ListLabel_20_94" text:bullet-char="•">
        <style:list-level-properties text:list-level-position-and-space-mode="label-alignment">
          <style:list-level-label-alignment text:label-followed-by="listtab" fo:text-indent="-0.635cm" fo:margin-left="6.338cm"/>
        </style:list-level-properties>
      </text:list-level-style-bullet>
      <text:list-level-style-bullet text:level="5" text:style-name="ListLabel_20_95" text:bullet-char="•">
        <style:list-level-properties text:list-level-position-and-space-mode="label-alignment">
          <style:list-level-label-alignment text:label-followed-by="listtab" fo:text-indent="-0.635cm" fo:margin-left="7.934cm"/>
        </style:list-level-properties>
      </text:list-level-style-bullet>
      <text:list-level-style-bullet text:level="6" text:style-name="ListLabel_20_96" text:bullet-char="•">
        <style:list-level-properties text:list-level-position-and-space-mode="label-alignment">
          <style:list-level-label-alignment text:label-followed-by="listtab" fo:text-indent="-0.635cm" fo:margin-left="9.53cm"/>
        </style:list-level-properties>
      </text:list-level-style-bullet>
      <text:list-level-style-bullet text:level="7" text:style-name="ListLabel_20_97" text:bullet-char="•">
        <style:list-level-properties text:list-level-position-and-space-mode="label-alignment">
          <style:list-level-label-alignment text:label-followed-by="listtab" fo:text-indent="-0.635cm" fo:margin-left="11.125cm"/>
        </style:list-level-properties>
      </text:list-level-style-bullet>
      <text:list-level-style-bullet text:level="8" text:style-name="ListLabel_20_98" text:bullet-char="•">
        <style:list-level-properties text:list-level-position-and-space-mode="label-alignment">
          <style:list-level-label-alignment text:label-followed-by="listtab" fo:text-indent="-0.635cm" fo:margin-left="12.721cm"/>
        </style:list-level-properties>
      </text:list-level-style-bullet>
      <text:list-level-style-bullet text:level="9" text:style-name="ListLabel_20_99" text:bullet-char="•">
        <style:list-level-properties text:list-level-position-and-space-mode="label-alignment">
          <style:list-level-label-alignment text:label-followed-by="listtab" fo:text-indent="-0.635cm" fo:margin-left="14.3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format="1" text:start-value="5">
        <style:list-level-properties text:list-level-position-and-space-mode="label-alignment">
          <style:list-level-label-alignment text:label-followed-by="listtab" fo:text-indent="-1.245cm" fo:margin-left="2.159cm"/>
        </style:list-level-properties>
      </text:list-level-style-number>
      <text:list-level-style-number text:level="2" text:style-name="ListLabel_20_101" style:num-format="1" text:display-levels="2">
        <style:list-level-properties text:list-level-position-and-space-mode="label-alignment">
          <style:list-level-label-alignment text:label-followed-by="listtab" fo:text-indent="-1.245cm" fo:margin-left="2.159cm"/>
        </style:list-level-properties>
      </text:list-level-style-number>
      <text:list-level-style-number text:level="3" text:style-name="ListLabel_20_102" style:num-format="1" text:display-levels="3">
        <style:list-level-properties text:list-level-position-and-space-mode="label-alignment">
          <style:list-level-label-alignment text:label-followed-by="listtab" fo:text-indent="-0.97cm" fo:margin-left="3.127cm"/>
        </style:list-level-properties>
      </text:list-level-style-number>
      <text:list-level-style-bullet text:level="4" text:style-name="ListLabel_20_103" text:bullet-char="•">
        <style:list-level-properties text:list-level-position-and-space-mode="label-alignment">
          <style:list-level-label-alignment text:label-followed-by="listtab" fo:text-indent="-0.97cm" fo:margin-left="6.332cm"/>
        </style:list-level-properties>
      </text:list-level-style-bullet>
      <text:list-level-style-bullet text:level="5" text:style-name="ListLabel_20_104" text:bullet-char="•">
        <style:list-level-properties text:list-level-position-and-space-mode="label-alignment">
          <style:list-level-label-alignment text:label-followed-by="listtab" fo:text-indent="-0.97cm" fo:margin-left="7.929cm"/>
        </style:list-level-properties>
      </text:list-level-style-bullet>
      <text:list-level-style-bullet text:level="6" text:style-name="ListLabel_20_105" text:bullet-char="•">
        <style:list-level-properties text:list-level-position-and-space-mode="label-alignment">
          <style:list-level-label-alignment text:label-followed-by="listtab" fo:text-indent="-0.97cm" fo:margin-left="9.525cm"/>
        </style:list-level-properties>
      </text:list-level-style-bullet>
      <text:list-level-style-bullet text:level="7" text:style-name="ListLabel_20_106" text:bullet-char="•">
        <style:list-level-properties text:list-level-position-and-space-mode="label-alignment">
          <style:list-level-label-alignment text:label-followed-by="listtab" fo:text-indent="-0.97cm" fo:margin-left="11.121cm"/>
        </style:list-level-properties>
      </text:list-level-style-bullet>
      <text:list-level-style-bullet text:level="8" text:style-name="ListLabel_20_107" text:bullet-char="•">
        <style:list-level-properties text:list-level-position-and-space-mode="label-alignment">
          <style:list-level-label-alignment text:label-followed-by="listtab" fo:text-indent="-0.97cm" fo:margin-left="12.718cm"/>
        </style:list-level-properties>
      </text:list-level-style-bullet>
      <text:list-level-style-bullet text:level="9" text:style-name="ListLabel_20_108" text:bullet-char="•">
        <style:list-level-properties text:list-level-position-and-space-mode="label-alignment">
          <style:list-level-label-alignment text:label-followed-by="listtab" fo:text-indent="-0.97cm" fo:margin-left="14.3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635cm" fo:margin-left="1.549cm"/>
        </style:list-level-properties>
        <style:text-properties style:font-name="Symbol"/>
      </text:list-level-style-bullet>
      <text:list-level-style-bullet text:level="2" text:style-name="ListLabel_20_110" text:bullet-char="•">
        <style:list-level-properties text:list-level-position-and-space-mode="label-alignment">
          <style:list-level-label-alignment text:label-followed-by="listtab" fo:text-indent="-0.635cm" fo:margin-left="3.147cm"/>
        </style:list-level-properties>
      </text:list-level-style-bullet>
      <text:list-level-style-bullet text:level="3" text:style-name="ListLabel_20_111" text:bullet-char="•">
        <style:list-level-properties text:list-level-position-and-space-mode="label-alignment">
          <style:list-level-label-alignment text:label-followed-by="listtab" fo:text-indent="-0.635cm" fo:margin-left="4.743cm"/>
        </style:list-level-properties>
      </text:list-level-style-bullet>
      <text:list-level-style-bullet text:level="4" text:style-name="ListLabel_20_112" text:bullet-char="•">
        <style:list-level-properties text:list-level-position-and-space-mode="label-alignment">
          <style:list-level-label-alignment text:label-followed-by="listtab" fo:text-indent="-0.635cm" fo:margin-left="6.338cm"/>
        </style:list-level-properties>
      </text:list-level-style-bullet>
      <text:list-level-style-bullet text:level="5" text:style-name="ListLabel_20_113" text:bullet-char="•">
        <style:list-level-properties text:list-level-position-and-space-mode="label-alignment">
          <style:list-level-label-alignment text:label-followed-by="listtab" fo:text-indent="-0.635cm" fo:margin-left="7.934cm"/>
        </style:list-level-properties>
      </text:list-level-style-bullet>
      <text:list-level-style-bullet text:level="6" text:style-name="ListLabel_20_114" text:bullet-char="•">
        <style:list-level-properties text:list-level-position-and-space-mode="label-alignment">
          <style:list-level-label-alignment text:label-followed-by="listtab" fo:text-indent="-0.635cm" fo:margin-left="9.53cm"/>
        </style:list-level-properties>
      </text:list-level-style-bullet>
      <text:list-level-style-bullet text:level="7" text:style-name="ListLabel_20_115" text:bullet-char="•">
        <style:list-level-properties text:list-level-position-and-space-mode="label-alignment">
          <style:list-level-label-alignment text:label-followed-by="listtab" fo:text-indent="-0.635cm" fo:margin-left="11.125cm"/>
        </style:list-level-properties>
      </text:list-level-style-bullet>
      <text:list-level-style-bullet text:level="8" text:style-name="ListLabel_20_116" text:bullet-char="•">
        <style:list-level-properties text:list-level-position-and-space-mode="label-alignment">
          <style:list-level-label-alignment text:label-followed-by="listtab" fo:text-indent="-0.635cm" fo:margin-left="12.721cm"/>
        </style:list-level-properties>
      </text:list-level-style-bullet>
      <text:list-level-style-bullet text:level="9" text:style-name="ListLabel_20_117" text:bullet-char="•">
        <style:list-level-properties text:list-level-position-and-space-mode="label-alignment">
          <style:list-level-label-alignment text:label-followed-by="listtab" fo:text-indent="-0.635cm" fo:margin-left="14.3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format="1">
        <style:list-level-properties text:list-level-position-and-space-mode="label-alignment">
          <style:list-level-label-alignment text:label-followed-by="listtab" fo:text-indent="-0.635cm" fo:margin-left="1.549cm"/>
        </style:list-level-properties>
      </text:list-level-style-number>
      <text:list-level-style-number text:level="2" text:style-name="ListLabel_20_119" style:num-format="1" text:display-levels="2">
        <style:list-level-properties text:list-level-position-and-space-mode="label-alignment">
          <style:list-level-label-alignment text:label-followed-by="listtab" fo:text-indent="-0.631cm" fo:margin-left="3.531cm"/>
        </style:list-level-properties>
      </text:list-level-style-number>
      <text:list-level-style-bullet text:level="3" text:style-name="ListLabel_20_120" text:bullet-char="•">
        <style:list-level-properties text:list-level-position-and-space-mode="label-alignment">
          <style:list-level-label-alignment text:label-followed-by="listtab" fo:text-indent="-0.631cm" fo:margin-left="5.08cm"/>
        </style:list-level-properties>
      </text:list-level-style-bullet>
      <text:list-level-style-bullet text:level="4" text:style-name="ListLabel_20_121" text:bullet-char="•">
        <style:list-level-properties text:list-level-position-and-space-mode="label-alignment">
          <style:list-level-label-alignment text:label-followed-by="listtab" fo:text-indent="-0.631cm" fo:margin-left="6.634cm"/>
        </style:list-level-properties>
      </text:list-level-style-bullet>
      <text:list-level-style-bullet text:level="5" text:style-name="ListLabel_20_122" text:bullet-char="•">
        <style:list-level-properties text:list-level-position-and-space-mode="label-alignment">
          <style:list-level-label-alignment text:label-followed-by="listtab" fo:text-indent="-0.631cm" fo:margin-left="8.188cm"/>
        </style:list-level-properties>
      </text:list-level-style-bullet>
      <text:list-level-style-bullet text:level="6" text:style-name="ListLabel_20_123" text:bullet-char="•">
        <style:list-level-properties text:list-level-position-and-space-mode="label-alignment">
          <style:list-level-label-alignment text:label-followed-by="listtab" fo:text-indent="-0.631cm" fo:margin-left="9.74cm"/>
        </style:list-level-properties>
      </text:list-level-style-bullet>
      <text:list-level-style-bullet text:level="7" text:style-name="ListLabel_20_124" text:bullet-char="•">
        <style:list-level-properties text:list-level-position-and-space-mode="label-alignment">
          <style:list-level-label-alignment text:label-followed-by="listtab" fo:text-indent="-0.631cm" fo:margin-left="11.294cm"/>
        </style:list-level-properties>
      </text:list-level-style-bullet>
      <text:list-level-style-bullet text:level="8" text:style-name="ListLabel_20_125" text:bullet-char="•">
        <style:list-level-properties text:list-level-position-and-space-mode="label-alignment">
          <style:list-level-label-alignment text:label-followed-by="listtab" fo:text-indent="-0.631cm" fo:margin-left="12.848cm"/>
        </style:list-level-properties>
      </text:list-level-style-bullet>
      <text:list-level-style-bullet text:level="9" text:style-name="ListLabel_20_126" text:bullet-char="•">
        <style:list-level-properties text:list-level-position-and-space-mode="label-alignment">
          <style:list-level-label-alignment text:label-followed-by="listtab" fo:text-indent="-0.631cm" fo:margin-left="1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format="1" text:start-value="6">
        <style:list-level-properties text:list-level-position-and-space-mode="label-alignment">
          <style:list-level-label-alignment text:label-followed-by="listtab" fo:text-indent="-0.635cm" fo:margin-left="1.549cm"/>
        </style:list-level-properties>
      </text:list-level-style-number>
      <text:list-level-style-number text:level="2" text:style-name="ListLabel_20_128" style:num-format="1" text:display-levels="2">
        <style:list-level-properties text:list-level-position-and-space-mode="label-alignment">
          <style:list-level-label-alignment text:label-followed-by="listtab" fo:text-indent="-1.27cm" fo:margin-left="2.819cm"/>
        </style:list-level-properties>
      </text:list-level-style-number>
      <text:list-level-style-bullet text:level="3" text:style-name="ListLabel_20_129" text:bullet-char="•">
        <style:list-level-properties text:list-level-position-and-space-mode="label-alignment">
          <style:list-level-label-alignment text:label-followed-by="listtab" fo:text-indent="-1.27cm" fo:margin-left="4.454cm"/>
        </style:list-level-properties>
      </text:list-level-style-bullet>
      <text:list-level-style-bullet text:level="4" text:style-name="ListLabel_20_130" text:bullet-char="•">
        <style:list-level-properties text:list-level-position-and-space-mode="label-alignment">
          <style:list-level-label-alignment text:label-followed-by="listtab" fo:text-indent="-1.27cm" fo:margin-left="6.085cm"/>
        </style:list-level-properties>
      </text:list-level-style-bullet>
      <text:list-level-style-bullet text:level="5" text:style-name="ListLabel_20_131" text:bullet-char="•">
        <style:list-level-properties text:list-level-position-and-space-mode="label-alignment">
          <style:list-level-label-alignment text:label-followed-by="listtab" fo:text-indent="-1.27cm" fo:margin-left="7.717cm"/>
        </style:list-level-properties>
      </text:list-level-style-bullet>
      <text:list-level-style-bullet text:level="6" text:style-name="ListLabel_20_132" text:bullet-char="•">
        <style:list-level-properties text:list-level-position-and-space-mode="label-alignment">
          <style:list-level-label-alignment text:label-followed-by="listtab" fo:text-indent="-1.27cm" fo:margin-left="9.349cm"/>
        </style:list-level-properties>
      </text:list-level-style-bullet>
      <text:list-level-style-bullet text:level="7" text:style-name="ListLabel_20_133" text:bullet-char="•">
        <style:list-level-properties text:list-level-position-and-space-mode="label-alignment">
          <style:list-level-label-alignment text:label-followed-by="listtab" fo:text-indent="-1.27cm" fo:margin-left="10.98cm"/>
        </style:list-level-properties>
      </text:list-level-style-bullet>
      <text:list-level-style-bullet text:level="8" text:style-name="ListLabel_20_134" text:bullet-char="•">
        <style:list-level-properties text:list-level-position-and-space-mode="label-alignment">
          <style:list-level-label-alignment text:label-followed-by="listtab" fo:text-indent="-1.27cm" fo:margin-left="12.612cm"/>
        </style:list-level-properties>
      </text:list-level-style-bullet>
      <text:list-level-style-bullet text:level="9" text:style-name="ListLabel_20_135" text:bullet-char="•">
        <style:list-level-properties text:list-level-position-and-space-mode="label-alignment">
          <style:list-level-label-alignment text:label-followed-by="listtab" fo:text-indent="-1.27cm" fo:margin-left="14.2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format="1" text:start-value="5">
        <style:list-level-properties text:list-level-position-and-space-mode="label-alignment">
          <style:list-level-label-alignment text:label-followed-by="listtab" fo:text-indent="-1.27cm" fo:margin-left="2.819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fo:text-indent="-1.27cm" fo:margin-left="2.819cm"/>
        </style:list-level-properties>
      </text:list-level-style-number>
      <text:list-level-style-bullet text:level="3" text:style-name="ListLabel_20_138" text:bullet-char="•">
        <style:list-level-properties text:list-level-position-and-space-mode="label-alignment">
          <style:list-level-label-alignment text:label-followed-by="listtab" fo:text-indent="-1.27cm" fo:margin-left="5.759cm"/>
        </style:list-level-properties>
      </text:list-level-style-bullet>
      <text:list-level-style-bullet text:level="4" text:style-name="ListLabel_20_139" text:bullet-char="•">
        <style:list-level-properties text:list-level-position-and-space-mode="label-alignment">
          <style:list-level-label-alignment text:label-followed-by="listtab" fo:text-indent="-1.27cm" fo:margin-left="7.227cm"/>
        </style:list-level-properties>
      </text:list-level-style-bullet>
      <text:list-level-style-bullet text:level="5" text:style-name="ListLabel_20_140" text:bullet-char="•">
        <style:list-level-properties text:list-level-position-and-space-mode="label-alignment">
          <style:list-level-label-alignment text:label-followed-by="listtab" fo:text-indent="-1.27cm" fo:margin-left="8.696cm"/>
        </style:list-level-properties>
      </text:list-level-style-bullet>
      <text:list-level-style-bullet text:level="6" text:style-name="ListLabel_20_141" text:bullet-char="•">
        <style:list-level-properties text:list-level-position-and-space-mode="label-alignment">
          <style:list-level-label-alignment text:label-followed-by="listtab" fo:text-indent="-1.27cm" fo:margin-left="10.165cm"/>
        </style:list-level-properties>
      </text:list-level-style-bullet>
      <text:list-level-style-bullet text:level="7" text:style-name="ListLabel_20_142" text:bullet-char="•">
        <style:list-level-properties text:list-level-position-and-space-mode="label-alignment">
          <style:list-level-label-alignment text:label-followed-by="listtab" fo:text-indent="-1.27cm" fo:margin-left="11.633cm"/>
        </style:list-level-properties>
      </text:list-level-style-bullet>
      <text:list-level-style-bullet text:level="8" text:style-name="ListLabel_20_143" text:bullet-char="•">
        <style:list-level-properties text:list-level-position-and-space-mode="label-alignment">
          <style:list-level-label-alignment text:label-followed-by="listtab" fo:text-indent="-1.27cm" fo:margin-left="13.102cm"/>
        </style:list-level-properties>
      </text:list-level-style-bullet>
      <text:list-level-style-bullet text:level="9" text:style-name="ListLabel_20_144" text:bullet-char="•">
        <style:list-level-properties text:list-level-position-and-space-mode="label-alignment">
          <style:list-level-label-alignment text:label-followed-by="listtab" fo:text-indent="-1.27cm" fo:margin-left="14.5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106cm" fo:margin-right="0cm" fo:line-height="0.432cm" fo:text-indent="0cm" style:auto-text-indent="false"/>
    </style:style>
    <style:style style:name="MP3" style:family="paragraph" style:parent-style-name="Text_20_body">
      <style:paragraph-properties fo:line-height="5%"/>
      <style:text-properties fo:font-size="1pt" style:font-size-asian="1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1.729cm" fo:margin-bottom="0.494cm" fo:margin-left="2.223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5cm" fo:margin-bottom="0.494cm" fo:margin-left="2.223cm" fo:margin-right="1.27cm" style:writing-mode="lr-tb" style:layout-grid-color="#c0c0c0" style:layout-grid-lines="267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93cm" fo:margin-bottom="0.494cm" fo:margin-left="2.223cm" fo:margin-right="1.27cm" style:writing-mode="lr-tb" style:layout-grid-color="#c0c0c0" style:layout-grid-lines="2751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658cm" fo:margin-bottom="1.769cm" fo:margin-left="2.223cm" fo:margin-right="1.27cm" style:writing-mode="lr-tb" style:layout-grid-color="#c0c0c0" style:layout-grid-lines="2592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47cm" fo:margin-left="0cm" fo:margin-right="0cm" fo:margin-top="0.249cm" style:dynamic-spacing="true"/>
      </style:footer-style>
    </style:page-layout>
    <style:page-layout style:name="Mpm5">
      <style:page-layout-properties fo:page-width="21.001cm" fo:page-height="29.7cm" style:num-format="1" style:print-orientation="portrait" fo:margin-top="2.611cm" fo:margin-bottom="1.769cm" fo:margin-left="2.223cm" fo:margin-right="1.27cm" style:writing-mode="lr-tb" style:layout-grid-color="#c0c0c0" style:layout-grid-lines="2497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47cm" fo:margin-left="0cm" fo:margin-right="0cm" fo:margin-top="0.249cm" style:dynamic-spacing="true"/>
      </style:footer-style>
    </style:page-layout>
    <style:page-layout style:name="Mpm6">
      <style:page-layout-properties fo:page-width="21.001cm" fo:page-height="29.7cm" style:num-format="1" style:print-orientation="portrait" fo:margin-top="1.693cm" fo:margin-bottom="1.769cm" fo:margin-left="2.223cm" fo:margin-right="1.27cm" style:writing-mode="lr-tb" style:layout-grid-color="#c0c0c0" style:layout-grid-lines="258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47cm" fo:margin-left="0cm" fo:margin-right="0cm" fo:margin-top="0.249cm" style:dynamic-spacing="true"/>
      </style:footer-style>
    </style:page-layout>
    <style:page-layout style:name="Mpm7">
      <style:page-layout-properties fo:page-width="21.001cm" fo:page-height="29.7cm" style:num-format="1" style:print-orientation="portrait" fo:margin-top="2.787cm" fo:margin-bottom="0cm" fo:margin-left="2.223cm" fo:margin-right="1.27cm" style:writing-mode="lr-tb" style:layout-grid-color="#c0c0c0" style:layout-grid-lines="2641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4cm" fo:margin-left="0cm" fo:margin-right="0cm" fo:margin-top="0.393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3"/>
    <style:master-page style:name="Converted3" style:page-layout-name="Mpm4">
      <style:footer>
        <text:p text:style-name="MP1"><draw:frame draw:style-name="Mfr1" draw:name="Quadro1" text:anchor-type="char" svg:x="18.507cm" svg:y="27.545cm" svg:width="0.61cm" svg:height="0.46cm" draw:z-index="0"><draw:text-box><text:p text:style-name="MP2"><text:page-number text:select-page="current">4</text:page-number></text:p></draw:text-box></draw:frame></text:p>
      </style:footer>
    </style:master-page>
    <style:master-page style:name="Converted4" style:page-layout-name="Mpm4">
      <style:footer>
        <text:p text:style-name="MP1"><draw:frame draw:style-name="Mfr1" draw:name="1" text:anchor-type="char" svg:x="18.507cm" svg:y="27.545cm" svg:width="0.61cm" svg:height="0.46cm" draw:z-index="29"><draw:text-box><text:p text:style-name="MP2"><text:page-number text:select-page="current">5</text:page-number></text:p></draw:text-box></draw:frame></text:p>
      </style:footer>
    </style:master-page>
    <style:master-page style:name="Converted5" style:page-layout-name="Mpm4">
      <style:footer>
        <text:p text:style-name="MP1"><draw:frame draw:style-name="Mfr1" draw:name="2" text:anchor-type="char" svg:x="18.507cm" svg:y="27.545cm" svg:width="0.61cm" svg:height="0.46cm" draw:z-index="30"><draw:text-box><text:p text:style-name="MP2"><text:page-number text:select-page="current">6</text:page-number></text:p></draw:text-box></draw:frame></text:p>
      </style:footer>
    </style:master-page>
    <style:master-page style:name="Converted6" style:page-layout-name="Mpm4">
      <style:footer>
        <text:p text:style-name="MP1"><draw:frame draw:style-name="Mfr1" draw:name="3" text:anchor-type="char" svg:x="18.507cm" svg:y="27.545cm" svg:width="0.61cm" svg:height="0.46cm" draw:z-index="32"><draw:text-box><text:p text:style-name="MP2"><text:page-number text:select-page="current">7</text:page-number></text:p></draw:text-box></draw:frame></text:p>
      </style:footer>
    </style:master-page>
    <style:master-page style:name="Converted7" style:page-layout-name="Mpm4">
      <style:footer>
        <text:p text:style-name="MP1"><draw:frame draw:style-name="Mfr1" draw:name="4" text:anchor-type="char" svg:x="18.507cm" svg:y="27.545cm" svg:width="0.61cm" svg:height="0.46cm" draw:z-index="33"><draw:text-box><text:p text:style-name="MP2"><text:page-number text:select-page="current">8</text:page-number></text:p></draw:text-box></draw:frame></text:p>
      </style:footer>
    </style:master-page>
    <style:master-page style:name="Converted8" style:page-layout-name="Mpm4">
      <style:footer>
        <text:p text:style-name="MP1"><draw:frame draw:style-name="Mfr1" draw:name="5" text:anchor-type="char" svg:x="18.507cm" svg:y="27.545cm" svg:width="0.61cm" svg:height="0.46cm" draw:z-index="34"><draw:text-box><text:p text:style-name="MP2"><text:page-number text:select-page="current">9</text:page-number></text:p></draw:text-box></draw:frame></text:p>
      </style:footer>
    </style:master-page>
    <style:master-page style:name="Converted9" style:page-layout-name="Mpm4">
      <style:footer>
        <text:p text:style-name="MP1"><draw:frame draw:style-name="Mfr1" draw:name="6" text:anchor-type="char" svg:x="18.507cm" svg:y="27.545cm" svg:width="0.61cm" svg:height="0.46cm" draw:z-index="35"><draw:text-box><text:p text:style-name="MP2"><text:page-number text:select-page="current">10</text:page-number></text:p></draw:text-box></draw:frame></text:p>
      </style:footer>
    </style:master-page>
    <style:master-page style:name="Converted10" style:page-layout-name="Mpm4">
      <style:footer>
        <text:p text:style-name="MP1"><draw:frame draw:style-name="Mfr1" draw:name="7" text:anchor-type="char" svg:x="18.507cm" svg:y="27.545cm" svg:width="0.61cm" svg:height="0.46cm" draw:z-index="53"><draw:text-box><text:p text:style-name="MP2"><text:page-number text:select-page="current">11</text:page-number></text:p></draw:text-box></draw:frame></text:p>
      </style:footer>
    </style:master-page>
    <style:master-page style:name="Converted11" style:page-layout-name="Mpm4">
      <style:footer>
        <text:p text:style-name="MP1"><draw:frame draw:style-name="Mfr1" draw:name="8" text:anchor-type="char" svg:x="18.507cm" svg:y="27.545cm" svg:width="0.61cm" svg:height="0.46cm" draw:z-index="51"><draw:text-box><text:p text:style-name="MP2"><text:page-number text:select-page="current">12</text:page-number></text:p></draw:text-box></draw:frame></text:p>
      </style:footer>
    </style:master-page>
    <style:master-page style:name="Converted12" style:page-layout-name="Mpm4">
      <style:footer>
        <text:p text:style-name="MP1"><draw:frame draw:style-name="Mfr1" draw:name="9" text:anchor-type="char" svg:x="18.507cm" svg:y="27.545cm" svg:width="0.61cm" svg:height="0.46cm" draw:z-index="50"><draw:text-box><text:p text:style-name="MP2"><text:page-number text:select-page="current">13</text:page-number></text:p></draw:text-box></draw:frame></text:p>
      </style:footer>
    </style:master-page>
    <style:master-page style:name="Converted13" style:page-layout-name="Mpm4">
      <style:footer>
        <text:p text:style-name="MP1"><draw:frame draw:style-name="Mfr1" draw:name="10" text:anchor-type="char" svg:x="18.507cm" svg:y="27.545cm" svg:width="0.61cm" svg:height="0.46cm" draw:z-index="36"><draw:text-box><text:p text:style-name="MP2"><text:page-number text:select-page="current">14</text:page-number></text:p></draw:text-box></draw:frame></text:p>
      </style:footer>
    </style:master-page>
    <style:master-page style:name="Converted14" style:page-layout-name="Mpm4">
      <style:footer>
        <text:p text:style-name="MP1"><draw:frame draw:style-name="Mfr1" draw:name="11" text:anchor-type="char" svg:x="18.507cm" svg:y="27.545cm" svg:width="0.61cm" svg:height="0.46cm" draw:z-index="37"><draw:text-box><text:p text:style-name="MP2"><text:page-number text:select-page="current">15</text:page-number></text:p></draw:text-box></draw:frame></text:p>
      </style:footer>
    </style:master-page>
    <style:master-page style:name="Converted15" style:page-layout-name="Mpm4">
      <style:footer>
        <text:p text:style-name="MP1"><draw:frame draw:style-name="Mfr1" draw:name="12" text:anchor-type="char" svg:x="18.507cm" svg:y="27.545cm" svg:width="0.61cm" svg:height="0.46cm" draw:z-index="38"><draw:text-box><text:p text:style-name="MP2"><text:page-number text:select-page="current">16</text:page-number></text:p></draw:text-box></draw:frame></text:p>
      </style:footer>
    </style:master-page>
    <style:master-page style:name="Converted16" style:page-layout-name="Mpm4">
      <style:footer>
        <text:p text:style-name="MP1"><draw:frame draw:style-name="Mfr1" draw:name="13" text:anchor-type="char" svg:x="18.507cm" svg:y="27.545cm" svg:width="0.61cm" svg:height="0.46cm" draw:z-index="39"><draw:text-box><text:p text:style-name="MP2"><text:page-number text:select-page="current">17</text:page-number></text:p></draw:text-box></draw:frame></text:p>
      </style:footer>
    </style:master-page>
    <style:master-page style:name="Converted17" style:page-layout-name="Mpm4">
      <style:footer>
        <text:p text:style-name="MP1"><draw:frame draw:style-name="Mfr1" draw:name="14" text:anchor-type="char" svg:x="18.507cm" svg:y="27.545cm" svg:width="0.61cm" svg:height="0.46cm" draw:z-index="40"><draw:text-box><text:p text:style-name="MP2"><text:page-number text:select-page="current">18</text:page-number></text:p></draw:text-box></draw:frame></text:p>
      </style:footer>
    </style:master-page>
    <style:master-page style:name="Converted18" style:page-layout-name="Mpm4">
      <style:footer>
        <text:p text:style-name="MP1"><draw:frame draw:style-name="Mfr1" draw:name="15" text:anchor-type="char" svg:x="18.507cm" svg:y="27.545cm" svg:width="0.61cm" svg:height="0.46cm" draw:z-index="41"><draw:text-box><text:p text:style-name="MP2"><text:page-number text:select-page="current">19</text:page-number></text:p></draw:text-box></draw:frame></text:p>
      </style:footer>
    </style:master-page>
    <style:master-page style:name="Converted19" style:page-layout-name="Mpm5">
      <style:footer>
        <text:p text:style-name="MP1"><draw:frame draw:style-name="Mfr1" draw:name="16" text:anchor-type="char" svg:x="18.507cm" svg:y="27.545cm" svg:width="0.61cm" svg:height="0.46cm" draw:z-index="42"><draw:text-box><text:p text:style-name="MP2"><text:page-number text:select-page="current">20</text:page-number></text:p></draw:text-box></draw:frame></text:p>
      </style:footer>
    </style:master-page>
    <style:master-page style:name="Converted20" style:page-layout-name="Mpm4">
      <style:footer>
        <text:p text:style-name="MP1"><draw:frame draw:style-name="Mfr1" draw:name="17" text:anchor-type="char" svg:x="18.507cm" svg:y="27.545cm" svg:width="0.61cm" svg:height="0.46cm" draw:z-index="43"><draw:text-box><text:p text:style-name="MP2"><text:page-number text:select-page="current">21</text:page-number></text:p></draw:text-box></draw:frame></text:p>
      </style:footer>
    </style:master-page>
    <style:master-page style:name="Converted21" style:page-layout-name="Mpm4">
      <style:footer>
        <text:p text:style-name="MP1"><draw:frame draw:style-name="Mfr1" draw:name="18" text:anchor-type="char" svg:x="18.507cm" svg:y="27.545cm" svg:width="0.61cm" svg:height="0.46cm" draw:z-index="44"><draw:text-box><text:p text:style-name="MP2"><text:page-number text:select-page="current">22</text:page-number></text:p></draw:text-box></draw:frame></text:p>
      </style:footer>
    </style:master-page>
    <style:master-page style:name="Converted22" style:page-layout-name="Mpm4">
      <style:footer>
        <text:p text:style-name="MP1"><draw:frame draw:style-name="Mfr1" draw:name="19" text:anchor-type="char" svg:x="18.507cm" svg:y="27.545cm" svg:width="0.61cm" svg:height="0.46cm" draw:z-index="45"><draw:text-box><text:p text:style-name="MP2"><text:page-number text:select-page="current">23</text:page-number></text:p></draw:text-box></draw:frame></text:p>
      </style:footer>
    </style:master-page>
    <style:master-page style:name="Converted23" style:page-layout-name="Mpm6">
      <style:footer>
        <text:p text:style-name="MP1"><draw:frame draw:style-name="Mfr1" draw:name="20" text:anchor-type="char" svg:x="18.507cm" svg:y="27.545cm" svg:width="0.61cm" svg:height="0.46cm" draw:z-index="46"><draw:text-box><text:p text:style-name="MP2"><text:page-number text:select-page="current">24</text:page-number></text:p></draw:text-box></draw:frame></text:p>
      </style:footer>
    </style:master-page>
    <style:master-page style:name="Converted24" style:page-layout-name="Mpm4">
      <style:footer>
        <text:p text:style-name="MP1"><draw:frame draw:style-name="Mfr1" draw:name="21" text:anchor-type="char" svg:x="18.507cm" svg:y="27.545cm" svg:width="0.61cm" svg:height="0.46cm" draw:z-index="47"><draw:text-box><text:p text:style-name="MP2"><text:page-number text:select-page="current">25</text:page-number></text:p></draw:text-box></draw:frame></text:p>
      </style:footer>
    </style:master-page>
    <style:master-page style:name="Converted25" style:page-layout-name="Mpm5">
      <style:footer>
        <text:p text:style-name="MP1"><draw:frame draw:style-name="Mfr1" draw:name="22" text:anchor-type="char" svg:x="18.507cm" svg:y="27.545cm" svg:width="0.61cm" svg:height="0.46cm" draw:z-index="48"><draw:text-box><text:p text:style-name="MP2"><text:page-number text:select-page="current">26</text:page-number></text:p></draw:text-box></draw:frame></text:p>
      </style:footer>
    </style:master-page>
    <style:master-page style:name="Converted26" style:page-layout-name="Mpm4">
      <style:footer>
        <text:p text:style-name="MP1"><draw:frame draw:style-name="Mfr1" draw:name="23" text:anchor-type="char" svg:x="18.507cm" svg:y="27.545cm" svg:width="0.61cm" svg:height="0.46cm" draw:z-index="49"><draw:text-box><text:p text:style-name="MP2"><text:page-number text:select-page="current">27</text:page-number></text:p></draw:text-box></draw:frame></text:p>
      </style:footer>
    </style:master-page>
    <style:master-page style:name="Converted27" style:page-layout-name="Mpm4">
      <style:footer>
        <text:p text:style-name="MP1"><draw:frame draw:style-name="Mfr1" draw:name="24" text:anchor-type="char" svg:x="18.507cm" svg:y="27.545cm" svg:width="0.61cm" svg:height="0.46cm" draw:z-index="52"><draw:text-box><text:p text:style-name="MP2"><text:page-number text:select-page="current">28</text:page-number></text:p></draw:text-box></draw:frame></text:p>
      </style:footer>
    </style:master-page>
    <style:master-page style:name="Converted28" style:page-layout-name="Mpm7">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arlos Eduardo Gomes Souza</meta:initial-creator>
    <meta:editing-cycles>3</meta:editing-cycles>
    <meta:creation-date>2020-08-28T11:21:00</meta:creation-date>
    <dc:date>2020-08-28T08:51:08.920000000</dc:date>
    <meta:editing-duration>PT9M12S</meta:editing-duration>
    <meta:generator>LibreOffice/7.0.0.3$Windows_X86_64 LibreOffice_project/8061b3e9204bef6b321a21033174034a5e2ea88e</meta:generator>
    <meta:document-statistic meta:table-count="2" meta:image-count="22" meta:object-count="0" meta:page-count="29" meta:paragraph-count="488" meta:word-count="8159" meta:character-count="53469" meta:non-whitespace-character-count="46016"/>
    <meta:user-defined meta:name="AppVersion">16.0000</meta:user-defined>
    <meta:user-defined meta:name="Created" meta:value-type="date">2018-09-03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20-08-28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